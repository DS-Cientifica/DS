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DC000005DCABA81CCF.png" manifest:media-type="image/png"/>
  <manifest:file-entry manifest:full-path="Pictures/10000000000002960000024C9D95D82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Narrow1" svg:font-family="'Arial Narrow'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family-generic="swiss"/>
    <style:font-face style:name="Arial21" svg:font-family="Arial2"/>
    <style:font-face style:name="Arial3" svg:font-family="Arial"/>
    <style:font-face style:name="Bookman Old Style" svg:font-family="'Bookman Old Style'" style:font-family-generic="roman"/>
    <style:font-face style:name="Bookman Old Style1" svg:font-family="'Bookman Old Style'" style:font-family-generic="roman" style:font-pitch="variable"/>
    <style:font-face style:name="Bookman Old Style2" svg:font-family="'Bookman Old Style'"/>
    <style:font-face style:name="Calibri" svg:font-family="Calibri" style:font-family-generic="swiss"/>
    <style:font-face style:name="Calibri1" svg:font-family="Calibri"/>
    <style:font-face style:name="Calibri11" svg:font-family="Calibri1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2'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3.193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2.346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64cm"/>
    </style:style>
    <style:style style:name="co12" style:family="table-column">
      <style:table-column-properties fo:break-before="auto" style:column-width="2.187cm"/>
    </style:style>
    <style:style style:name="co13" style:family="table-column">
      <style:table-column-properties fo:break-before="auto" style:column-width="1.87cm"/>
    </style:style>
    <style:style style:name="co14" style:family="table-column">
      <style:table-column-properties fo:break-before="auto" style:column-width="1.976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0.665cm"/>
    </style:style>
    <style:style style:name="co17" style:family="table-column">
      <style:table-column-properties fo:break-before="auto" style:column-width="0.9cm"/>
    </style:style>
    <style:style style:name="co18" style:family="table-column">
      <style:table-column-properties fo:break-before="auto" style:column-width="5.357cm"/>
    </style:style>
    <style:style style:name="co19" style:family="table-column">
      <style:table-column-properties fo:break-before="auto" style:column-width="4.232cm"/>
    </style:style>
    <style:style style:name="co20" style:family="table-column">
      <style:table-column-properties fo:break-before="auto" style:column-width="2.406cm"/>
    </style:style>
    <style:style style:name="co21" style:family="table-column">
      <style:table-column-properties fo:break-before="auto" style:column-width="4.403cm"/>
    </style:style>
    <style:style style:name="co22" style:family="table-column">
      <style:table-column-properties fo:break-before="auto" style:column-width="2.556cm"/>
    </style:style>
    <style:style style:name="co23" style:family="table-column">
      <style:table-column-properties fo:break-before="auto" style:column-width="2.385cm"/>
    </style:style>
    <style:style style:name="co24" style:family="table-column">
      <style:table-column-properties fo:break-before="auto" style:column-width="2.3cm"/>
    </style:style>
    <style:style style:name="co25" style:family="table-column">
      <style:table-column-properties fo:break-before="auto" style:column-width="3.362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0.517cm"/>
    </style:style>
    <style:style style:name="co28" style:family="table-column">
      <style:table-column-properties fo:break-before="auto" style:column-width="2.025cm"/>
    </style:style>
    <style:style style:name="co29" style:family="table-column">
      <style:table-column-properties fo:break-before="auto" style:column-width="1.515cm"/>
    </style:style>
    <style:style style:name="co30" style:family="table-column">
      <style:table-column-properties fo:break-before="auto" style:column-width="1.238cm"/>
    </style:style>
    <style:style style:name="co31" style:family="table-column">
      <style:table-column-properties fo:break-before="auto" style:column-width="1.323cm"/>
    </style:style>
    <style:style style:name="co32" style:family="table-column">
      <style:table-column-properties fo:break-before="auto" style:column-width="3.658cm"/>
    </style:style>
    <style:style style:name="co33" style:family="table-column">
      <style:table-column-properties fo:break-before="auto" style:column-width="3.787cm"/>
    </style:style>
    <style:style style:name="co34" style:family="table-column">
      <style:table-column-properties fo:break-before="auto" style:column-width="0.794cm"/>
    </style:style>
    <style:style style:name="co35" style:family="table-column">
      <style:table-column-properties fo:break-before="auto" style:column-width="2.469cm"/>
    </style:style>
    <style:style style:name="co36" style:family="table-column">
      <style:table-column-properties fo:break-before="auto" style:column-width="2.512cm"/>
    </style:style>
    <style:style style:name="co37" style:family="table-column">
      <style:table-column-properties fo:break-before="auto" style:column-width="1.494cm"/>
    </style:style>
    <style:style style:name="co38" style:family="table-column">
      <style:table-column-properties fo:break-before="auto" style:column-width="1.833cm"/>
    </style:style>
    <style:style style:name="co39" style:family="table-column">
      <style:table-column-properties fo:break-before="auto" style:column-width="2.725cm"/>
    </style:style>
    <style:style style:name="co40" style:family="table-column">
      <style:table-column-properties fo:break-before="auto" style:column-width="2.533cm"/>
    </style:style>
    <style:style style:name="co41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4.604cm"/>
    </style:style>
    <style:style style:name="co43" style:family="table-column">
      <style:table-column-properties fo:break-before="auto" style:column-width="5.609cm"/>
    </style:style>
    <style:style style:name="co44" style:family="table-column">
      <style:table-column-properties fo:break-before="auto" style:column-width="2.275cm"/>
    </style:style>
    <style:style style:name="co45" style:family="table-column">
      <style:table-column-properties fo:break-before="auto" style:column-width="5.768cm"/>
    </style:style>
    <style:style style:name="co46" style:family="table-column">
      <style:table-column-properties fo:break-before="auto" style:column-width="3.881cm"/>
    </style:style>
    <style:style style:name="co47" style:family="table-column">
      <style:table-column-properties fo:break-before="auto" style:column-width="2.822cm"/>
    </style:style>
    <style:style style:name="co48" style:family="table-column">
      <style:table-column-properties fo:break-before="auto" style:column-width="3.246cm"/>
    </style:style>
    <style:style style:name="co49" style:family="table-column">
      <style:table-column-properties fo:break-before="auto" style:column-width="5.733cm"/>
    </style:style>
    <style:style style:name="co50" style:family="table-column">
      <style:table-column-properties fo:break-before="auto" style:column-width="2.24cm"/>
    </style:style>
    <style:style style:name="co51" style:family="table-column">
      <style:table-column-properties fo:break-before="auto" style:column-width="3.367cm"/>
    </style:style>
    <style:style style:name="co52" style:family="table-column">
      <style:table-column-properties fo:break-before="auto" style:column-width="4.568cm"/>
    </style:style>
    <style:style style:name="co53" style:family="table-column">
      <style:table-column-properties fo:break-before="auto" style:column-width="3.51cm"/>
    </style:style>
    <style:style style:name="co54" style:family="table-column">
      <style:table-column-properties fo:break-before="auto" style:column-width="4.075cm"/>
    </style:style>
    <style:style style:name="co55" style:family="table-column">
      <style:table-column-properties fo:break-before="auto" style:column-width="2.381cm"/>
    </style:style>
    <style:style style:name="co56" style:family="table-column">
      <style:table-column-properties fo:break-before="auto" style:column-width="2.073cm"/>
    </style:style>
    <style:style style:name="co57" style:family="table-column">
      <style:table-column-properties fo:break-before="auto" style:column-width="1.923cm"/>
    </style:style>
    <style:style style:name="co58" style:family="table-column">
      <style:table-column-properties fo:break-before="auto" style:column-width="1.871cm"/>
    </style:style>
    <style:style style:name="co59" style:family="table-column">
      <style:table-column-properties fo:break-before="auto" style:column-width="2.981cm"/>
    </style:style>
    <style:style style:name="co60" style:family="table-column">
      <style:table-column-properties fo:break-before="auto" style:column-width="4.145cm"/>
    </style:style>
    <style:style style:name="co61" style:family="table-column">
      <style:table-column-properties fo:break-before="auto" style:column-width="1.367cm"/>
    </style:style>
    <style:style style:name="co62" style:family="table-column">
      <style:table-column-properties fo:break-before="auto" style:column-width="0.212cm"/>
    </style:style>
    <style:style style:name="co63" style:family="table-column">
      <style:table-column-properties fo:break-before="auto" style:column-width="0.249cm"/>
    </style:style>
    <style:style style:name="co64" style:family="table-column">
      <style:table-column-properties fo:break-before="auto" style:column-width="5.041cm"/>
    </style:style>
    <style:style style:name="co65" style:family="table-column">
      <style:table-column-properties fo:break-before="auto" style:column-width="1.415cm"/>
    </style:style>
    <style:style style:name="co66" style:family="table-column">
      <style:table-column-properties fo:break-before="page" style:column-width="0.617cm"/>
    </style:style>
    <style:style style:name="co67" style:family="table-column">
      <style:table-column-properties fo:break-before="auto" style:column-width="0.194cm"/>
    </style:style>
    <style:style style:name="co68" style:family="table-column">
      <style:table-column-properties fo:break-before="auto" style:column-width="0.612cm"/>
    </style:style>
    <style:style style:name="co69" style:family="table-column">
      <style:table-column-properties fo:break-before="auto" style:column-width="4.457cm"/>
    </style:style>
    <style:style style:name="co70" style:family="table-column">
      <style:table-column-properties fo:break-before="auto" style:column-width="0.298cm"/>
    </style:style>
    <style:style style:name="co71" style:family="table-column">
      <style:table-column-properties fo:break-before="auto" style:column-width="18.105cm"/>
    </style:style>
    <style:style style:name="co72" style:family="table-column">
      <style:table-column-properties fo:break-before="auto" style:column-width="0.273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1.125cm" fo:break-before="auto" style:use-optimal-row-height="false"/>
    </style:style>
    <style:style style:name="ro3" style:family="table-row">
      <style:table-row-properties style:row-height="1.363cm" fo:break-before="auto" style:use-optimal-row-height="false"/>
    </style:style>
    <style:style style:name="ro4" style:family="table-row">
      <style:table-row-properties style:row-height="1.064cm" fo:break-before="auto" style:use-optimal-row-height="false"/>
    </style:style>
    <style:style style:name="ro5" style:family="table-row">
      <style:table-row-properties style:row-height="0.623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459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494cm" fo:break-before="auto" style:use-optimal-row-height="false"/>
    </style:style>
    <style:style style:name="ro12" style:family="table-row">
      <style:table-row-properties style:row-height="0.441cm" fo:break-before="auto" style:use-optimal-row-height="true"/>
    </style:style>
    <style:style style:name="ro13" style:family="table-row">
      <style:table-row-properties style:row-height="0.552cm" fo:break-before="auto" style:use-optimal-row-height="true"/>
    </style:style>
    <style:style style:name="ro14" style:family="table-row">
      <style:table-row-properties style:row-height="0.489cm" fo:break-before="auto" style:use-optimal-row-height="true"/>
    </style:style>
    <style:style style:name="ro15" style:family="table-row">
      <style:table-row-properties style:row-height="0.573cm" fo:break-before="auto" style:use-optimal-row-height="true"/>
    </style:style>
    <style:style style:name="ro16" style:family="table-row">
      <style:table-row-properties style:row-height="0.616cm" fo:break-before="auto" style:use-optimal-row-height="true"/>
    </style:style>
    <style:style style:name="ro17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529cm" fo:break-before="auto" style:use-optimal-row-height="true"/>
    </style:style>
    <style:style style:name="ro19" style:family="table-row">
      <style:table-row-properties style:row-height="0.944cm" fo:break-before="auto" style:use-optimal-row-height="false"/>
    </style:style>
    <style:style style:name="ro20" style:family="table-row">
      <style:table-row-properties style:row-height="1.011cm" fo:break-before="auto" style:use-optimal-row-height="false"/>
    </style:style>
    <style:style style:name="ro21" style:family="table-row">
      <style:table-row-properties style:row-height="1.099cm" fo:break-before="auto" style:use-optimal-row-height="false"/>
    </style:style>
    <style:style style:name="ro22" style:family="table-row">
      <style:table-row-properties style:row-height="1.249cm" fo:break-before="auto" style:use-optimal-row-height="false"/>
    </style:style>
    <style:style style:name="ro23" style:family="table-row">
      <style:table-row-properties style:row-height="0.349cm" fo:break-before="auto" style:use-optimal-row-height="false"/>
    </style:style>
    <style:style style:name="ro24" style:family="table-row">
      <style:table-row-properties style:row-height="0.6cm" fo:break-before="auto" style:use-optimal-row-height="false"/>
    </style:style>
    <style:style style:name="ro25" style:family="table-row">
      <style:table-row-properties style:row-height="0.649cm" fo:break-before="auto" style:use-optimal-row-height="false"/>
    </style:style>
    <style:style style:name="ro26" style:family="table-row">
      <style:table-row-properties style:row-height="0.249cm" fo:break-before="auto" style:use-optimal-row-height="false"/>
    </style:style>
    <style:style style:name="ro27" style:family="table-row">
      <style:table-row-properties style:row-height="0.499cm" fo:break-before="auto" style:use-optimal-row-height="false"/>
    </style:style>
    <style:style style:name="ro28" style:family="table-row">
      <style:table-row-properties style:row-height="0.199cm" fo:break-before="auto" style:use-optimal-row-height="false"/>
    </style:style>
    <style:style style:name="ro29" style:family="table-row">
      <style:table-row-properties style:row-height="0.702cm" fo:break-before="auto" style:use-optimal-row-height="false"/>
    </style:style>
    <style:style style:name="ro30" style:family="table-row">
      <style:table-row-properties style:row-height="0.926cm" fo:break-before="auto" style:use-optimal-row-height="false"/>
    </style:style>
    <style:style style:name="ro31" style:family="table-row">
      <style:table-row-properties style:row-height="0.547cm" fo:break-before="page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middle"/>
      <style:text-properties fo:color="#666666" style:font-name="Arial1" fo:font-weight="bold" style:font-name-asian="Arial1" style:font-weight-asian="bold" style:font-name-complex="Arial1" style:font-weight-complex="bold"/>
    </style:style>
    <style:style style:name="ce11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style:vertical-align="middle"/>
      <style:text-properties style:font-name="Arial1" style:font-name-asian="Arial1" style:font-name-complex="Arial1"/>
    </style:style>
    <style:style style:name="ce37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5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86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800000" style:font-name="Arial1" fo:font-weight="bold" style:font-name-asian="Arial1" style:font-weight-asian="bold" style:font-name-complex="Arial1" style:font-weight-complex="bold"/>
    </style:style>
    <style:style style:name="ce110" style:family="table-cell" style:parent-style-name="Default" style:data-style-name="N0">
      <style:table-cell-properties fo:border-bottom="0.06pt solid #000000" fo:background-color="#0000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12" style:family="table-cell" style:parent-style-name="Default" style:data-style-name="N0">
      <style:table-cell-properties fo:border-bottom="none" fo:background-color="#e6e6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able-cell-properties fo:border-bottom="0.06pt solid #000000" fo:background-color="#e6e6ff" style:text-align-source="fix" style:repeat-content="false" fo:border-left="0.06pt solid #000000" fo:border-right="0.06pt solid #000000" fo:border-top="none" style:vertical-align="top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 style:data-style-name="N125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" style:family="table-cell" style:parent-style-name="Default" style:data-style-name="N125">
      <style:table-cell-properties style:text-align-source="fix" style:repeat-content="false" fo:border="0.06pt solid #000000" style:vertical-align="middle"/>
      <style:paragraph-properties fo:text-align="center"/>
    </style:style>
    <style:style style:name="ce118" style:family="table-cell" style:parent-style-name="Default" style:data-style-name="N0">
      <style:table-cell-properties fo:background-color="#ffffff" fo:border="0.06pt solid #000000" style:vertical-align="middle"/>
      <style:text-properties style:font-name="Arial1" fo:font-weight="bold" style:font-name-asian="Arial1" style:font-weight-asian="bold" style:font-name-complex="Arial1" style:font-weight-complex="bold"/>
    </style:style>
    <style:style style:name="ce123" style:family="table-cell" style:parent-style-name="Default" style:data-style-name="N0"/>
    <style:style style:name="ce124" style:family="table-cell" style:parent-style-name="Default" style:data-style-name="N0">
      <style:table-cell-properties fo:border-bottom="0.06pt solid #000000" fo:background-color="#00008b" style:text-align-source="fix" style:repeat-content="false" fo:border-left="none" fo:border-right="none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63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116">
      <style:table-cell-properties style:text-align-source="fix" style:repeat-content="false" fo:border="0.06pt solid #000000" style:vertical-align="middle"/>
      <style:paragraph-properties fo:text-align="center"/>
    </style: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0">
      <style:table-cell-properties fo:background-color="transparent" style:vertical-align="middle"/>
    </style:style>
    <style:style style:name="ce10" style:family="table-cell" style:parent-style-name="Default" style:data-style-name="N0">
      <style:table-cell-properties style:cell-protect="protected" style:print-content="true" style:vertical-align="middle"/>
      <style:text-properties style:font-name="Arial1" style:font-name-asian="Arial1" style:font-name-complex="Arial1"/>
    </style:style>
    <style:style style:name="ce81" style:family="table-cell" style:parent-style-name="Default" style:data-style-name="N0">
      <style:table-cell-properties style:cell-protect="protected" style:print-content="true" style:vertical-align="middle"/>
      <style:text-properties style:font-name="Arial Narrow" style:font-name-asian="Arial Narrow1" style:font-name-complex="Arial Narrow1"/>
    </style:style>
    <style:style style:name="ce278" style:family="table-cell" style:parent-style-name="Default" style:data-style-name="N0">
      <style:table-cell-properties fo:background-color="transparent" fo:border="0.06pt solid #000000"/>
    </style:style>
    <style:style style:name="ce85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fo:color="#0000ff" style:font-name="Arial1" fo:font-weight="bold" style:font-name-asian="Arial1" style:font-weight-asian="bold" style:font-name-complex="Arial1" style:font-weight-complex="bold"/>
    </style:style>
    <style:style style:name="ce312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345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90" style:family="table-cell" style:parent-style-name="Default" style:data-style-name="N0">
      <style:table-cell-properties fo:border-bottom="0.06pt solid #000000" fo:background-color="#000099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93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62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97" style:family="table-cell" style:parent-style-name="Default" style:data-style-name="N0">
      <style:table-cell-properties fo:background-color="#000099" style:cell-protect="protected" style:print-content="true" style:text-align-source="fix" style:repeat-content="fals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  <style:map style:condition="cell-content()=&quot;PADRÕES EM DIA&quot;" style:apply-style-name="cf14" style:base-cell-address="Planilha.C35"/>
      <style:map style:condition="cell-content()=&quot;PADRÕES VENCIDOS&quot;" style:apply-style-name="cf15" style:base-cell-address="Planilha.C35"/>
    </style:style>
    <style:style style:name="ce10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108" style:family="table-cell" style:parent-style-name="Default" style:data-style-name="N0">
      <style:table-cell-properties fo:background-color="#000099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0" style:family="table-cell" style:parent-style-name="Default" style:data-style-name="N0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15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4" style:family="table-cell" style:parent-style-name="Default" style:data-style-name="N11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9" style:family="table-cell" style:parent-style-name="Default" style:data-style-name="N2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6" style:family="table-cell" style:parent-style-name="Default" style:data-style-name="N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2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78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4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order-bottom="none" fo:background-color="#c0c0c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7" style:family="table-cell" style:parent-style-name="Default" style:data-style-name="N0">
      <style:table-cell-properties fo:background-color="#ffffcc" fo:border="0.06pt solid #000000"/>
    </style:style>
    <style:style style:name="ce13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0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94" style:family="table-cell" style:parent-style-name="Default" style:data-style-name="N36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95" style:family="table-cell" style:parent-style-name="Default" style:data-style-name="N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17" style:family="table-cell" style:parent-style-name="Default" style:data-style-name="N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09" style:family="table-cell" style:parent-style-name="Default" style:data-style-name="N10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10" style:family="table-cell" style:parent-style-name="Default" style:data-style-name="N1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ackground-color="#ffffe0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7" style:family="table-cell" style:parent-style-name="Default" style:data-style-name="N4">
      <style:table-cell-properties fo:background-color="#ffffe0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8" style:family="table-cell" style:parent-style-name="Default" style:data-style-name="N116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4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10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#e8e8e8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4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83" style:family="table-cell" style:parent-style-name="Default" style:data-style-name="N0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8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9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9" style:family="table-cell" style:parent-style-name="Default" style:data-style-name="N0">
      <style:table-cell-properties fo:border-bottom="0.06pt solid #000000" fo:background-color="#ffff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1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3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88" style:family="table-cell" style:parent-style-name="Default" style:data-style-name="N36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22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126" style:family="table-cell" style:parent-style-name="Default" style:data-style-name="N0">
      <style:table-cell-properties fo:border-bottom="none" fo:background-color="#e6e6fa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0.06pt solid #000000" fo:background-color="#e6e6fa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116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 style:data-style-name="N1">
      <style:table-cell-properties style:cell-protect="none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4" style:family="table-cell" style:parent-style-name="Default" style:data-style-name="N36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0" style:family="table-cell" style:parent-style-name="Default" style:data-style-name="N11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ackground-color="#e6e6fa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ackground-color="#ffffff" fo:border="0.06pt solid #000000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28" style:family="table-cell" style:parent-style-name="Default" style:data-style-name="N0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31" style:family="table-cell" style:parent-style-name="Default" style:data-style-name="N0">
      <style:table-cell-properties fo:border-bottom="0.06pt solid #000000" fo:background-color="#e6e6e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 style:data-style-name="N4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7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78" style:family="table-cell" style:parent-style-name="Default" style:data-style-name="N0">
      <style:table-cell-properties fo:background-color="transparent" style:vertical-align="middle"/>
      <style:text-properties style:font-name="Arial1" style:font-name-asian="Arial1" style:font-name-complex="Arial1"/>
    </style:style>
    <style:style style:name="ce525" style:family="table-cell" style:parent-style-name="Default" style:data-style-name="N0">
      <style:table-cell-properties fo:background-color="#ffffff"/>
    </style:style>
    <style:style style:name="ce58" style:family="table-cell" style:parent-style-name="Default" style:data-style-name="N114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21" style:family="table-cell" style:parent-style-name="Default" style:data-style-name="N115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25" style:family="table-cell" style:parent-style-name="Default" style:data-style-name="N0">
      <style:table-cell-properties fo:background-color="#00008b"/>
    </style:style>
    <style:style style:name="ce73" style:family="table-cell" style:parent-style-name="Default" style:data-style-name="N116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37" style:family="table-cell" style:parent-style-name="Default" style:data-style-name="N0">
      <style:table-cell-properties fo:background-color="#ffffff" style:vertical-align="middle"/>
    </style:style>
    <style:style style:name="ce111" style:family="table-cell" style:parent-style-name="Default" style:data-style-name="N0">
      <style:table-cell-properties fo:background-color="#780373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72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Accent_20_3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116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129" style:family="table-cell" style:parent-style-name="Default" style:data-style-name="N0">
      <style:table-cell-properties fo:border-bottom="none" fo:background-color="#e6e6fa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71" style:family="table-cell" style:parent-style-name="Default" style:data-style-name="N114">
      <style:table-cell-properties fo:background-color="#eeeeee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6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Aprovado&quot;" style:apply-style-name="cf13" style:base-cell-address="Planilha.Q48"/>
      <style:map style:condition="cell-content()=&quot;Reprovado&quot;" style:apply-style-name="cf16" style:base-cell-address="Planilha.Q48"/>
    </style:style>
    <style:style style:name="ce59" style:family="table-cell" style:parent-style-name="Default" style:data-style-name="N0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62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11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center"/>
    </style:style>
    <style:style style:name="ce130" style:family="table-cell" style:parent-style-name="Default" style:data-style-name="N0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ce4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666666" style:font-name="Arial1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 Narrow" style:font-name-asian="Arial Narrow1" style:font-name-complex="Arial Narrow1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style:vertical-align="middle"/>
      <style:text-properties fo:color="#666666"/>
    </style:style>
    <style:style style:name="ce234" style:family="table-cell" style:parent-style-name="Default" style:data-style-name="N1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34" style:family="table-cell" style:parent-style-name="Default" style:data-style-name="N1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7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6" style:family="table-cell" style:parent-style-name="Default" style:data-style-name="N1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38" style:family="table-cell" style:parent-style-name="Default" style:data-style-name="N0">
      <style:table-cell-properties fo:border-bottom="0.06pt solid #000000" fo:background-color="#cfe7f5" fo:border-left="0.06pt solid #000000" fo:border-right="none" fo:border-top="0.06pt solid #000000"/>
    </style:style>
    <style:style style:name="ce497" style:family="table-cell" style:parent-style-name="Default" style:data-style-name="N0">
      <style:table-cell-properties fo:border-bottom="0.06pt solid #000000" fo:background-color="#e6e6ff" fo:border-left="0.06pt solid #000000" fo:border-right="none" fo:border-top="0.06pt solid #000000"/>
    </style:style>
    <style:style style:name="ce498" style:family="table-cell" style:parent-style-name="Default" style:data-style-name="N0">
      <style:text-properties style:font-name="Arial1" style:font-name-asian="Arial1" style:font-name-complex="Arial1"/>
    </style:style>
    <style:style style:name="ce212" style:family="table-cell" style:parent-style-name="Default" style:data-style-name="N1">
      <style:table-cell-properties style:cell-protect="protected" style:print-content="true" fo:background-color="transparent"/>
      <style:text-properties style:font-name="Arial1" style:font-name-asian="Arial1" style:font-name-complex="Arial1"/>
    </style:style>
    <style:style style:name="ce220" style:family="table-cell" style:parent-style-name="Default" style:data-style-name="N1">
      <style:table-cell-properties style:cell-protect="protected" style:print-content="true"/>
      <style:text-properties style:font-name="Arial1" style:font-name-asian="Arial1" style:font-name-complex="Arial1"/>
    </style:style>
    <style:style style:name="ce226" style:family="table-cell" style:parent-style-name="Default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232" style:family="table-cell" style:parent-style-name="Default" style:data-style-name="N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233" style:family="table-cell" style:parent-style-name="Default" style:data-style-name="N0">
      <style:text-properties style:font-name="Arial1" style:font-name-asian="Arial1" style:font-name-complex="Arial1"/>
    </style:style>
    <style:style style:name="ce148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505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199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3" style:family="table-cell" style:parent-style-name="Default" style:data-style-name="N1">
      <style:table-cell-properties fo:background-color="#e6e6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08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00" style:family="table-cell" style:parent-style-name="Default" style:data-style-name="N0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04" style:family="table-cell" style:parent-style-name="Default" style:data-style-name="N0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style:font-name-asian="Arial1" style:font-name-complex="Arial1"/>
    </style:style>
    <style:style style:name="ce209" style:family="table-cell" style:parent-style-name="Default" style:data-style-name="N0">
      <style:table-cell-properties fo:border-bottom="0.06pt solid #000000" fo:background-color="#e6e6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style:font-name-asian="Arial1" style:font-name-complex="Arial1"/>
    </style:style>
    <style:style style:name="ce213" style:family="table-cell" style:parent-style-name="Default" style:data-style-name="N1">
      <style:table-cell-properties fo:background-color="#ffffff" style:cell-protect="protected" style:print-content="true"/>
      <style:text-properties style:font-name="Arial1" style:font-name-asian="Arial1" style:font-name-complex="Arial1"/>
    </style:style>
    <style:style style:name="ce201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5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0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4" style:family="table-cell" style:parent-style-name="Default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1" style:family="table-cell" style:parent-style-name="Default" style:data-style-name="N1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02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6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1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135" style:family="table-cell" style:parent-style-name="Default" style:data-style-name="N1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2" style:family="table-cell" style:parent-style-name="Default" style:data-style-name="N1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9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57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8" style:family="table-cell" style:parent-style-name="Default" style:data-style-name="N1">
      <style:table-cell-properties fo:border-bottom="0.06pt solid #000000" fo:background-color="#cfe7f5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87" style:family="table-cell" style:parent-style-name="Default" style:data-style-name="N10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0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1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227" style:family="table-cell" style:parent-style-name="Default" style:data-style-name="N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532" style:family="table-cell" style:parent-style-name="Default" style:data-style-name="N116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0" style:family="table-cell" style:parent-style-name="Default" style:data-style-name="N11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58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3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5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7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9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92" style:family="table-cell" style:parent-style-name="Default" style:data-style-name="N11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215" style:family="table-cell" style:parent-style-name="Default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222" style:family="table-cell" style:parent-style-name="Default" style:data-style-name="N11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136" style:family="table-cell" style:parent-style-name="Default" style:data-style-name="N36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3" style:family="table-cell" style:parent-style-name="Default" style:data-style-name="N36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1" style:family="table-cell" style:parent-style-name="Default" style:data-style-name="N3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9" style:family="table-cell" style:parent-style-name="Default" style:data-style-name="N117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71" style:family="table-cell" style:parent-style-name="Default" style:data-style-name="N3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0" style:family="table-cell" style:parent-style-name="Default" style:data-style-name="N3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3" style:family="table-cell" style:parent-style-name="Default" style:data-style-name="N3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6" style:family="table-cell" style:parent-style-name="Default" style:data-style-name="N3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3" style:family="table-cell" style:parent-style-name="Default" style:data-style-name="N3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8" style:family="table-cell" style:parent-style-name="Default" style:data-style-name="N36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137" style:family="table-cell" style:parent-style-name="Default" style:data-style-name="N0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4" style:family="table-cell" style:parent-style-name="Default" style:data-style-name="N0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2" style:family="table-cell" style:parent-style-name="Default" style:data-style-name="N0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631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Liberation Serif" style:font-name-asian="Segoe UI" style:font-name-complex="Tahoma"/>
    </style:style>
    <style:style style:name="ce160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1" style:family="table-cell" style:parent-style-name="Default" style:data-style-name="N0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4" style:family="table-cell" style:parent-style-name="Default" style:data-style-name="N0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38" style:family="table-cell" style:parent-style-name="Default" style:data-style-name="N116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5" style:family="table-cell" style:parent-style-name="Default" style:data-style-name="N116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3" style:family="table-cell" style:parent-style-name="Default" style:data-style-name="N11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61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2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5" style:family="table-cell" style:parent-style-name="Default" style:data-style-name="N11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8" style:family="table-cell" style:parent-style-name="Default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41" style:family="table-cell" style:parent-style-name="Default" style:data-style-name="N11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62" style:family="table-cell" style:parent-style-name="Default" style:data-style-name="N118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7" style:family="table-cell" style:parent-style-name="Default" style:data-style-name="N12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29" style:family="table-cell" style:parent-style-name="Default" style:data-style-name="N0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236" style:family="table-cell" style:parent-style-name="Default" style:data-style-name="N0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65" style:family="table-cell" style:parent-style-name="Default" style:data-style-name="N114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74" style:family="table-cell" style:parent-style-name="Default" style:data-style-name="N119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3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9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 Narrow" style:font-name-asian="Arial Narrow1" style:font-name-complex="Arial Narrow1"/>
    </style:style>
    <style:style style:name="ce230" style:family="table-cell" style:parent-style-name="Default" style:data-style-name="N114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184" style:family="table-cell" style:parent-style-name="Default" style:data-style-name="N0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2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64" style:family="table-cell" style:parent-style-name="Default" style:data-style-name="N2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31" style:family="table-cell" style:parent-style-name="Default" style:data-style-name="N119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139" style:family="table-cell" style:parent-style-name="Default" style:data-style-name="N116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715" style:family="table-cell" style:parent-style-name="Default" style:data-style-name="N14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66" style:family="table-cell" style:parent-style-name="Default" style:data-style-name="N81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717" style:family="table-cell" style:parent-style-name="Default" style:data-style-name="N137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67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719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fo:color="#000000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14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6" style:family="table-cell" style:parent-style-name="Default" style:data-style-name="N114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4" style:family="table-cell" style:parent-style-name="Default" style:data-style-name="N114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593" style:family="table-cell" style:parent-style-name="Default" style:data-style-name="N114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5" style:family="table-cell" style:parent-style-name="Default" style:data-style-name="N114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6" style:family="table-cell" style:parent-style-name="Default" style:data-style-name="N114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9" style:family="table-cell" style:parent-style-name="Default" style:data-style-name="N114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5" style:family="table-cell" style:parent-style-name="Default" style:data-style-name="N114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69" style:family="table-cell" style:parent-style-name="Default" style:data-style-name="N117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97" style:family="table-cell" style:parent-style-name="Default" style:data-style-name="N117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55" style:family="table-cell" style:parent-style-name="Default" style:data-style-name="N114">
      <style:table-cell-properties fo:border-bottom="0.06pt solid #000000" fo:background-color="#d4e6c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86" style:family="table-cell" style:parent-style-name="Default" style:data-style-name="N114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8" style:family="table-cell" style:parent-style-name="Default" style:data-style-name="N117">
      <style:table-cell-properties fo:border-bottom="0.06pt solid #000000" fo:background-color="#e6e6ff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0" style:family="table-cell" style:parent-style-name="Default" style:data-style-name="N116">
      <style:table-cell-properties style:cell-protect="none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76" style:family="table-cell" style:parent-style-name="Default" style:data-style-name="N116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339" style:family="table-cell" style:parent-style-name="Default" style:data-style-name="N121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style:font-name="Arial2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ce343" style:family="table-cell" style:parent-style-name="Default" style:data-style-name="N121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246" style:family="table-cell" style:parent-style-name="Default" style:data-style-name="N121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style:font-name="Arial2" style:font-name-asian="Arial3" style:font-name-complex="Arial3"/>
    </style:style>
    <style:style style:name="ce608" style:family="table-cell" style:parent-style-name="Default" style:data-style-name="N12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2" style:font-name-asian="Arial3" style:font-name-complex="Arial3"/>
    </style:style>
    <style:style style:name="ce768" style:family="table-cell" style:parent-style-name="Default" style:data-style-name="N121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69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/>
    </style:style>
    <style:style style:name="ce347" style:family="table-cell" style:parent-style-name="Default" style:data-style-name="N121">
      <style:table-cell-properties fo:background-color="#cfe7f5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Arial2" style:font-name-asian="Arial3" style:font-name-complex="Arial3"/>
    </style:style>
    <style:style style:name="ce349" style:family="table-cell" style:parent-style-name="Default" style:data-style-name="N121">
      <style:table-cell-properties fo:background-color="#e6e6e6" style:text-align-source="fix" style:repeat-content="false" fo:border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289" style:family="table-cell" style:parent-style-name="Default" style:data-style-name="N121">
      <style:table-cell-properties fo:background-color="#e6e6e6" style:text-align-source="fix" style:repeat-content="false" fo:border="0.06pt solid #000000" style:vertical-align="automatic"/>
      <style:paragraph-properties fo:text-align="center"/>
      <style:text-properties style:font-name="Arial2" style:font-name-asian="Arial3" style:font-name-complex="Arial3"/>
    </style:style>
    <style:style style:name="ce352" style:family="table-cell" style:parent-style-name="Default" style:data-style-name="N121">
      <style:table-cell-properties fo:background-color="#e6e6e6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Arial2" style:font-name-asian="Arial3" style:font-name-complex="Arial3"/>
    </style:style>
    <style:style style:name="ce354" style:family="table-cell" style:parent-style-name="Default" style:data-style-name="N0">
      <style:table-cell-properties fo:background-color="#000099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 style:data-style-name="N0">
      <style:table-cell-properties fo:background-color="#e6e6e6" fo:border="0.06pt solid #000000"/>
    </style:style>
    <style:style style:name="ce327" style:family="table-cell" style:parent-style-name="Default" style:data-style-name="N1">
      <style:table-cell-properties fo:background-color="#ffffff" style:cell-protect="protected" style:print-content="true" fo:border="0.06pt solid #000000" style:vertical-align="middle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334" style:family="table-cell" style:parent-style-name="Default" style:data-style-name="N1">
      <style:table-cell-properties fo:background-color="#ffffff" style:cell-protect="protected" style:print-content="true" fo:wrap-option="wrap" fo:border="0.06pt solid #000000" style:vertical-align="middle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357" style:family="table-cell" style:parent-style-name="Default" style:data-style-name="N121">
      <style:table-cell-properties fo:background-color="#c0c0c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Arial2" style:font-name-asian="Arial3" style:font-name-complex="Arial3"/>
    </style:style>
    <style:style style:name="ce247" style:family="table-cell" style:parent-style-name="Default" style:data-style-name="N121">
      <style:table-cell-properties fo:background-color="#cfe7f5" style:text-align-source="fix" style:repeat-content="false" fo:border="0.06pt solid #000000" style:vertical-align="automatic"/>
      <style:paragraph-properties fo:text-align="start" fo:margin-left="0cm"/>
      <style:text-properties style:font-name="Arial2" style:font-name-asian="Arial3" style:font-name-complex="Arial3"/>
    </style:style>
    <style:style style:name="ce255" style:family="table-cell" style:parent-style-name="Default" style:data-style-name="N121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Arial2" style:font-name-asian="Arial3" style:font-name-complex="Arial3"/>
    </style:style>
    <style:style style:name="ce240" style:family="table-cell" style:parent-style-name="Default" style:data-style-name="N0">
      <style:table-cell-properties fo:border="0.06pt solid #000000"/>
    </style:style>
    <style:style style:name="ce280" style:family="table-cell" style:parent-style-name="Default" style:data-style-name="N121">
      <style:table-cell-properties fo:border="0.06pt solid #000000"/>
      <style:text-properties style:font-name="Arial2" style:font-name-asian="Arial3" style:font-name-complex="Arial3"/>
    </style:style>
    <style:style style:name="ce282" style:family="table-cell" style:parent-style-name="Default" style:data-style-name="N121">
      <style:table-cell-properties fo:border="0.06pt solid #000000"/>
    </style:style>
    <style:style style:name="ce290" style:family="table-cell" style:parent-style-name="Default" style:data-style-name="N121">
      <style:table-cell-properties fo:background-color="#e6e6e6" style:text-align-source="fix" style:repeat-content="false" fo:border="0.06pt solid #000000" style:vertical-align="automatic"/>
      <style:paragraph-properties fo:text-align="start" fo:margin-left="0cm"/>
      <style:text-properties style:font-name="Arial2" style:font-name-asian="Arial3" style:font-name-complex="Arial3"/>
    </style:style>
    <style:style style:name="ce277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800000" style:font-name="Arial2" style:font-name-asian="Arial3" style:font-name-complex="Arial3"/>
    </style:style>
    <style:style style:name="ce281" style:family="table-cell" style:parent-style-name="Default" style:data-style-name="N121">
      <style:table-cell-properties fo:border="0.06pt solid #000000"/>
      <style:text-properties fo:color="#993366" style:font-name="Arial2" style:font-name-asian="Arial3" style:font-name-complex="Arial3"/>
    </style:style>
    <style:style style:name="ce62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0" style:family="table-cell" style:parent-style-name="Default" style:data-style-name="N121">
      <style:table-cell-properties fo:background-color="#cfe7f5" style:text-align-source="fix" style:repeat-content="false" fo:border="0.06pt solid #000000" style:vertical-align="automatic"/>
      <style:paragraph-properties fo:text-align="center" fo:margin-left="0cm"/>
      <style:text-properties style:font-name="Arial2" style:font-name-asian="Arial3" style:font-name-complex="Arial3"/>
    </style:style>
    <style:style style:name="ce761" style:family="table-cell" style:parent-style-name="Default" style:data-style-name="N121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</style:style>
    <style:style style:name="ce762" style:family="table-cell" style:parent-style-name="Default" style:data-style-name="N121">
      <style:table-cell-properties fo:background-color="#ffffff" style:text-align-source="fix" style:repeat-content="false" fo:border="0.06pt solid #000000" style:vertical-align="automatic"/>
      <style:paragraph-properties fo:text-align="center" fo:margin-left="0cm"/>
    </style:style>
    <style:style style:name="ce763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76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</style:style>
    <style:style style:name="ce765" style:family="table-cell" style:parent-style-name="Default" style:data-style-name="N114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766" style:family="table-cell" style:parent-style-name="Default" style:data-style-name="N121">
      <style:table-cell-properties fo:background-color="#e6e6e6" style:text-align-source="fix" style:repeat-content="false" fo:border="0.06pt solid #000000" style:vertical-align="automatic"/>
      <style:paragraph-properties fo:text-align="center" fo:margin-left="0cm"/>
      <style:text-properties style:font-name="Arial2" style:font-name-asian="Arial3" style:font-name-complex="Arial3"/>
    </style:style>
    <style:style style:name="ce767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</style:style>
    <style:style style:name="ce770" style:family="table-cell" style:parent-style-name="Default" style:data-style-name="N1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771" style:family="table-cell" style:parent-style-name="Default" style:data-style-name="N1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772" style:family="table-cell" style:parent-style-name="Default" style:data-style-name="N1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font-name="Arial1" style:font-name-asian="Arial1" style:font-name-complex="Arial1"/>
    </style:style>
    <style:style style:name="ce773" style:family="table-cell" style:parent-style-name="Default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center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77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cm"/>
    </style:style>
    <style:style style:name="ce257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71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56" style:family="table-cell" style:parent-style-name="Default" style:data-style-name="N121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69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/>
    </style:style>
    <style:style style:name="ce273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</style:style>
    <style:style style:name="ce328" style:family="table-cell" style:parent-style-name="Default" style:data-style-name="N1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1" style:font-name-asian="Arial1" style:font-name-complex="Arial1"/>
    </style:style>
    <style:style style:name="ce258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29" style:family="table-cell" style:parent-style-name="Default" style:data-style-name="N117">
      <style:table-cell-properties style:cell-protect="none" style:print-content="true" style:text-align-source="fix" style:repeat-content="false" fo:background-color="transparent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335" style:family="table-cell" style:parent-style-name="Default" style:data-style-name="N117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1" style:font-name-asian="Arial1" style:font-name-complex="Arial1"/>
    </style:style>
    <style:style style:name="ce2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54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/>
      <style:text-properties style:font-name="Arial2" style:font-name-asian="Arial3" style:font-name-complex="Arial3"/>
    </style:style>
    <style:style style:name="ce2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48" style:family="table-cell" style:parent-style-name="Default" style:data-style-name="N121">
      <style:table-cell-properties fo:background-color="#cfe7f5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style:font-name-asian="Arial3" style:font-name-complex="Arial3"/>
    </style:style>
    <style:style style:name="ce353" style:family="table-cell" style:parent-style-name="Default" style:data-style-name="N121">
      <style:table-cell-properties fo:background-color="#e6e6e6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style:font-name-asian="Arial3" style:font-name-complex="Arial3"/>
    </style:style>
    <style:style style:name="ce358" style:family="table-cell" style:parent-style-name="Default" style:data-style-name="N121">
      <style:table-cell-properties fo:border-bottom="0.06pt solid #000000" fo:background-color="#969696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style:font-name="Arial2" style:font-name-asian="Arial3" style:font-name-complex="Arial3"/>
    </style:style>
    <style:style style:name="ce248" style:family="table-cell" style:parent-style-name="Default" style:data-style-name="N122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style:font-name="Arial2" style:font-name-asian="Arial3" style:font-name-complex="Arial3"/>
    </style:style>
    <style:style style:name="ce279" style:family="table-cell" style:parent-style-name="Default" style:data-style-name="N122">
      <style:table-cell-properties style:text-align-source="fix" style:repeat-content="false" fo:border="0.06pt solid #000000" style:vertical-align="automatic"/>
      <style:paragraph-properties fo:text-align="center"/>
    </style:style>
    <style:style style:name="ce287" style:family="table-cell" style:parent-style-name="Default" style:data-style-name="N114">
      <style:table-cell-properties style:text-align-source="fix" style:repeat-content="false" fo:border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291" style:family="table-cell" style:parent-style-name="Default" style:data-style-name="N122">
      <style:table-cell-properties fo:background-color="#e6e6e6" style:text-align-source="fix" style:repeat-content="false" fo:border="0.06pt solid #000000" style:vertical-align="automatic"/>
      <style:paragraph-properties fo:text-align="center"/>
      <style:text-properties style:font-name="Arial2" style:font-name-asian="Arial3" style:font-name-complex="Arial3"/>
    </style:style>
    <style:style style:name="ce330" style:family="table-cell" style:parent-style-name="Default" style:data-style-name="N114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1" style:font-name-asian="Arial1" style:font-name-complex="Arial1"/>
    </style:style>
    <style:style style:name="ce336" style:family="table-cell" style:parent-style-name="Default" style:data-style-name="N114">
      <style:table-cell-properties fo:border-bottom="2.01pt solid #000000" fo:border-left="2.01pt solid #000000" fo:border-right="none" fo:border-top="2.01pt solid #000000"/>
      <style:text-properties style:font-name="Arial2" fo:font-weight="bold" style:font-name-asian="Arial3" style:font-weight-asian="bold" style:font-name-complex="Arial3" style:font-weight-complex="bold"/>
    </style:style>
    <style:style style:name="ce286" style:family="table-cell" style:parent-style-name="Default" style:data-style-name="N121">
      <style:table-cell-properties fo:border="0.06pt solid #000000"/>
      <style:text-properties fo:color="#ff0000" style:font-name="Arial2" style:font-name-asian="Arial3" style:font-name-complex="Arial3"/>
    </style:style>
    <style:style style:name="ce288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337" style:family="table-cell" style:parent-style-name="Default" style:data-style-name="N121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259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72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284" style:family="table-cell" style:parent-style-name="Default" style:data-style-name="N119">
      <style:table-cell-properties style:text-align-source="fix" style:repeat-content="false" fo:border="0.06pt solid #000000" style:vertical-align="automatic"/>
      <style:paragraph-properties fo:text-align="center"/>
    </style:style>
    <style:style style:name="ce274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/>
    </style:style>
    <style:style style:name="ce331" style:family="table-cell" style:parent-style-name="Default" style:data-style-name="N116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1" style:font-name-asian="Arial1" style:font-name-complex="Arial1"/>
    </style:style>
    <style:style style:name="ce338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820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map style:condition="cell-content()&gt;0.1" style:apply-style-name="cf16" style:base-cell-address="Incerteza.L5"/>
    </style:style>
    <style:style style:name="ce260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822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map style:condition="cell-content()=100%" style:apply-style-name="cf13" style:base-cell-address="Incerteza.L14"/>
      <style:map style:condition="cell-content()&lt;100%" style:apply-style-name="cf16" style:base-cell-address="Incerteza.L14"/>
    </style:style>
    <style:style style:name="ce28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</style:style>
    <style:style style:name="ce332" style:family="table-cell" style:parent-style-name="Default" style:data-style-name="N119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1" style:font-name-asian="Arial1" style:font-name-complex="Arial1"/>
    </style:style>
    <style:style style:name="ce340" style:family="table-cell" style:parent-style-name="Default" style:data-style-name="N121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style:font-name="Arial2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ce344" style:family="table-cell" style:parent-style-name="Default" style:data-style-name="N121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350" style:family="table-cell" style:parent-style-name="Default" style:data-style-name="N121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682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2" style:font-name-asian="Arial3" style:font-name-complex="Arial3"/>
    </style:style>
    <style:style style:name="ce683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transparent"/>
    </style:style>
    <style:style style:name="ce309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2" style:font-name-asian="Arial3" style:font-name-complex="Arial3"/>
    </style:style>
    <style:style style:name="ce311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ff0000" style:font-name="Arial2" style:font-name-asian="Arial3" style:font-name-complex="Arial3"/>
    </style:style>
    <style:style style:name="ce314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8000" style:font-name="Arial2" style:font-name-asian="Arial3" style:font-name-complex="Arial3"/>
    </style:style>
    <style:style style:name="ce315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800000" style:font-name="Arial2" style:font-name-asian="Arial3" style:font-name-complex="Arial3"/>
    </style:style>
    <style:style style:name="ce316" style:family="table-cell" style:parent-style-name="Default" style:data-style-name="N121">
      <style:table-cell-properties fo:background-color="transparent"/>
      <style:text-properties fo:color="#993366" style:font-name="Arial2" style:font-name-asian="Arial3" style:font-name-complex="Arial3"/>
    </style:style>
    <style:style style:name="ce317" style:family="table-cell" style:parent-style-name="Default" style:data-style-name="N121">
      <style:table-cell-properties fo:background-color="transparent"/>
    </style:style>
    <style:style style:name="ce264" style:family="table-cell" style:parent-style-name="Default" style:data-style-name="N121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28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67" style:family="table-cell" style:parent-style-name="Default" style:data-style-name="N114">
      <style:table-cell-properties style:text-align-source="fix" style:repeat-content="false" fo:border="0.06pt solid #000000" style:vertical-align="automatic"/>
      <style:paragraph-properties fo:text-align="center"/>
    </style:style>
    <style:style style:name="ce3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22" style:family="table-cell" style:parent-style-name="Default" style:data-style-name="N114">
      <style:table-cell-properties style:text-align-source="fix" style:repeat-content="false" fo:background-color="transparent" style:vertical-align="automatic"/>
      <style:paragraph-properties fo:text-align="center"/>
    </style:style>
    <style:style style:name="ce333" style:family="table-cell" style:parent-style-name="Default" style:data-style-name="N81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1" style:font-name-asian="Arial1" style:font-name-complex="Arial1"/>
    </style:style>
    <style:style style:name="ce319" style:family="table-cell" style:parent-style-name="Default" style:data-style-name="N121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Arial2" style:font-name-asian="Arial3" style:font-name-complex="Arial3"/>
    </style:style>
    <style:style style:name="ce310" style:family="table-cell" style:parent-style-name="Default" style:data-style-name="N122">
      <style:table-cell-properties style:text-align-source="fix" style:repeat-content="false" fo:background-color="transparent" style:vertical-align="automatic"/>
      <style:paragraph-properties fo:text-align="center"/>
      <style:text-properties style:font-name="Arial2" style:font-name-asian="Arial3" style:font-name-complex="Arial3"/>
    </style:style>
    <style:style style:name="ce313" style:family="table-cell" style:parent-style-name="Default" style:data-style-name="N122">
      <style:table-cell-properties style:text-align-source="fix" style:repeat-content="false" fo:background-color="transparent" style:vertical-align="automatic"/>
      <style:paragraph-properties fo:text-align="center"/>
    </style:style>
    <style:style style:name="ce320" style:family="table-cell" style:parent-style-name="Default" style:data-style-name="N122">
      <style:table-cell-properties fo:background-color="transparent"/>
    </style:style>
    <style:style style:name="ce323" style:family="table-cell" style:parent-style-name="Default" style:data-style-name="N2">
      <style:table-cell-properties fo:background-color="transparent"/>
    </style:style>
    <style:style style:name="ce325" style:family="table-cell" style:parent-style-name="Default" style:data-style-name="N114">
      <style:table-cell-properties fo:background-color="transparent"/>
      <style:text-properties style:font-name="Arial2" fo:font-weight="bold" style:font-name-asian="Arial3" style:font-weight-asian="bold" style:font-name-complex="Arial3" style:font-weight-complex="bold"/>
    </style:style>
    <style:style style:name="ce324" style:family="table-cell" style:parent-style-name="Default" style:data-style-name="N121">
      <style:table-cell-properties fo:background-color="transparent"/>
      <style:text-properties fo:color="#ff0000" style:font-name="Arial2" style:font-name-asian="Arial3" style:font-name-complex="Arial3"/>
    </style:style>
    <style:style style:name="ce326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321" style:family="table-cell" style:parent-style-name="Default" style:data-style-name="N119">
      <style:table-cell-properties style:text-align-source="fix" style:repeat-content="false" fo:background-color="transparent" style:vertical-align="automatic"/>
      <style:paragraph-properties fo:text-align="center"/>
    </style:style>
    <style:style style:name="ce341" style:family="table-cell" style:parent-style-name="Default" style:data-style-name="N0">
      <style:table-cell-properties fo:background-color="#0000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 style:data-style-name="N81">
      <style:table-cell-properties style:text-align-source="fix" style:repeat-content="false" fo:border="0.06pt solid #000000" style:vertical-align="automatic"/>
      <style:paragraph-properties fo:text-align="center"/>
      <style:text-properties fo:color="#0000ff"/>
    </style:style>
    <style:style style:name="ce261" style:family="table-cell" style:parent-style-name="Default" style:data-style-name="N81">
      <style:table-cell-properties style:text-align-source="fix" style:repeat-content="false" fo:border="0.06pt solid #000000" style:vertical-align="automatic"/>
      <style:paragraph-properties fo:text-align="center"/>
    </style:style>
    <style:style style:name="ce270" style:family="table-cell" style:parent-style-name="Default" style:data-style-name="N81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5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50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</style:style>
    <style:style style:name="ce262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8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&quot;Em Dia&quot;" style:apply-style-name="cf13" style:base-cell-address="Incerteza.AC119"/>
      <style:map style:condition="cell-content()=&quot;Vencido&quot;" style:apply-style-name="cf16" style:base-cell-address="Incerteza.AC119"/>
    </style:style>
    <style:style style:name="ce342" style:family="table-cell" style:parent-style-name="Default" style:data-style-name="N0">
      <style:table-cell-properties fo:background-color="#0000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3" style:family="table-cell" style:parent-style-name="Default" style:data-style-name="N0">
      <style:table-cell-properties fo:border-bottom="none" fo:background-color="#e6e6e6" style:text-align-source="fix" style:repeat-content="false" fo:border-left="0.06pt solid #999999" fo:border-right="none" fo:border-top="0.06pt solid #999999" style:vertical-align="automatic"/>
      <style:paragraph-properties fo:text-align="center"/>
      <style:text-properties fo:font-weight="bold" style:font-weight-asian="bold" style:font-weight-complex="bold"/>
    </style:style>
    <style:style style:name="ce251" style:family="table-cell" style:parent-style-name="Default" style:data-style-name="N0">
      <style:table-cell-properties fo:border-bottom="0.06pt solid #000000" fo:background-color="#e6e6e6" style:text-align-source="fix" style:repeat-content="false" fo:border-left="0.06pt solid #999999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3" style:family="table-cell" style:parent-style-name="Default" style:data-style-name="N0">
      <style:table-cell-properties fo:background-color="#e6e6e6" style:text-align-source="fix" style:repeat-content="false" fo:border="0.06pt solid #000000" style:vertical-align="automatic"/>
      <style:paragraph-properties fo:text-align="center"/>
    </style:style>
    <style:style style:name="ce265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/>
    </style:style>
    <style:style style:name="ce351" style:family="table-cell" style:parent-style-name="Default" style:data-style-name="N0">
      <style:table-cell-properties fo:background-color="#000099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2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96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1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0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44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999999" fo:border-top="0.06pt solid #999999" style:vertical-align="automatic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 style:data-style-name="N81">
      <style:table-cell-properties fo:border-bottom="0.06pt solid #000000" fo:background-color="#e6e6e6" style:text-align-source="fix" style:repeat-content="false" fo:border-left="0.06pt solid #000000" fo:border-right="0.06pt solid #999999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00" style:family="table-cell" style:parent-style-name="Default" style:data-style-name="N4"/>
    <style:style style:name="ce302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68" style:family="table-cell" style:parent-style-name="Default" style:data-style-name="N4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7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76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/>
    </style:style>
    <style:style style:name="ce245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3" style:family="table-cell" style:parent-style-name="Default" style:data-style-name="N4">
      <style:table-cell-properties fo:border-bottom="0.06pt solid #000000" fo:background-color="#e6e6e6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03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295" style:family="table-cell" style:parent-style-name="Default" style:data-style-name="N8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298" style:family="table-cell" style:parent-style-name="Default" style:data-style-name="N8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04" style:family="table-cell" style:parent-style-name="Default" style:data-style-name="N8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0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0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46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66" style:family="table-cell" style:parent-style-name="Default" style:data-style-name="N4">
      <style:table-cell-properties style:text-align-source="fix" style:repeat-content="false" fo:border="0.06pt solid #000000" style:vertical-align="automatic"/>
      <style:paragraph-properties fo:text-align="center"/>
    </style:style>
    <style:style style:name="ce346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85" style:family="table-cell" style:parent-style-name="Default" style:data-style-name="N0">
      <style:text-properties style:font-name="Arial" fo:font-size="12pt" style:font-size-asian="12pt" style:font-size-complex="12pt"/>
    </style:style>
    <style:style style:name="ce886" style:family="table-cell" style:parent-style-name="Default" style:data-style-name="N0">
      <style:table-cell-properties fo:background-color="#d4e6c6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887" style:family="table-cell" style:parent-style-name="Default" style:data-style-name="N0">
      <style:table-cell-properties fo:border-bottom="none" fo:background-color="#e6e6e6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888" style:family="table-cell" style:parent-style-name="Default" style:data-style-name="N0">
      <style:table-cell-properties style:text-align-source="fix" style:repeat-content="false" fo:border="0.06pt solid #999999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889" style:family="table-cell" style:parent-style-name="Default" style:data-style-name="N81">
      <style:table-cell-properties style:text-align-source="fix" style:repeat-content="false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890" style:family="table-cell" style:parent-style-name="Default" style:data-style-name="N0">
      <style:table-cell-properties fo:background-color="#e6e6e6" fo:border="0.06pt solid #666666"/>
      <style:text-properties style:font-name="Arial" fo:font-size="12pt" style:font-size-asian="12pt" style:font-size-complex="12pt"/>
    </style:style>
    <style:style style:name="ce891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666666" fo:border-right="0.06pt solid #4c4c4c" fo:border-top="0.06pt solid #666666" style:vertical-align="middle"/>
      <style:paragraph-properties fo:text-align="center"/>
      <style:text-properties style:font-name="Arial" fo:font-size="12pt" style:font-size-asian="12pt" style:font-size-complex="12pt"/>
    </style:style>
    <style:style style:name="ce892" style:family="table-cell" style:parent-style-name="Default" style:data-style-name="N0">
      <style:table-cell-properties fo:border-bottom="0.06pt solid #999999" fo:background-color="#e6e6e6" style:text-align-source="fix" style:repeat-content="false" fo:border-left="0.06pt solid #999999" fo:border-right="0.06pt solid #999999" fo:border-top="0.06pt solid #000000" style:vertical-align="automatic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893" style:family="table-cell" style:parent-style-name="Default" style:data-style-name="N0">
      <style:table-cell-properties fo:background-color="#e6e6e6" style:text-align-source="fix" style:repeat-content="false" fo:border="0.06pt solid #999999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894" style:family="table-cell" style:parent-style-name="Default" style:data-style-name="N0">
      <style:table-cell-properties fo:background-color="#e6e6e6" style:text-align-source="fix" style:repeat-content="false" fo:border="0.06pt solid #999999" style:vertical-align="automatic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895" style:family="table-cell" style:parent-style-name="Default" style:data-style-name="N0">
      <style:table-cell-properties fo:border-bottom="0.06pt solid #999999" style:text-align-source="fix" style:repeat-content="false" fo:border-left="0.06pt solid #999999" fo:border-right="0.06pt solid #999999" fo:border-top="0.06pt solid #000000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896" style:family="table-cell" style:parent-style-name="Default" style:data-style-name="N0">
      <style:table-cell-properties fo:background-color="#e6e6e6" style:text-align-source="fix" style:repeat-content="false" fo:border="0.06pt solid #999999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897" style:family="table-cell" style:parent-style-name="Default" style:data-style-name="N81">
      <style:table-cell-properties style:text-align-source="fix" style:repeat-content="false" fo:border="0.06pt solid #999999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898" style:family="table-cell" style:parent-style-name="Default" style:data-style-name="N0">
      <style:table-cell-properties fo:background-color="#e6e6e6" style:text-align-source="fix" style:repeat-content="false" fo:border="0.06pt solid #666666" style:vertical-align="automatic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899" style:family="table-cell" style:parent-style-name="Default" style:data-style-name="N0">
      <style:table-cell-properties fo:background-color="#e6e6e6" style:text-align-source="fix" style:repeat-content="false" fo:border="0.06pt solid #4c4c4c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900" style:family="table-cell" style:parent-style-name="Default" style:data-style-name="N0">
      <style:table-cell-properties style:text-align-source="fix" style:repeat-content="false" fo:border="0.06pt solid #4c4c4c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901" style:family="table-cell" style:parent-style-name="Default" style:data-style-name="N0">
      <style:table-cell-properties fo:background-color="#e6e6e6" style:text-align-source="fix" style:repeat-content="false" fo:border="0.06pt solid #666666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902" style:family="table-cell" style:parent-style-name="Default" style:data-style-name="N116">
      <style:table-cell-properties fo:background-color="#e6e6e6" style:text-align-source="fix" style:repeat-content="false" fo:border="0.06pt solid #4c4c4c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903" style:family="table-cell" style:parent-style-name="Default" style:data-style-name="N116">
      <style:table-cell-properties style:text-align-source="fix" style:repeat-content="false" fo:border="0.06pt solid #4c4c4c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904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4c4c4c" fo:border-right="0.06pt solid #666666" fo:border-top="0.06pt solid #666666" style:vertical-align="middle"/>
      <style:paragraph-properties fo:text-align="center"/>
      <style:text-properties style:font-name="Arial" fo:font-size="12pt" style:font-size-asian="12pt" style:font-size-complex="12pt"/>
    </style:style>
    <style:style style:name="ce9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906" style:family="table-cell" style:parent-style-name="Default" style:data-style-name="N81">
      <style:text-properties style:font-name="Arial" fo:font-size="12pt" style:font-size-asian="12pt" style:font-size-complex="12pt"/>
    </style:style>
    <style:style style:name="ce907" style:family="table-cell" style:parent-style-name="Default" style:data-style-name="N11">
      <style:table-cell-properties style:text-align-source="fix" style:repeat-content="false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39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88" style:family="table-cell" style:parent-style-name="Default" style:data-style-name="N0">
      <style:table-cell-properties fo:background-color="#eeeeee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5" style:family="table-cell" style:parent-style-name="Default" style:data-style-name="N0">
      <style:table-cell-properties fo:background-color="#e6e6e6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86" style:family="table-cell" style:parent-style-name="Default" style:data-style-name="N117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8" style:family="table-cell" style:parent-style-name="Default" style:data-style-name="N0">
      <style:table-cell-properties fo:border="0.06pt solid #000000"/>
      <style:text-properties style:font-name="Arial1" style:font-name-asian="Arial1" style:font-name-complex="Arial1"/>
    </style:style>
    <style:style style:name="ce38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9" style:family="table-cell" style:parent-style-name="Default" style:data-style-name="N100">
      <style:table-cell-properties fo:border="0.06pt solid #000000"/>
      <style:text-properties style:font-name="Arial1" style:font-name-asian="Arial1" style:font-name-complex="Arial1"/>
    </style:style>
    <style:style style:name="ce380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3" style:family="table-cell" style:parent-style-name="Default" style:data-style-name="N0">
      <style:table-cell-properties fo:border-bottom="0.06pt solid #000000" fo:background-color="#eeeeee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5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99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9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90" style:family="table-cell" style:parent-style-name="Default" style:data-style-name="N0">
      <style:table-cell-properties fo:border-bottom="0.06pt solid #000000" fo:background-color="#eeeeee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6" style:family="table-cell" style:parent-style-name="Default" style:data-style-name="N117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1" style:family="table-cell" style:parent-style-name="Default" style:data-style-name="N0">
      <style:text-properties fo:color="#666666" style:font-name="Arial1" fo:font-size="9pt" style:font-name-asian="Arial1" style:font-size-asian="9pt" style:font-name-complex="Arial1" style:font-size-complex="9pt"/>
    </style:style>
    <style:style style:name="ce384" style:family="table-cell" style:parent-style-name="Default" style:data-style-name="N0">
      <style:text-properties style:font-name="Arial1" fo:font-size="9pt" style:font-name-asian="Arial1" style:font-size-asian="9pt" style:font-name-complex="Arial1" style:font-size-complex="9pt"/>
    </style:style>
    <style:style style:name="ce807" style:family="table-cell" style:parent-style-name="Default" style:data-style-name="N0">
      <style:text-properties fo:font-size="13pt" style:font-size-asian="13pt" style:font-size-complex="13pt"/>
    </style:style>
    <style:style style:name="ce919" style:family="table-cell" style:parent-style-name="Default" style:data-style-name="N1">
      <style:table-cell-properties fo:background-color="transparent" fo:border="none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10" style:family="table-cell" style:parent-style-name="Default" style:data-style-name="N0">
      <style:table-cell-properties fo:border="none"/>
      <style:text-properties fo:font-size="13pt" style:font-size-asian="13pt" style:font-size-complex="13pt"/>
    </style:style>
    <style:style style:name="ce920" style:family="table-cell" style:parent-style-name="Default" style:data-style-name="N0">
      <style:table-cell-properties fo:border="none"/>
    </style:style>
    <style:style style:name="ce912" style:family="table-cell" style:parent-style-name="Default" style:data-style-name="N1">
      <style:table-cell-properties fo:background-color="transparent" fo:border="none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812" style:family="table-cell" style:parent-style-name="Default" style:data-style-name="N0">
      <style:table-cell-properties fo:background-color="transparent" fo:border="none"/>
      <style:text-properties fo:font-size="13pt" style:font-size-asian="13pt" style:font-size-complex="13pt"/>
    </style:style>
    <style:style style:name="ce914" style:family="table-cell" style:parent-style-name="Default" style:data-style-name="N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15" style:family="table-cell" style:parent-style-name="Default" style:data-style-name="N0">
      <style:table-cell-properties fo:background-color="transparent" fo:border="none"/>
      <style:text-properties style:font-name="Arial1" fo:font-size="13pt" style:font-name-asian="Arial1" style:font-size-asian="13pt" style:font-name-complex="Arial1" style:font-size-complex="13pt"/>
    </style:style>
    <style:style style:name="ce916" style:family="table-cell" style:parent-style-name="Default" style:data-style-name="N0">
      <style:table-cell-properties style:cell-protect="protected" style:print-content="true" fo:background-color="transparent" fo:border="none"/>
      <style:text-properties style:font-name="Arial1" fo:font-size="13pt" style:font-name-asian="Arial1" style:font-size-asian="13pt" style:font-name-complex="Arial1" style:font-size-complex="13pt"/>
    </style:style>
    <style:style style:name="ce9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18" style:family="table-cell" style:parent-style-name="Default" style:data-style-name="N118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32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33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34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493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40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8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2a6099" style:font-name="Bookman Old Style" fo:font-size="26pt" fo:font-style="italic" fo:font-weight="bold" style:font-name-asian="Bookman Old Style2" style:font-size-asian="26pt" style:font-style-asian="italic" style:font-weight-asian="bold" style:font-name-complex="Bookman Old Style2" style:font-size-complex="26pt" style:font-style-complex="italic" style:font-weight-complex="bold"/>
    </style:style>
    <style:style style:name="ce82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2a6099" style:text-outline="false" style:text-line-through-style="none" style:text-line-through-type="none" style:font-name="Liberation Sans1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.5pt" style:language-asian="zh" style:country-asian="CN" style:font-style-asian="normal" style:font-weight-asian="normal" style:font-name-complex="Liberation Sans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666666" style:text-outline="false" style:text-line-through-style="none" style:text-line-through-type="none" style:font-name="Liberation Sans1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" fo:font-size="18pt" fo:font-style="italic" fo:font-weight="normal" style:font-name-asian="Bookman Old Style2" style:font-size-asian="18pt" style:font-style-asian="italic" style:font-weight-asian="normal" style:font-name-complex="Bookman Old Style2" style:font-size-complex="18pt" style:font-style-complex="italic" style:font-weight-complex="normal"/>
    </style:style>
    <style:style style:name="ce94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" fo:font-size="16pt" fo:font-style="italic" fo:font-weight="normal" style:font-name-asian="Bookman Old Style2" style:font-size-asian="16pt" style:font-style-asian="italic" style:font-weight-asian="normal" style:font-name-complex="Bookman Old Style2" style:font-size-complex="16pt" style:font-style-complex="italic" style:font-weight-complex="normal"/>
    </style:style>
    <style:style style:name="ce944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start" fo:margin-left="0cm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833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7" style:family="table-cell" style:parent-style-name="Default" style:data-style-name="N0">
      <style:text-properties style:font-name="Arial1" fo:font-size="13pt" style:font-name-asian="Arial1" style:font-size-asian="13pt" style:font-name-complex="Arial1" style:font-size-complex="13pt"/>
    </style:style>
    <style:style style:name="ce94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5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51" style:family="table-cell" style:parent-style-name="Default" style:data-style-name="N0">
      <style:table-cell-properties fo:border-bottom="0.06pt solid #666666" fo:background-color="#e8e8e8" style:text-align-source="fix" style:repeat-content="false" fo:border-left="none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52" style:family="table-cell" style:parent-style-name="Default" style:data-style-name="N0">
      <style:table-cell-properties fo:border-bottom="0.06pt solid #666666" style:text-align-source="fix" style:repeat-content="false" fo:background-color="transparent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3" style:family="table-cell" style:parent-style-name="Default" style:data-style-name="N0">
      <style:table-cell-properties fo:border-bottom="0.06pt solid #666666" style:text-align-source="fix" style:repeat-content="false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4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wrap-option="wrap" fo:border-left="none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55" style:family="table-cell" style:parent-style-name="Default" style:data-style-name="N0">
      <style:table-cell-properties fo:border-bottom="0.06pt solid #666666" fo:background-color="#ffffff" style:text-align-source="fix" style:repeat-content="false" fo:border-left="none" fo:border-right="0.06pt solid #666666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6" style:family="table-cell" style:parent-style-name="Default" style:data-style-name="N0">
      <style:table-cell-properties fo:border-bottom="0.06pt solid #666666" style:text-align-source="fix" style:repeat-content="false" fo:background-color="transparent" fo:border-left="none" fo:border-right="0.06pt solid #666666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5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960" style:family="table-cell" style:parent-style-name="Default">
      <style:text-properties fo:color="#000000" style:text-outline="false" style:text-line-through-style="none" style:text-line-through-type="none" style:font-name="Arial1" fo:font-size="13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Arial1" style:font-size-asian="13pt" style:language-asian="zh" style:country-asian="CN" style:font-style-asian="italic" style:font-weight-asian="normal" style:font-name-complex="Arial1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47" style:family="table-cell" style:parent-style-name="Default" style:data-style-name="N0">
      <style:table-cell-properties fo:background-color="transparent"/>
      <style:text-properties fo:font-size="13pt" style:font-size-asian="13pt" style:font-size-complex="13pt"/>
    </style:style>
    <style:style style:name="ce96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6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85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fo:font-size="13pt" style:font-size-asian="13pt" style:font-size-complex="13pt"/>
    </style:style>
    <style:style style:name="ce96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757171" fo:font-size="13pt" fo:font-weight="bold" style:font-size-asian="13pt" style:font-weight-asian="bold" style:font-size-complex="13pt" style:font-weight-complex="bold"/>
    </style:style>
    <style:style style:name="ce96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666666" style:text-outline="false" style:text-line-through-style="none" style:text-line-through-type="none" style:font-name="Liberation Sans1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language-asian="zh" style:country-asian="CN" style:font-style-asian="normal" style:font-weight-asian="normal" style:font-name-complex="Liberation Sans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8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97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7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3" style:family="table-cell" style:parent-style-name="Default" style:data-style-name="N0">
      <style:table-cell-properties style:vertical-align="middle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74" style:family="table-cell" style:parent-style-name="Default" style:data-style-name="N100">
      <style:table-cell-properties fo:border-bottom="0.06pt solid #666666" style:cell-protect="protected" style:print-content="true" style:text-align-source="fix" style:repeat-content="false" fo:background-color="transparent" fo:border-left="none" fo:border-right="none" fo:border-top="0.06pt solid #666666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5" style:family="table-cell" style:parent-style-name="Default" style:data-style-name="N0">
      <style:table-cell-properties fo:border-bottom="0.06pt solid #666666" style:text-align-source="fix" style:repeat-content="false" fo:border-left="none" fo:border-right="none" fo:border-top="0.06pt solid #666666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6" style:family="table-cell" style:parent-style-name="Default" style:data-style-name="N0">
      <style:table-cell-properties fo:background-color="transparent"/>
      <style:text-properties style:font-name="Arial1" fo:font-size="13pt" style:font-name-asian="Arial1" style:font-size-asian="13pt" style:font-name-complex="Arial1" style:font-size-complex="13pt"/>
    </style:style>
    <style:style style:name="ce862" style:family="table-cell" style:parent-style-name="Default" style:data-style-name="N0">
      <style:table-cell-properties fo:background-color="#eeeeee" style:cell-protect="protected" style:print-content="true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78" style:family="table-cell" style:parent-style-name="Default" style:data-style-name="N0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864" style:family="table-cell" style:parent-style-name="Default" style:data-style-name="N0">
      <style:table-cell-properties style:text-align-source="fix" style:repeat-content="false" fo:background-color="transparent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8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8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3pt" style:font-size-asian="13pt" style:font-size-complex="13pt"/>
    </style:style>
    <style:style style:name="ce9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3pt" style:font-size-asian="13pt" style:font-size-complex="13pt"/>
    </style:style>
    <style:style style:name="ce985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color="#ff0000"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986" style:family="table-cell" style:parent-style-name="Default" style:data-style-name="N36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  <style:map style:condition="cell-content()=&quot;ALERTA&quot;" style:apply-style-name="cf17" style:base-cell-address="Certificado.F10"/>
    </style:style>
    <style:style style:name="ce987" style:family="table-cell" style:parent-style-name="Default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  <style:map style:condition="cell-content()=&quot;ALERTA&quot;" style:apply-style-name="cf18" style:base-cell-address="Certificado.F16"/>
    </style:style>
    <style:style style:name="ce98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99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  <style:map style:condition="cell-content()=&quot;ALERTA&quot;" style:apply-style-name="cf15" style:base-cell-address="Certificado.E14"/>
    </style:style>
    <style:style style:name="ce99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  <style:map style:condition="cell-content()=&quot;ALERTA&quot;" style:apply-style-name="cf18" style:base-cell-address="Certificado.F16"/>
    </style:style>
    <style:style style:name="ce99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3pt" style:font-size-asian="13pt" style:font-size-complex="13pt"/>
    </style:style>
    <style:style style:name="ce40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4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95" style:family="table-cell" style:parent-style-name="Default" style:data-style-name="N0">
      <style:table-cell-properties style:cell-protect="protected" style:print-content="true" fo:background-color="transparent"/>
      <style:text-properties style:font-name="Arial1" fo:font-size="13pt" style:font-name-asian="Arial1" style:font-size-asian="13pt" style:font-name-complex="Arial1" style:font-size-complex="13pt"/>
    </style:style>
    <style:style style:name="ce99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880" style:family="table-cell" style:parent-style-name="Default" style:data-style-name="N117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98" style:family="table-cell" style:parent-style-name="Default" style:data-style-name="N36">
      <style:table-cell-properties style:text-align-source="fix" style:repeat-content="false" fo:background-color="transparent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99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526" style:family="table-cell" style:parent-style-name="Default" style:data-style-name="N0">
      <style:table-cell-properties fo:background-color="#ffffff"/>
    </style:style>
    <style:style style:name="ce402" style:family="table-cell" style:parent-style-name="Default" style:data-style-name="N0">
      <style:table-cell-properties style:vertical-align="automatic"/>
    </style:style>
    <style:style style:name="ce1002" style:family="table-cell" style:parent-style-name="Default" style:data-style-name="N0">
      <style:table-cell-properties fo:background-color="#2a6099" style:cell-protect="protected" style:print-content="true" fo:border="none" style:vertical-align="middle"/>
      <style:text-properties fo:color="#ffffff" style:font-name="Arial1" fo:font-size="13pt" style:font-name-asian="Arial1" style:font-size-asian="13pt" style:font-name-complex="Arial1" style:font-size-complex="13pt"/>
    </style:style>
    <style:style style:name="ce1003" style:family="table-cell" style:parent-style-name="Default" style:data-style-name="N0">
      <style:table-cell-properties style:vertical-align="automatic"/>
      <style:text-properties fo:font-size="13pt" style:font-size-asian="13pt" style:font-size-complex="13pt"/>
    </style:style>
    <style:style style:name="ce1004" style:family="table-cell" style:parent-style-name="Default" style:data-style-name="N0">
      <style:table-cell-properties fo:background-color="transparent" style:vertical-align="automatic"/>
      <style:text-properties fo:font-size="13pt" style:font-size-asian="13pt" style:font-size-complex="13pt"/>
    </style:style>
    <style:style style:name="ce100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1009" style:family="table-cell" style:parent-style-name="Default" style:data-style-name="N0">
      <style:table-cell-properties fo:border-bottom="0.06pt solid #666666" style:cell-protect="protected" style:print-content="true" style:text-align-source="fix" style:repeat-content="false" fo:background-color="transparent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10" style:family="table-cell" style:parent-style-name="Default" style:data-style-name="N117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1" style:family="table-cell" style:parent-style-name="Default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97" style:family="table-cell" style:parent-style-name="Default" style:data-style-name="N117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2" style:family="table-cell" style:parent-style-name="Default" style:data-style-name="N36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3" style:family="table-cell" style:parent-style-name="Default">
      <style:text-properties fo:font-size="13pt" style:font-size-asian="13pt" style:font-size-complex="13pt"/>
    </style:style>
    <style:style style:name="ce1014" style:family="table-cell" style:parent-style-name="Default" style:data-style-name="N36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1019" style:family="table-cell" style:parent-style-name="Default" style:data-style-name="N0">
      <style:table-cell-properties fo:border-bottom="none" fo:background-color="#eeeeee" style:cell-protect="protected" style:print-content="true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25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36" style:family="table-cell" style:parent-style-name="Default" style:data-style-name="N1">
      <style:table-cell-properties fo:background-color="#ffffff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28" style:family="table-cell" style:parent-style-name="Default" style:data-style-name="N1">
      <style:table-cell-properties fo:background-color="#ffffff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38" style:family="table-cell" style:parent-style-name="Default" style:data-style-name="N1">
      <style:table-cell-properties fo:background-color="transparent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30" style:family="table-cell" style:parent-style-name="Default" style:data-style-name="N0">
      <style:table-cell-properties fo:background-color="transparent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31" style:family="table-cell" style:parent-style-name="Default" style:data-style-name="N0">
      <style:table-cell-properties fo:border-bottom="none" fo:background-color="#eeeeee" style:cell-protect="protected" style:print-content="true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  <style:map style:condition="cell-content()=&quot;ALERTA&quot;" style:apply-style-name="cf15" style:base-cell-address="Certificado.E14"/>
    </style:style>
    <style:style style:name="ce1032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  <style:map style:condition="cell-content()=&quot;ALERTA&quot;" style:apply-style-name="cf15" style:base-cell-address="Certificado.E14"/>
    </style:style>
    <style:style style:name="ce1033" style:family="table-cell" style:parent-style-name="Default" style:data-style-name="N118">
      <style:table-cell-properties fo:border-bottom="0.06pt solid #666666" fo:background-color="#ffffff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34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961" style:family="table-cell" style:parent-style-name="Default" style:data-style-name="N1">
      <style:table-cell-properties fo:background-color="transparent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1" fo:font-size="18pt" fo:font-style="italic" fo:font-weight="normal" style:font-name-asian="Arial Unicode MS" style:font-size-asian="18pt" style:language-asian="zxx" style:country-asian="none" style:font-style-asian="italic" style:font-weight-asian="normal" style:font-name-complex="Arial2" style:font-size-complex="18pt" style:language-complex="zxx" style:country-complex="none" style:font-style-complex="italic" style:font-weight-complex="normal"/>
    </style:style>
    <style:style style:name="ce10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038" style:family="table-cell" style:parent-style-name="Default" style:data-style-name="N0">
      <style:table-cell-properties fo:border-bottom="none" fo:background-color="#e8e8e8" style:text-align-source="fix" style:repeat-content="false" fo:border-left="0.06pt solid #000000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39" style:family="table-cell" style:parent-style-name="Default" style:data-style-name="N0">
      <style:table-cell-properties fo:border-bottom="0.06pt solid #666666" fo:background-color="#e8e8e8" style:cell-protect="protected" style:print-content="true" style:text-align-source="fix" style:repeat-content="false" fo:border-left="0.06pt solid #000000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4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04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3pt" style:font-size-asian="13pt" style:font-size-complex="13pt"/>
    </style:style>
    <style:style style:name="ce1043" style:family="table-cell" style:parent-style-name="Default" style:data-style-name="N0">
      <style:table-cell-properties fo:border-bottom="0.06pt solid #666666" fo:background-color="#e8e8e8" style:text-align-source="fix" style:repeat-content="false" fo:border-left="none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44" style:family="table-cell" style:parent-style-name="Default" style:data-style-name="N126">
      <style:table-cell-properties fo:border-bottom="0.06pt solid #666666" fo:background-color="#ffffff" style:text-align-source="fix" style:repeat-content="false" fo:border-left="0.06pt solid #000000" fo:border-right="0.06pt solid #666666" fo:border-top="0.06pt solid #666666" style:vertical-align="middle"/>
      <style:paragraph-properties fo:text-align="center"/>
      <style:text-properties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04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1047" style:family="table-cell" style:parent-style-name="Default" style:data-style-name="N0">
      <style:table-cell-properties style:cell-protect="protected" style:print-content="true"/>
      <style:text-properties style:font-name="Arial1" fo:font-size="13pt" style:font-name-asian="Arial1" style:font-size-asian="13pt" style:font-name-complex="Arial1" style:font-size-complex="13pt"/>
    </style:style>
    <style:style style:name="ce1048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fo:color="#ffffff" style:font-name="Arial1" fo:font-size="13pt" fo:font-style="italic" style:font-name-asian="Arial1" style:font-size-asian="13pt" style:font-style-asian="italic" style:font-name-complex="Arial1" style:font-size-complex="13pt" style:font-style-complex="italic"/>
      <style:map style:condition="cell-content()=&quot;ALERTA&quot;" style:apply-style-name="cf15" style:base-cell-address="Certificado.E14"/>
    </style:style>
    <style:style style:name="ce1049" style:family="table-cell" style:parent-style-name="Default" style:data-style-name="N0">
      <style:table-cell-properties fo:background-color="transparent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8" style:base-cell-address="Certificado.F16"/>
    </style:style>
    <style:style style:name="ce10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105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666666" fo:font-size="13pt" style:font-size-asian="13pt" style:font-size-complex="13pt"/>
    </style:style>
    <style:style style:name="ce1052" style:family="table-cell" style:parent-style-name="Default" style:data-style-name="N0">
      <style:table-cell-properties fo:border-bottom="0.06pt solid #000000" fo:background-color="#e8e8e8" style:text-align-source="fix" style:repeat-content="false" fo:border-left="0.06pt solid #000000" fo:border-right="0.06pt solid #666666" fo:border-top="0.06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53" style:family="table-cell" style:parent-style-name="Default" style:data-style-name="N0">
      <style:table-cell-properties fo:border-bottom="0.06pt solid #666666" fo:background-color="#ffffff" style:text-align-source="fix" style:repeat-content="false" fo:border-left="0.06pt solid #666666" fo:border-right="0.06pt solid #666666" fo:border-top="0.06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54" style:family="table-cell" style:parent-style-name="Default" style:data-style-name="N0">
      <style:table-cell-properties fo:background-color="#e8e8e8" style:cell-protect="protected" style:print-content="true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55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0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1" fo:font-size="13pt" style:font-name-asian="Liberation Serif1" style:font-size-asian="13pt" style:font-name-complex="Liberation Serif1" style:font-size-complex="13pt"/>
    </style:style>
    <style:style style:name="ce1057" style:family="table-cell" style:parent-style-name="Default" style:data-style-name="N0">
      <style:table-cell-properties fo:background-color="#e8e8e8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58" style:family="table-cell" style:parent-style-name="Default" style:data-style-name="N126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05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067" style:family="table-cell" style:parent-style-name="Default" style:data-style-name="N0">
      <style:table-cell-properties fo:background-color="#ffffff" style:cell-protect="protected" style:print-content="true"/>
      <style:text-properties style:font-name="Arial1" fo:font-size="13pt" style:font-name-asian="Arial1" style:font-size-asian="13pt" style:font-name-complex="Arial1" style:font-size-complex="13pt"/>
    </style:style>
    <style:style style:name="ce1068" style:family="table-cell" style:parent-style-name="Default" style:data-style-name="N116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69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107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074" style:family="table-cell" style:parent-style-name="Default" style:data-style-name="N0">
      <style:table-cell-properties fo:background-color="#ffffff" style:cell-protect="protected" style:print-content="true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1075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84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666666" fo:border-right="0.06pt solid #000000" fo:border-top="0.06pt solid #666666" style:vertical-align="middle"/>
      <style:paragraph-properties fo:text-align="center"/>
      <style:text-properties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092" style:family="table-cell" style:parent-style-name="Default" style:data-style-name="N119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93" style:family="table-cell" style:parent-style-name="Default">
      <style:table-cell-properties fo:background-color="#2a6099"/>
      <style:text-properties fo:font-size="13pt" style:font-size-asian="13pt" style:font-size-complex="13pt"/>
    </style:style>
    <style:style style:name="ce1096" style:family="table-cell" style:parent-style-name="Default" style:data-style-name="N0">
      <style:table-cell-properties fo:border-bottom="0.06pt solid #000000" fo:background-color="#e8e8e8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97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103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105" style:family="table-cell" style:parent-style-name="Default" style:data-style-name="N0">
      <style:table-cell-properties fo:border-bottom="none" style:cell-protect="protected" style:print-content="true" fo:border-left="none" fo:border-right="none" fo:border-top="0.06pt solid #000000"/>
      <style:text-properties style:font-name="Arial1" fo:font-size="13pt" style:font-name-asian="Arial1" style:font-size-asian="13pt" style:font-name-complex="Arial1" style:font-size-complex="13pt"/>
    </style:style>
    <style:style style:name="ce1106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07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09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11" style:family="table-cell" style:parent-style-name="Default" style:data-style-name="N11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112" style:family="table-cell" style:parent-style-name="Default" style:data-style-name="N0">
      <style:table-cell-properties fo:border-bottom="0.06pt solid #666666" fo:background-color="#e8e8e8" style:text-align-source="fix" style:repeat-content="false" fo:border-left="none" fo:border-right="none" fo:border-top="0.06pt solid #666666" style:vertical-align="middle"/>
      <style:paragraph-properties fo:text-align="center"/>
      <style:text-properties style:font-name="Arial21" fo:font-size="13pt" style:font-name-asian="Arial21" style:font-size-asian="13pt" style:font-name-complex="Arial21" style:font-size-complex="13pt"/>
    </style:style>
    <style:style style:name="ce1113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fo:font-size="13pt" style:font-size-asian="13pt" style:font-size-complex="13pt"/>
    </style:style>
    <style:style style:name="ce1115" style:family="table-cell" style:parent-style-name="Default" style:data-style-name="N0">
      <style:table-cell-properties style:cell-protect="protected" style:print-content="tru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  <style:map style:condition="cell-content()=&quot;ALERTA&quot;" style:apply-style-name="cf15" style:base-cell-address="Certificado.E14"/>
    </style:style>
    <style:style style:name="ce111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  <style:map style:condition="cell-content()=&quot;ALERTA&quot;" style:apply-style-name="cf15" style:base-cell-address="Certificado.E14"/>
    </style:style>
    <style:style style:name="ce111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119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Times New Roman" fo:font-size="13pt" fo:font-style="italic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ce1120" style:family="table-cell" style:parent-style-name="Default" style:data-style-name="N11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121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122" style:family="table-cell" style:parent-style-name="Default" style:data-style-name="N0">
      <style:table-cell-properties fo:border-bottom="0.06pt solid #666666" fo:background-color="#e8e8e8" fo:border-left="none" fo:border-right="none" fo:border-top="0.06pt solid #666666" style:vertical-align="middle"/>
      <style:text-properties style:font-name="Arial1" fo:font-size="13pt" style:font-name-asian="Arial1" style:font-size-asian="13pt" style:font-name-complex="Arial1" style:font-size-complex="13pt"/>
    </style:style>
    <style:style style:name="ce407" style:family="table-cell" style:parent-style-name="Default" style:data-style-name="N0">
      <style:table-cell-properties fo:background-color="transparent"/>
      <style:text-properties fo:color="#b4c7dc"/>
    </style:style>
    <style:style style:name="ce1126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27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28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Times New Roman" fo:font-size="13pt" fo:font-style="italic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ce1129" style:family="table-cell" style:parent-style-name="Default" style:data-style-name="N0">
      <style:table-cell-properties fo:background-color="transparent"/>
      <style:text-properties fo:color="#3465a4" fo:font-size="13pt" style:font-size-asian="13pt" style:font-size-complex="13pt"/>
    </style:style>
    <style:style style:name="ce113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ce1131" style:family="table-cell" style:parent-style-name="Default" style:data-style-name="N0">
      <style:table-cell-properties fo:background-color="#ffffff"/>
      <style:text-properties style:font-name="Arial1" fo:font-size="13pt" style:font-name-asian="Arial1" style:font-size-asian="13pt" style:font-name-complex="Arial1" style:font-size-complex="13pt"/>
    </style:style>
    <style:style style:name="ce113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style:text-underline-style="solid" style:text-underline-width="auto" style:text-underline-color="font-color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3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color="#ff0000"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4" style:family="table-cell" style:parent-style-name="Default" style:data-style-name="N0">
      <style:table-cell-properties fo:background-color="#ffffff"/>
      <style:text-properties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5" style:family="table-cell" style:parent-style-name="Default" style:data-style-name="N0">
      <style:table-cell-properties fo:background-color="#ffffff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ce113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font-independent-line-spacing="false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Graphics">
      <style:graphic-properties draw:stroke="none" draw:fill="none" draw:color-mode="watermark" draw:luminance="0%" draw:contrast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style:font-independent-line-spacing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-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11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Calibri11" style:font-name-complex="Calibri11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11" fo:font-size="11pt" fo:font-weight="normal" style:text-underline-style="none" style:text-underline-color="font-color" style:text-line-through-type="none" fo:font-style="normal" style:text-outline="false" fo:text-shadow="none" style:font-name-asian="Calibri11" style:font-name-complex="Calibri11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11" fo:font-size="11pt" fo:font-weight="normal" style:text-underline-style="none" style:text-underline-color="font-color" style:text-line-through-type="none" fo:font-style="normal" style:text-outline="false" fo:text-shadow="none" style:font-name-asian="Calibri11" style:font-name-complex="Calibri11" style:font-size-asian="11pt" style:font-size-complex="11pt" style:font-weight-asian="normal" style:font-weight-complex="normal" style:font-style-asian="normal" style:font-style-complex="normal" style:text-position="-33% 58%"/>
    </style:style>
    <style:style style:name="T6" style:family="text">
      <style:text-properties fo:color="#000000" style:font-name="Calibri11" fo:font-size="11pt" fo:font-weight="bold" style:text-underline-style="none" style:text-underline-color="font-color" style:text-line-through-type="none" fo:font-style="normal" style:text-outline="false" fo:text-shadow="none" style:text-position="33% 58%" style:font-name-asian="Calibri11" style:font-name-complex="Calibri11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11" fo:font-size="11pt" fo:font-weight="bold" style:text-underline-style="none" style:text-underline-color="font-color" style:text-line-through-type="none" fo:font-style="normal" style:text-outline="false" fo:text-shadow="none" style:font-name-asian="Calibri11" style:font-name-complex="Calibri11" style:font-size-asian="11pt" style:font-size-complex="11pt" style:font-weight-asian="bold" style:font-weight-complex="bold" style:font-style-asian="normal" style:font-style-complex="normal" style:text-position="-33% 58%"/>
    </style:style>
    <style:style style:name="T8" style:family="text">
      <style:text-properties fo:color="#000000" style:font-name="Calibri11" fo:font-size="11pt" fo:font-weight="bold" style:text-underline-style="none" style:text-underline-color="font-color" style:text-line-through-type="none" fo:font-style="normal" style:text-outline="false" fo:text-shadow="none" style:text-position="-33% 58%" style:font-name-asian="Calibri11" style:font-name-complex="Calibri11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name="Arial1" fo:font-size="12pt" fo:font-weight="bold" fo:font-style="italic" style:font-name-asian="Arial1" style:font-name-complex="Arial1" style:font-weight-asian="bold" style:font-weight-complex="bold" style:font-style-asian="italic" style:font-style-complex="italic"/>
    </style:style>
    <style:style style:name="T10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position="-33% 58%"/>
    </style:style>
    <style:style style:name="T12" style:family="text">
      <style:text-properties fo:color="#000000" style:font-name="Times New Roman2" fo:font-size="10pt" fo:font-weight="normal" style:text-underline-style="none" style:text-underline-color="font-color" style:text-line-through-type="none" fo:font-style="italic" style:text-outline="false" fo:text-shadow="none" style:font-name-asian="Times New Roman2" style:font-name-complex="Times New Roman2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Conversão.$C$7:.$C$17])" table:allow-empty-cell="true" table:display-list="unsorted" table:base-cell-address="Planilha.B25">
          <table:error-message table:message-type="stop" table:display="true"/>
        </table:content-validation>
        <table:content-validation table:name="val2" table:condition="of:cell-content-is-in-list(&quot;LABORATÓRIO DE PRESSÃO - DSP&quot;;&quot;IN LOCO- SERVIÇO EXECUTADO NAS DEPENDÊNCIAS DO CLIENTE&quot;)" table:allow-empty-cell="true" table:display-list="unsorted" table:base-cell-address="Planilha.E12"/>
        <table:content-validation table:name="val3" table:condition="of:cell-content-is-in-list(&quot;ANALÓGICO&quot;;&quot;DIGITAL&quot;)" table:allow-empty-cell="true" table:display-list="unsorted" table:base-cell-address="Planilha.E27">
          <table:error-message table:message-type="stop" table:display="true"/>
        </table:content-validation>
        <table:content-validation table:name="val4" table:condition="of:cell-content-is-in-list([Padrões.$O$4:.$O$13])" table:allow-empty-cell="true" table:display-list="unsorted" table:base-cell-address="Planilha.E33">
          <table:help-message table:display="true">
            <text:p>PARA A SELEÇÃO DO EVP-017</text:p>
            <text:p/>
            <text:p>EVP-017-01 : -0,9 A 0 KGF/CM2</text:p>
            <text:p>EVP-017-02 : 0 A 17 KGF/CM2</text:p>
            <text:p>EVP-017-01 : 0 A 70 KGF/CM2</text:p>
            <text:p>EVP-017-01 : 0 A 1 KGF/CM2</text:p>
          </table:help-message>
        </table:content-validation>
        <table:content-validation table:name="val5" table:condition="of:cell-content-is-in-list(&quot;MANÔMETRO DIGITAL&quot;;&quot;VACUÔMETRO DIGITAL&quot;;&quot;ESFIGMOMANÔMETRO&quot;)" table:allow-empty-cell="true" table:display-list="unsorted" table:base-cell-address="Planilha.A1"/>
        <table:content-validation table:name="val6" table:condition="of:cell-content-is-in-list(&quot;DIEGO HENRIQUE ALVES SALDANHA&quot;)" table:allow-empty-cell="true" table:display-list="unsorted" table:base-cell-address="Planilha.A1"/>
        <table:content-validation table:name="val7" table:condition="of:cell-content-is-in-list([Padrões.$O$15:.$O$19])" table:allow-empty-cell="true" table:display-list="unsorted" table:base-cell-address="Planilha.H34">
          <table:error-message table:message-type="stop" table:display="true"/>
        </table:content-validation>
        <table:content-validation table:name="val8" table:condition="of:cell-content-is-in-list([Padrões.$O$5:.$O$10])" table:allow-empty-cell="true" table:display-list="unsorted" table:base-cell-address="Planilha.H105"/>
        <table:content-validation table:name="val9" table:condition="of:cell-content-is-in-list(&quot;1&quot;;&quot;2&quot;;&quot;5&quot;;&quot;0,5&quot;;&quot;0,2&quot;;&quot;0,1&quot;;&quot;0,01&quot;;&quot;0,001&quot;)" table:allow-empty-cell="true" table:display-list="unsorted" table:base-cell-address="Planilha.A1">
          <table:help-message table:title="Resolução" table:display="false">
            <text:p>1</text:p>
            <text:p>0,1</text:p>
            <text:p>0,001</text:p>
            <text:p>0,0001</text:p>
          </table:help-message>
          <table:error-message table:message-type="stop" table:display="true"/>
        </table:content-validation>
        <table:content-validation table:name="val10" table:condition="of:cell-content-is-in-list(&quot;- 01&quot;;&quot;- 02&quot;;&quot;- 03&quot;;&quot;- 04&quot;;&quot;- 05&quot;;&quot;- 06&quot;;&quot;- 07&quot;;&quot;- 08&quot;;&quot;- 09&quot;;&quot;- 10&quot;;&quot;- 11 &quot;;&quot;- 12&quot;;&quot;- 13 &quot;;&quot;- 14 &quot;;&quot;- 15&quot;;&quot;- 16&quot;;&quot;- 17&quot;;&quot;- 18&quot;;&quot;- 19&quot;;&quot;- 20&quot;;&quot;- 21&quot;;&quot;- 22 &quot;;&quot;- 23&quot;;&quot;- 24&quot;;&quot;- 25&quot;;&quot;- 26&quot;;&quot;- 27&quot;;&quot;- 28 &quot;;&quot;- 29&quot;;&quot;- 30&quot;)" table:allow-empty-cell="true" table:display-list="unsorted" table:base-cell-address="Planilha.J9"/>
        <table:content-validation table:name="val11" table:condition="of:cell-content-is-in-list(&quot;01&quot;;&quot;02&quot;;&quot;03&quot;;&quot;04&quot;;&quot;05&quot;)" table:allow-empty-cell="true" table:display-list="unsorted" table:base-cell-address="Planilha.A1">
          <table:error-message table:message-type="stop" table:display="true"/>
        </table:content-validation>
        <table:content-validation table:name="val12" table:condition="of:cell-content-is-in-list(&quot;%&quot;;&quot;Valor&quot;)" table:allow-empty-cell="true" table:display-list="unsorted" table:base-cell-address="Planilha.A1">
          <table:error-message table:message-type="stop" table:display="true"/>
        </table:content-validation>
        <table:content-validation table:name="val13" table:condition="of:cell-content-is-in-list(&quot;CLIENTE&quot;;&quot;FABRICANTE&quot;)" table:allow-empty-cell="true" table:display-list="unsorted" table:base-cell-address="Planilha.A1">
          <table:error-message table:message-type="stop" table:display="true"/>
        </table:content-validation>
        <table:content-validation table:name="val14" table:condition="of:cell-content-is-in-list(&quot;Erro&quot;;&quot;EMA&quot;)" table:allow-empty-cell="true" table:display-list="unsorted" table:base-cell-address="Planilha.A1">
          <table:error-message table:message-type="stop" table:display="true"/>
        </table:content-validation>
        <table:content-validation table:name="val15" table:condition="of:cell-content-is-in-list(&quot;Analógico&quot;;&quot;Digital&quot;)" table:allow-empty-cell="true" table:display-list="unsorted" table:base-cell-address="Planilha.A1">
          <table:error-message table:message-type="stop" table:display="true"/>
        </table:content-validation>
        <table:content-validation table:name="val16" table:condition="of:cell-content-is-in-list(&quot;DIEGO&quot;)" table:allow-empty-cell="true" table:display-list="unsorted" table:base-cell-address="Planilha.A1"/>
        <table:content-validation table:name="val17" table:condition="of:cell-content-is-in-list(&quot;A&quot;;&quot;B&quot;)" table:allow-empty-cell="true" table:display-list="unsorted" table:base-cell-address="Planilha.A1">
          <table:error-message table:message-type="stop" table:display="true"/>
        </table:content-validation>
        <table:content-validation table:name="val18" table:condition="of:cell-content-is-in-list(&quot;Normal&quot;;&quot;Retangular&quot;;&quot;Triangular&quot;)" table:allow-empty-cell="true" table:display-list="unsorted" table:base-cell-address="Planilha.A1">
          <table:error-message table:message-type="stop" table:display="true"/>
        </table:content-validation>
      </table:content-validations>
      <table:table table:name="Planilha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3" table:number-columns-repeated="3" table:default-cell-style-name="ce11"/>
        <table:table-column table:style-name="co6" table:default-cell-style-name="ce11"/>
        <table:table-column table:style-name="co3" table:number-columns-repeated="3" table:default-cell-style-name="ce11"/>
        <table:table-column table:style-name="co7" table:default-cell-style-name="ce11"/>
        <table:table-column table:style-name="co8" table:number-columns-repeated="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1" table:number-columns-repeated="3" table:default-cell-style-name="ce11"/>
        <table:table-column table:style-name="co13" table:default-cell-style-name="ce11"/>
        <table:table-column table:style-name="co14" table:default-cell-style-name="ce11"/>
        <table:table-column table:style-name="co11" table:number-columns-repeated="35" table:default-cell-style-name="ce11"/>
        <table:table-column table:style-name="co11" table:number-columns-repeated="19" table:default-cell-style-name="ce1"/>
        <table:table-column table:style-name="co11" table:number-columns-repeated="174"/>
        <table:table-column table:style-name="co15" table:number-columns-repeated="16127"/>
        <table:table-row table:style-name="ro1">
          <table:table-cell table:style-name="ce2"/>
          <table:table-cell table:style-name="ce1"/>
          <table:table-cell table:style-name="ce278" table:number-columns-spanned="3" table:number-rows-spanned="3">
            <draw:frame draw:z-index="0" draw:name="Figura 2" draw:style-name="gr1" draw:text-style-name="P1" svg:width="4.179cm" svg:height="3.276cm" svg:x="2.358cm" svg:y="0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  <table:table-cell table:style-name="ce3" office:value-type="string" calcext:value-type="string">
            <text:p>TIPO:</text:p>
          </table:table-cell>
          <table:table-cell table:style-name="ce83" office:value-type="string" calcext:value-type="string" table:number-columns-spanned="5" table:number-rows-spanned="1">
            <text:p>FORMULÁRIO OPERACIONAL</text:p>
          </table:table-cell>
          <table:covered-table-cell table:number-columns-repeated="4"/>
          <table:table-cell table:style-name="ce1" table:number-columns-repeated="8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2">
          <table:table-cell table:style-name="ce2"/>
          <table:table-cell table:style-name="ce1"/>
          <table:covered-table-cell table:number-columns-repeated="3"/>
          <table:table-cell table:style-name="ce6" office:value-type="string" calcext:value-type="string">
            <text:p>REQUISITO:</text:p>
          </table:table-cell>
          <table:table-cell table:style-name="ce84" office:value-type="string" calcext:value-type="string" table:number-columns-spanned="5" table:number-rows-spanned="1">
            <text:p>REQUISITOS DE PROCESSO</text:p>
          </table:table-cell>
          <table:covered-table-cell table:number-columns-repeated="4"/>
          <table:table-cell table:style-name="ce1" table:number-columns-repeated="8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3">
          <table:table-cell table:style-name="ce2"/>
          <table:table-cell table:style-name="ce1"/>
          <table:covered-table-cell table:number-columns-repeated="3"/>
          <table:table-cell table:style-name="ce3" office:value-type="string" calcext:value-type="string">
            <text:p>ITEM:</text:p>
          </table:table-cell>
          <table:table-cell table:style-name="ce83" office:value-type="string" calcext:value-type="string" table:number-columns-spanned="5" table:number-rows-spanned="1">
            <text:p>SELEÇÃO, VERIFICAÇÃO E VALIDAÇÃO DE MÉTODOS</text:p>
          </table:table-cell>
          <table:covered-table-cell table:number-columns-repeated="4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4">
          <table:table-cell table:style-name="ce2"/>
          <table:table-cell table:style-name="ce1"/>
          <table:table-cell table:style-name="ce85" office:value-type="string" calcext:value-type="string" table:number-columns-spanned="9" table:number-rows-spanned="1">
            <text:p>CALIBRAÇÃO DE MEDIDOR DE PRESSÃO ANALÓGICA – DIGITAL</text:p>
          </table:table-cell>
          <table:covered-table-cell table:number-columns-repeated="8"/>
          <table:table-cell table:style-name="ce1"/>
          <table:table-cell table:style-name="ce525" table:number-columns-repeated="3"/>
          <table:table-cell table:style-name="ce1" table:number-columns-repeated="5"/>
          <table:table-cell table:style-name="ce4" table:number-columns-repeated="44"/>
          <table:table-cell table:style-name="ce5" table:number-columns-repeated="19"/>
          <table:table-cell table:style-name="ce1" table:number-columns-repeated="16301"/>
        </table:table-row>
        <table:table-row table:style-name="ro5">
          <table:table-cell table:style-name="ce2"/>
          <table:table-cell table:style-name="ce1"/>
          <table:table-cell table:style-name="ce312" office:value-type="string" calcext:value-type="string" table:number-columns-spanned="3" table:number-rows-spanned="1">
            <text:p>DOCUMENTO</text:p>
          </table:table-cell>
          <table:covered-table-cell table:number-columns-repeated="2"/>
          <table:table-cell table:style-name="ce312" office:value-type="string" calcext:value-type="string" table:number-columns-spanned="2" table:number-rows-spanned="1">
            <text:p>REVISÃO</text:p>
          </table:table-cell>
          <table:covered-table-cell/>
          <table:table-cell table:style-name="ce312" office:value-type="string" calcext:value-type="string" table:number-columns-spanned="2" table:number-rows-spanned="1">
            <text:p>APROVADO EM</text:p>
          </table:table-cell>
          <table:covered-table-cell/>
          <table:table-cell table:style-name="ce312" office:value-type="string" calcext:value-type="string" table:number-columns-spanned="2" table:number-rows-spanned="1">
            <text:p>FOLHA</text:p>
          </table:table-cell>
          <table:covered-table-cell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5">
          <table:table-cell table:style-name="ce2"/>
          <table:table-cell table:style-name="ce1"/>
          <table:table-cell table:style-name="ce345" office:value-type="string" calcext:value-type="string" table:number-columns-spanned="3" table:number-rows-spanned="1">
            <text:p>CCDS-009</text:p>
          </table:table-cell>
          <table:covered-table-cell table:number-columns-repeated="2"/>
          <table:table-cell table:style-name="ce345" office:value-type="string" calcext:value-type="string" table:number-columns-spanned="2" table:number-rows-spanned="1">
            <text:p>00</text:p>
          </table:table-cell>
          <table:covered-table-cell/>
          <table:table-cell table:style-name="ce88" office:value-type="date" office:date-value="2023-09-10" calcext:value-type="date" table:number-columns-spanned="2" table:number-rows-spanned="1">
            <text:p>10/09/2023</text:p>
          </table:table-cell>
          <table:covered-table-cell/>
          <table:table-cell table:style-name="ce345" office:value-type="string" calcext:value-type="string" table:number-columns-spanned="2" table:number-rows-spanned="1">
            <text:p>01/01</text:p>
          </table:table-cell>
          <table:covered-table-cell/>
          <table:table-cell table:style-name="ce1"/>
          <table:table-cell table:style-name="ce525" table:number-columns-repeated="2"/>
          <table:table-cell table:style-name="ce537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5">
          <table:table-cell/>
          <table:table-cell table:style-name="ce1" table:number-columns-repeated="2"/>
          <table:table-cell table:style-name="ce378" table:number-columns-spanned="8" table:number-rows-spanned="1"/>
          <table:covered-table-cell table:number-columns-repeated="7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8" table:number-columns-repeated="45"/>
          <table:table-cell table:number-columns-repeated="19"/>
          <table:table-cell table:style-name="ce1" table:number-columns-repeated="16301"/>
        </table:table-row>
        <table:table-row table:style-name="ro5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'</text:p>
          </table:table-cell>
          <table:covered-table-cell table:number-columns-repeated="8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1" office:value-type="string" calcext:value-type="string" table:number-columns-spanned="2" table:number-rows-spanned="1">
            <text:p>Ordem Serviço:</text:p>
          </table:table-cell>
          <table:covered-table-cell/>
          <table:table-cell table:style-name="ce404" office:value-type="string" calcext:value-type="string">
            <text:p>K6U1K4</text:p>
          </table:table-cell>
          <table:table-cell table:style-name="ce362" office:value-type="string" calcext:value-type="string" table:number-columns-spanned="2" table:number-rows-spanned="1">
            <text:p>Número do certificado:</text:p>
          </table:table-cell>
          <table:covered-table-cell/>
          <table:table-cell table:style-name="ce12" office:value-type="string" calcext:value-type="string">
            <text:p>DSC -</text:p>
          </table:table-cell>
          <table:table-cell table:style-name="ce12" table:formula="of:=[.E9]" office:value-type="string" office:string-value="K6U1K4" calcext:value-type="string">
            <text:p>K6U1K4</text:p>
          </table:table-cell>
          <table:table-cell table:style-name="ce404" table:content-validation-name="val10" office:value-type="string" calcext:value-type="string">
            <text:p>- 02</text:p>
          </table:table-cell>
          <table:table-cell table:style-name="ce13" table:formula="of:=YEAR([.E11])" office:value-type="float" office:value="2026" calcext:value-type="float">
            <text:p>2026</text:p>
          </table:table-cell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1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Data calibração:</text:p>
          </table:table-cell>
          <table:covered-table-cell/>
          <table:table-cell table:style-name="ce94" office:value-type="date" office:date-value="2026-04-17" calcext:value-type="date" table:number-columns-spanned="2" table:number-rows-spanned="1">
            <text:p>17/04/2026</text:p>
          </table:table-cell>
          <table:covered-table-cell/>
          <table:table-cell table:style-name="ce362" office:value-type="string" calcext:value-type="string" table:number-columns-spanned="2" table:number-rows-spanned="1">
            <text:p><text:s text:c="3"/>Data da Emissão:</text:p>
          </table:table-cell>
          <table:covered-table-cell/>
          <table:table-cell table:style-name="ce14" office:value-type="date" office:date-value="2026-04-23" calcext:value-type="date">
            <text:p>23/04/2026</text:p>
          </table:table-cell>
          <table:table-cell table:style-name="ce15" office:value-type="string" calcext:value-type="string">
            <text:p>Revisão:</text:p>
          </table:table-cell>
          <table:table-cell table:style-name="ce16" table:content-validation-name="val11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Local da calibração:</text:p>
          </table:table-cell>
          <table:covered-table-cell/>
          <table:table-cell table:style-name="ce94" table:content-validation-name="val2" office:value-type="string" calcext:value-type="string" table:number-columns-spanned="7" table:number-rows-spanned="1">
            <text:p>IN LOCO- SERVIÇO EXECUTADO NAS DEPENDÊNCIAS DO CLIENTE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2"/>
          <table:table-cell table:style-name="ce378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INFORMAÇÕES DO CONTRATANTE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362" office:value-type="string" calcext:value-type="string" table:number-columns-spanned="2" table:number-rows-spanned="1">
            <text:p>Contratante:</text:p>
          </table:table-cell>
          <table:covered-table-cell/>
          <table:table-cell table:style-name="ce95" office:value-type="string" calcext:value-type="string" table:number-columns-spanned="7" table:number-rows-spanned="1">
            <text:p>BBOSCH GALVANIZAÇÃO DO BRASIL LTDA.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362" office:value-type="string" calcext:value-type="string" table:number-columns-spanned="2" table:number-rows-spanned="1">
            <text:p>Endereço:</text:p>
          </table:table-cell>
          <table:covered-table-cell/>
          <table:table-cell table:style-name="ce95" office:value-type="string" calcext:value-type="string" table:number-columns-spanned="7" table:number-rows-spanned="1">
            <text:p>AV. ENG. JOÃO FERNANDES G. MOLINA, 50 – DISTRITO <text:s/>INDUSTRIAL – JUNDIAÍ-SP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2"/>
          <table:table-cell table:style-name="ce378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INFORMAÇÕES DO CLIENTE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362" office:value-type="string" calcext:value-type="string" table:number-columns-spanned="2" table:number-rows-spanned="1">
            <text:p>Cliente:</text:p>
          </table:table-cell>
          <table:covered-table-cell/>
          <table:table-cell table:style-name="ce397" table:number-columns-spanned="7" table:number-rows-spanned="1"/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362" office:value-type="string" calcext:value-type="string" table:number-columns-spanned="2" table:number-rows-spanned="1">
            <text:p>Endereço:</text:p>
          </table:table-cell>
          <table:covered-table-cell/>
          <table:table-cell table:style-name="ce397" table:number-columns-spanned="7" table:number-rows-spanned="1"/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2"/>
          <table:table-cell table:style-name="ce378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7" office:value-type="string" calcext:value-type="string" table:number-columns-spanned="9" table:number-rows-spanned="1">
            <text:p><text:s text:c="3"/>INFORMAÇÕES DO EQUIPAMENTO CALIBRADO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Instrumento calibrado:</text:p>
          </table:table-cell>
          <table:covered-table-cell/>
          <table:table-cell table:style-name="ce1"/>
          <table:table-cell table:style-name="ce17" table:content-validation-name="val5" office:value-type="string" calcext:value-type="string" table:number-columns-spanned="3" table:number-rows-spanned="1">
            <text:p>MANÔMETRO ANALÓGICO</text:p>
          </table:table-cell>
          <table:covered-table-cell table:number-columns-repeated="2"/>
          <table:table-cell table:style-name="ce18" office:value-type="string" calcext:value-type="string">
            <text:p>N° identificação:</text:p>
          </table:table-cell>
          <table:table-cell table:style-name="ce99" office:value-type="string" calcext:value-type="string" table:number-columns-spanned="2" table:number-rows-spanned="1">
            <text:p>BBGB-286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Marca:</text:p>
          </table:table-cell>
          <table:covered-table-cell/>
          <table:table-cell table:style-name="ce17" office:value-type="string" calcext:value-type="string">
            <text:p>PROSTEC</text:p>
          </table:table-cell>
          <table:table-cell table:style-name="ce12" office:value-type="string" calcext:value-type="string">
            <text:p>Modelo:</text:p>
          </table:table-cell>
          <table:table-cell table:style-name="ce99" office:value-type="string" calcext:value-type="string" table:number-columns-spanned="2" table:number-rows-spanned="1">
            <text:p>NÃO CONSTA</text:p>
          </table:table-cell>
          <table:covered-table-cell/>
          <table:table-cell table:style-name="ce12" office:value-type="string" calcext:value-type="string">
            <text:p>N° série:</text:p>
          </table:table-cell>
          <table:table-cell table:style-name="ce99" office:value-type="string" calcext:value-type="string" table:number-columns-spanned="2" table:number-rows-spanned="1">
            <text:p>NÃO CONSTA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Faixa de Indicação:</text:p>
          </table:table-cell>
          <table:covered-table-cell/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9" office:value-type="float" office:value="7" calcext:value-type="float">
            <text:p>7</text:p>
          </table:table-cell>
          <table:table-cell table:style-name="ce362" office:value-type="string" calcext:value-type="string" table:number-columns-spanned="1" table:number-rows-spanned="2">
            <text:p>Resolução:</text:p>
          </table:table-cell>
          <table:table-cell table:style-name="ce100" table:content-validation-name="val9" office:value-type="float" office:value="0.1" calcext:value-type="float" table:number-columns-spanned="1" table:number-rows-spanned="2">
            <text:p>0,100</text:p>
          </table:table-cell>
          <table:table-cell table:style-name="ce362" office:value-type="string" calcext:value-type="string" table:number-columns-spanned="1" table:number-rows-spanned="2">
            <text:p>Unidade:</text:p>
          </table:table-cell>
          <table:table-cell table:style-name="ce17" table:content-validation-name="val1" office:value-type="string" calcext:value-type="string" table:number-columns-spanned="1" table:number-rows-spanned="2">
            <text:p>kgf/cm2</text:p>
          </table:table-cell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Faixa de Calibração:</text:p>
          </table:table-cell>
          <table:covered-table-cell/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9" office:value-type="float" office:value="7" calcext:value-type="float">
            <text:p>7</text:p>
          </table:table-cell>
          <table:covered-table-cell table:number-columns-repeated="4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Indicação:</text:p>
          </table:table-cell>
          <table:covered-table-cell/>
          <table:table-cell table:style-name="ce17" table:content-validation-name="val3" office:value-type="string" calcext:value-type="string" table:number-columns-spanned="2" table:number-rows-spanned="1">
            <text:p>ANALÓGICO</text:p>
          </table:table-cell>
          <table:covered-table-cell/>
          <table:table-cell table:style-name="ce362" office:value-type="string" calcext:value-type="string" table:number-columns-spanned="2" table:number-rows-spanned="1">
            <text:p>Classe Declarada:</text:p>
          </table:table-cell>
          <table:covered-table-cell/>
          <table:table-cell table:style-name="ce17" office:value-type="string" calcext:value-type="string">
            <text:p>B</text:p>
          </table:table-cell>
          <table:table-cell table:style-name="ce101" table:number-columns-spanned="2" table:number-rows-spanned="1"/>
          <table:covered-table-cell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20" table:number-columns-repeated="16301"/>
        </table:table-row>
        <table:table-row table:style-name="ro6">
          <table:table-cell table:style-name="ce9"/>
          <table:table-cell table:style-name="ce1" table:number-columns-repeated="2"/>
          <table:table-cell table:style-name="ce378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20" table:number-columns-repeated="16301"/>
        </table:table-row>
        <table:table-row table:style-name="ro6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<text:s text:c="3"/>PROCEDIMENTO DE CALIBRAÇÃO UTILIZADO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20" table:number-columns-repeated="16301"/>
        </table:table-row>
        <table:table-row table:style-name="ro6">
          <table:table-cell table:style-name="ce9"/>
          <table:table-cell table:style-name="ce1"/>
          <table:table-cell table:style-name="ce102" office:value-type="string" calcext:value-type="string" table:number-columns-spanned="2" table:number-rows-spanned="1">
            <text:p><text:s text:c="3"/>Número:</text:p>
          </table:table-cell>
          <table:covered-table-cell/>
          <table:table-cell table:style-name="ce409" office:value-type="string" calcext:value-type="string" table:number-columns-spanned="3" table:number-rows-spanned="1">
            <text:p>PDS-019</text:p>
          </table:table-cell>
          <table:covered-table-cell table:number-columns-repeated="2"/>
          <table:table-cell table:style-name="ce102" office:value-type="string" calcext:value-type="string" table:number-columns-spanned="2" table:number-rows-spanned="1">
            <text:p>Revisão:</text:p>
          </table:table-cell>
          <table:covered-table-cell/>
          <table:table-cell table:style-name="ce409" office:value-type="string" calcext:value-type="string" table:number-columns-spanned="2" table:number-rows-spanned="1">
            <text:p>00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20" table:number-columns-repeated="16301"/>
        </table:table-row>
        <table:table-row table:style-name="ro6">
          <table:table-cell table:style-name="ce9"/>
          <table:table-cell table:style-name="ce1" table:number-columns-repeated="2"/>
          <table:table-cell table:style-name="ce378" table:number-columns-spanned="8" table:number-rows-spanned="1"/>
          <table:covered-table-cell table:number-columns-repeated="7"/>
          <table:table-cell table:style-name="ce1" table:number-columns-repeated="8"/>
          <table:table-cell table:style-name="ce20" table:number-columns-repeated="16365"/>
        </table:table-row>
        <table:table-row table:style-name="ro6">
          <table:table-cell table:style-name="ce9"/>
          <table:table-cell table:style-name="ce1"/>
          <table:table-cell table:style-name="ce97" office:value-type="string" calcext:value-type="string" table:number-columns-spanned="9" table:number-rows-spanned="1">
            <text:p><text:s text:c="3"/>DADOS DOS PADRÕES UTILIZADOS</text:p>
          </table:table-cell>
          <table:covered-table-cell table:number-columns-repeated="8"/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102" office:value-type="string" calcext:value-type="string" table:number-columns-spanned="2" table:number-rows-spanned="1">
            <text:p>Padrão de Pressão:</text:p>
          </table:table-cell>
          <table:covered-table-cell/>
          <table:table-cell table:style-name="ce410" table:content-validation-name="val4" office:value-type="string" calcext:value-type="string">
            <text:p>DSP-010</text:p>
          </table:table-cell>
          <table:table-cell table:style-name="ce104" office:value-type="string" calcext:value-type="string" table:number-columns-spanned="2" table:number-rows-spanned="1">
            <text:p>Faixa de:</text:p>
          </table:table-cell>
          <table:covered-table-cell/>
          <table:table-cell table:style-name="ce22" table:formula="of:=[Incerteza.N119]" office:value-type="float" office:value="0" calcext:value-type="float">
            <text:p>0</text:p>
          </table:table-cell>
          <table:table-cell table:style-name="ce582" office:value-type="string" calcext:value-type="string">
            <text:p>até</text:p>
          </table:table-cell>
          <table:table-cell table:style-name="ce22" table:formula="of:=[Incerteza.O119]" office:value-type="float" office:value="40" calcext:value-type="float">
            <text:p>40</text:p>
          </table:table-cell>
          <table:table-cell table:style-name="ce22" table:formula="of:=[$Incerteza.X119]" office:value-type="string" office:string-value="kgf/cm2" calcext:value-type="string">
            <text:p>kgf/cm2</text:p>
          </table:table-cell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105" office:value-type="string" calcext:value-type="string" table:number-columns-spanned="2" table:number-rows-spanned="1">
            <text:p>Tipo de Padrão:</text:p>
          </table:table-cell>
          <table:covered-table-cell/>
          <table:table-cell table:style-name="ce24" table:formula="of:=[$Incerteza.U119]" office:value-type="string" office:string-value="Digital" calcext:value-type="string">
            <text:p>Digital</text:p>
          </table:table-cell>
          <table:table-cell table:style-name="ce102" office:value-type="string" calcext:value-type="string" table:number-columns-spanned="2" table:number-rows-spanned="1">
            <text:p>Higrômetro Ambiente :</text:p>
          </table:table-cell>
          <table:covered-table-cell/>
          <table:table-cell table:style-name="ce410" table:content-validation-name="val7" office:value-type="string" calcext:value-type="string">
            <text:p>DSP-022</text:p>
          </table:table-cell>
          <table:table-cell table:style-name="ce102" office:value-type="string" calcext:value-type="string" table:number-columns-spanned="2" table:number-rows-spanned="1">
            <text:p>Termômetro Ambiente:</text:p>
          </table:table-cell>
          <table:covered-table-cell/>
          <table:table-cell table:style-name="ce410" table:content-validation-name="val7" office:value-type="string" calcext:value-type="string">
            <text:p>DSP-022</text:p>
          </table:table-cell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366" table:formula="of:=IF([Incerteza.AB122]&lt;=0;&quot;PADRÕES VENCIDOS&quot;;&quot;PADRÕES EM DIA&quot;)" office:value-type="string" office:string-value="PADRÕES EM DIA" calcext:value-type="string" table:number-columns-spanned="9" table:number-rows-spanned="2">
            <text:p>PADRÕES EM DIA</text:p>
          </table:table-cell>
          <table:covered-table-cell table:number-columns-repeated="8"/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covered-table-cell table:number-columns-repeated="9"/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107" table:number-columns-spanned="8" table:number-rows-spanned="1"/>
          <table:covered-table-cell table:number-columns-repeated="7"/>
          <table:table-cell table:style-name="ce1" table:number-columns-repeated="9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108" office:value-type="string" calcext:value-type="string" table:number-columns-spanned="9" table:number-rows-spanned="1">
            <text:p>DADOS DAS CONDIÇÕES AMBIENTAIS DA CALIBRAÇÃO</text:p>
          </table:table-cell>
          <table:covered-table-cell table:number-columns-repeated="8"/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362" office:value-type="string" calcext:value-type="string" table:number-columns-spanned="3" table:number-rows-spanned="1">
            <text:p>Temperatura ambiente: <text:s/></text:p>
          </table:table-cell>
          <table:covered-table-cell table:number-columns-repeated="2"/>
          <table:table-cell table:style-name="ce362" office:value-type="string" calcext:value-type="string" table:number-columns-spanned="2" table:number-rows-spanned="1">
            <text:p><text:s/>inicial:</text:p>
          </table:table-cell>
          <table:covered-table-cell/>
          <table:table-cell table:style-name="ce17" office:value-type="float" office:value="23" calcext:value-type="float">
            <text:p>23</text:p>
          </table:table-cell>
          <table:table-cell table:style-name="ce102" office:value-type="string" calcext:value-type="string" table:number-columns-spanned="2" table:number-rows-spanned="1">
            <text:p>final:</text:p>
          </table:table-cell>
          <table:covered-table-cell/>
          <table:table-cell table:style-name="ce17" office:value-type="float" office:value="23" calcext:value-type="float">
            <text:p>23</text:p>
          </table:table-cell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362" office:value-type="string" calcext:value-type="string" table:number-columns-spanned="3" table:number-rows-spanned="1">
            <text:p>Umidade ambiente: <text:s/></text:p>
          </table:table-cell>
          <table:covered-table-cell table:number-columns-repeated="2"/>
          <table:table-cell table:style-name="ce362" office:value-type="string" calcext:value-type="string" table:number-columns-spanned="2" table:number-rows-spanned="1">
            <text:p><text:s/>inicial:</text:p>
          </table:table-cell>
          <table:covered-table-cell/>
          <table:table-cell table:style-name="ce17" office:value-type="float" office:value="55" calcext:value-type="float">
            <text:p>55</text:p>
          </table:table-cell>
          <table:table-cell table:style-name="ce102" office:value-type="string" calcext:value-type="string" table:number-columns-spanned="2" table:number-rows-spanned="1">
            <text:p>final:</text:p>
          </table:table-cell>
          <table:covered-table-cell/>
          <table:table-cell table:style-name="ce17" office:value-type="float" office:value="50" calcext:value-type="float">
            <text:p>50</text:p>
          </table:table-cell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86" table:number-columns-spanned="8" table:number-rows-spanned="1"/>
          <table:covered-table-cell table:number-columns-repeated="7"/>
          <table:table-cell table:style-name="ce86" table:number-columns-spanned="9" table:number-rows-spanned="1"/>
          <table:covered-table-cell table:number-columns-repeated="8"/>
          <table:table-cell table:style-name="ce9" table:number-columns-repeated="3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26"/>
          <table:table-cell table:style-name="ce9" table:number-columns-repeated="7"/>
          <table:table-cell table:style-name="ce27" table:number-columns-repeated="9"/>
          <table:table-cell table:style-name="ce9" table:number-columns-repeated="3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10" office:value-type="string" calcext:value-type="string" table:number-columns-spanned="13" table:number-rows-spanned="1">
            <text:p>DADOS DA CALIBRAÇÃO</text:p>
          </table:table-cell>
          <table:covered-table-cell table:number-columns-repeated="12"/>
          <table:table-cell table:style-name="ce111" office:value-type="string" calcext:value-type="string" table:number-columns-spanned="3" table:number-rows-spanned="1">
            <text:p>CRITÉRIOS DE ACEITAÇÃO</text:p>
          </table:table-cell>
          <table:covered-table-cell table:number-columns-repeated="2"/>
          <table:table-cell table:style-name="ce1"/>
          <table:table-cell table:style-name="ce9" table:number-columns-repeated="3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12" office:value-type="string" calcext:value-type="string" table:number-columns-spanned="1" table:number-rows-spanned="2">
            <text:p>Unidades SI</text:p>
          </table:table-cell>
          <table:table-cell table:style-name="ce370" office:value-type="string" calcext:value-type="string" table:number-columns-spanned="6" table:number-rows-spanned="1">
            <text:p>CICLO 1</text:p>
          </table:table-cell>
          <table:covered-table-cell table:number-columns-repeated="5"/>
          <table:table-cell table:style-name="ce370" office:value-type="string" calcext:value-type="string" table:number-columns-spanned="6" table:number-rows-spanned="1">
            <text:p>CICLO 2</text:p>
          </table:table-cell>
          <table:covered-table-cell table:number-columns-repeated="5"/>
          <table:table-cell table:style-name="ce114" office:value-type="string" calcext:value-type="string" table:number-columns-spanned="2" table:number-rows-spanned="1">
            <text:p>Definição</text:p>
          </table:table-cell>
          <table:covered-table-cell/>
          <table:table-cell table:style-name="ce472" table:content-validation-name="val13" office:value-type="string" calcext:value-type="string">
            <text:p>FABRICANTE</text:p>
          </table:table-cell>
          <table:table-cell table:style-name="ce1" table:number-columns-repeated="6"/>
          <table:table-cell table:style-name="ce10" table:number-columns-repeated="41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covered-table-cell/>
          <table:table-cell table:style-name="ce115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6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5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6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32" office:value-type="string" calcext:value-type="string">
            <text:p>Unidade</text:p>
          </table:table-cell>
          <table:table-cell table:style-name="ce32" office:value-type="string" calcext:value-type="string">
            <text:p>Critério</text:p>
          </table:table-cell>
          <table:table-cell table:style-name="ce33" office:value-type="string" calcext:value-type="string">
            <text:p>Tip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34" table:content-validation-name="val1" office:value-type="string" calcext:value-type="string">
            <text:p>kgf/cm2</text:p>
          </table:table-cell>
          <table:table-cell table:style-name="ce29" table:formula="of:=[.$K$33]" office:value-type="string" office:string-value="kgf/cm2" calcext:value-type="string">
            <text:p>kgf/cm2</text:p>
          </table:table-cell>
          <table:table-cell table:style-name="ce29" table:formula="of:=[.$K$25]" office:value-type="string" office:string-value="kgf/cm2" calcext:value-type="string">
            <text:p>kgf/cm2</text:p>
          </table:table-cell>
          <table:table-cell table:style-name="ce24" table:formula="of:=[.$K$25]" office:value-type="string" office:string-value="kgf/cm2" calcext:value-type="string">
            <text:p>kgf/cm2</text:p>
          </table:table-cell>
          <table:table-cell table:style-name="ce31" table:formula="of:=[.$K$33]" office:value-type="string" office:string-value="kgf/cm2" calcext:value-type="string">
            <text:p>kgf/cm2</text:p>
          </table:table-cell>
          <table:table-cell table:style-name="ce31" table:formula="of:=[.$K$25]" office:value-type="string" office:string-value="kgf/cm2" calcext:value-type="string">
            <text:p>kgf/cm2</text:p>
          </table:table-cell>
          <table:table-cell table:style-name="ce24" table:formula="of:=[.$K$25]" office:value-type="string" office:string-value="kgf/cm2" calcext:value-type="string">
            <text:p>kgf/cm2</text:p>
          </table:table-cell>
          <table:table-cell table:style-name="ce29" table:formula="of:=[.$K$33]" office:value-type="string" office:string-value="kgf/cm2" calcext:value-type="string">
            <text:p>kgf/cm2</text:p>
          </table:table-cell>
          <table:table-cell table:style-name="ce29" table:formula="of:=[.$K$25]" office:value-type="string" office:string-value="kgf/cm2" calcext:value-type="string">
            <text:p>kgf/cm2</text:p>
          </table:table-cell>
          <table:table-cell table:style-name="ce24" table:formula="of:=[.$K$25]" office:value-type="string" office:string-value="kgf/cm2" calcext:value-type="string">
            <text:p>kgf/cm2</text:p>
          </table:table-cell>
          <table:table-cell table:style-name="ce31" table:formula="of:=[.$K$33]" office:value-type="string" office:string-value="kgf/cm2" calcext:value-type="string">
            <text:p>kgf/cm2</text:p>
          </table:table-cell>
          <table:table-cell table:style-name="ce31" table:formula="of:=[.$K$25]" office:value-type="string" office:string-value="kgf/cm2" calcext:value-type="string">
            <text:p>kgf/cm2</text:p>
          </table:table-cell>
          <table:table-cell table:style-name="ce24" table:formula="of:=[.$K$25]" office:value-type="string" office:string-value="kgf/cm2" calcext:value-type="string">
            <text:p>kgf/cm2</text:p>
          </table:table-cell>
          <table:table-cell table:style-name="ce472" table:content-validation-name="val12" office:value-type="string" calcext:value-type="string">
            <text:p>%</text:p>
          </table:table-cell>
          <table:table-cell table:style-name="ce28" office:value-type="float" office:value="5" calcext:value-type="float">
            <text:p>5</text:p>
          </table:table-cell>
          <table:table-cell table:style-name="ce472" table:content-validation-name="val14" office:value-type="string" calcext:value-type="string">
            <text:p>Err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35" table:formula="of:=IF([.$D$46]=&quot;&quot;;&quot;&quot;;IF([.$D$46]=&quot;Pa&quot;;1;IF([.$D$46]=&quot;hPa&quot;;[$Incerteza.$AB$5];IF([.$D$46]=&quot;kPa&quot;;[$Incerteza.$AB$6];IF([.$D$46]=&quot;bar&quot;;[$Incerteza.$AB$7];IF([.$D$46]=&quot;mbar&quot;;[$Incerteza.$AB$8];IF([.$D$46]=&quot;psi&quot;;a46$incerteza.$ab$9;IF([.$D$46]=&quot;kgf/cm2&quot;;[$Incerteza.$AB$10];IF([.$D$46]=&quot;mm Hg&quot;;[$Incerteza.$AB$11];IF([.$D$46]=&quot;m H2O&quot;;[$Incerteza.$AB$12];&quot;&quot;))))))))))" office:value-type="float" office:value="98066.5" calcext:value-type="float">
            <text:p>9,807E+04</text:p>
          </table:table-cell>
          <table:table-cell table:style-name="ce370" office:value-type="string" calcext:value-type="string" table:number-columns-spanned="3" table:number-rows-spanned="1">
            <text:p>Crescente 1</text:p>
          </table:table-cell>
          <table:covered-table-cell table:number-columns-repeated="2"/>
          <table:table-cell table:style-name="ce117" office:value-type="string" calcext:value-type="string" table:number-columns-spanned="3" table:number-rows-spanned="1">
            <text:p>Decrescente 1</text:p>
          </table:table-cell>
          <table:covered-table-cell table:number-columns-repeated="2"/>
          <table:table-cell table:style-name="ce370" office:value-type="string" calcext:value-type="string" table:number-columns-spanned="3" table:number-rows-spanned="1">
            <text:p>Crescente 2</text:p>
          </table:table-cell>
          <table:covered-table-cell table:number-columns-repeated="2"/>
          <table:table-cell table:style-name="ce117" office:value-type="string" calcext:value-type="string" table:number-columns-spanned="3" table:number-rows-spanned="1">
            <text:p>Decrescente 2</text:p>
          </table:table-cell>
          <table:covered-table-cell table:number-columns-repeated="2"/>
          <table:table-cell table:style-name="ce36" table:formula="of:=IF([.$Q$46]=&quot;&quot;;&quot;&quot;;IF([.Q46]=&quot;Erro&quot;;&quot;Erro Absoluto&quot;;[.$Q$46]))" office:value-type="string" office:string-value="Erro Absoluto" calcext:value-type="string">
            <text:p>Erro Absoluto</text:p>
          </table:table-cell>
          <table:table-cell table:style-name="ce36" office:value-type="string" calcext:value-type="string">
            <text:p>Critério</text:p>
          </table:table-cell>
          <table:table-cell table:style-name="ce36" office:value-type="string" calcext:value-type="string">
            <text:p>Result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1" calcext:value-type="float">
            <text:p>1</text:p>
          </table:table-cell>
          <table:table-cell table:style-name="ce38" table:formula="of:=IF(OR([.B72]=&quot;&quot;;[.$B$47]=&quot;&quot;);&quot;&quot;;[.B72]*[.$B$47])" office:value-type="float" office:value="0" calcext:value-type="float">
            <text:p>0,000E+00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table:formula="of:=IF([.C48]=&quot;&quot;;&quot;&quot;;[.C48]/[.$N$61])" office:value-type="float" office:value="0" calcext:value-type="float">
            <text:p>0,00</text:p>
          </table:table-cell>
          <table:table-cell table:style-name="ce41" office:value-type="float" office:value="0.01" calcext:value-type="float">
            <text:p>0,01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table:formula="of:=IF([.F48]=&quot;&quot;;&quot;&quot;;[.F48]/[.$N$61])" office:value-type="float" office:value="0" calcext:value-type="float">
            <text:p>0,00</text:p>
          </table:table-cell>
          <table:table-cell table:style-name="ce39" office:value-type="float" office:value="0" calcext:value-type="float">
            <text:p>0,00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table:formula="of:=IF([.I48]=&quot;&quot;;&quot;&quot;;[.I48]/[.$N$61])" office:value-type="float" office:value="0" calcext:value-type="float">
            <text:p>0,00</text:p>
          </table:table-cell>
          <table:table-cell table:style-name="ce41" office:value-type="float" office:value="0" calcext:value-type="float">
            <text:p>0,00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table:formula="of:=IF([.L48]=&quot;&quot;;&quot;&quot;;[.L48]/[.$N$61])" office:value-type="float" office:value="0" calcext:value-type="float">
            <text:p>0,00</text:p>
          </table:table-cell>
          <table:table-cell table:style-name="ce39" office:value-type="float" office:value="0" calcext:value-type="float">
            <text:p>0,00</text:p>
          </table:table-cell>
          <table:table-cell table:style-name="ce42" table:formula="of:=IF([.E72]=&quot;&quot;;&quot;&quot;;IF([.$Q$46]=&quot;Erro&quot;;ABS([.H72]);ABS([.H72]+[.Q72])))" office:value-type="float" office:value="0.0025" calcext:value-type="float">
            <text:p>0,0025</text:p>
          </table:table-cell>
          <table:table-cell table:style-name="ce43" table:formula="of:=IF([.E72]=&quot;&quot;;&quot;&quot;;IF([.$O$46]=&quot;%&quot;;[.$P$46]*[.E72]/100;[.$P$46]))" office:value-type="float" office:value="0.000125" calcext:value-type="float">
            <text:p>0,00</text:p>
          </table:table-cell>
          <table:table-cell table:style-name="ce645" table:formula="of:=IF([.O48]=&quot;&quot;;&quot;&quot;;IF([.O48]&gt;[.P48];&quot;Reprovado&quot;;&quot;Aprovado&quot;))" office:value-type="string" office:string-value="Reprovado" calcext:value-type="string">
            <text:p>Reprov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2" calcext:value-type="float">
            <text:p>2</text:p>
          </table:table-cell>
          <table:table-cell table:style-name="ce38" table:formula="of:=IF(OR([.B73]=&quot;&quot;;[.$B$47]=&quot;&quot;);&quot;&quot;;[.B73]*[.$B$47])" office:value-type="float" office:value="98066.5" calcext:value-type="float">
            <text:p>9,807E+04</text:p>
          </table:table-cell>
          <table:table-cell table:style-name="ce374" office:value-type="float" office:value="1" calcext:value-type="float">
            <text:p>1,000</text:p>
          </table:table-cell>
          <table:table-cell table:style-name="ce40" table:formula="of:=IF([.C49]=&quot;&quot;;&quot;&quot;;[.C49]/[.$N$61])" office:value-type="float" office:value="1" calcext:value-type="float">
            <text:p>1,00</text:p>
          </table:table-cell>
          <table:table-cell table:style-name="ce41" office:value-type="float" office:value="1.01" calcext:value-type="float">
            <text:p>1,01</text:p>
          </table:table-cell>
          <table:table-cell table:style-name="ce374" office:value-type="float" office:value="1" calcext:value-type="float">
            <text:p>1,000</text:p>
          </table:table-cell>
          <table:table-cell table:style-name="ce40" table:formula="of:=IF([.F49]=&quot;&quot;;&quot;&quot;;[.F49]/[.$N$61])" office:value-type="float" office:value="1" calcext:value-type="float">
            <text:p>1,00</text:p>
          </table:table-cell>
          <table:table-cell table:style-name="ce39" office:value-type="float" office:value="1.01" calcext:value-type="float">
            <text:p>1,01</text:p>
          </table:table-cell>
          <table:table-cell table:style-name="ce374" office:value-type="float" office:value="1" calcext:value-type="float">
            <text:p>1,000</text:p>
          </table:table-cell>
          <table:table-cell table:style-name="ce40" table:formula="of:=IF([.I49]=&quot;&quot;;&quot;&quot;;[.I49]/[.$N$61])" office:value-type="float" office:value="1" calcext:value-type="float">
            <text:p>1,00</text:p>
          </table:table-cell>
          <table:table-cell table:style-name="ce41" office:value-type="float" office:value="1.01" calcext:value-type="float">
            <text:p>1,01</text:p>
          </table:table-cell>
          <table:table-cell table:style-name="ce374" office:value-type="float" office:value="1" calcext:value-type="float">
            <text:p>1,000</text:p>
          </table:table-cell>
          <table:table-cell table:style-name="ce40" table:formula="of:=IF([.L49]=&quot;&quot;;&quot;&quot;;[.L49]/[.$N$61])" office:value-type="float" office:value="1" calcext:value-type="float">
            <text:p>1,00</text:p>
          </table:table-cell>
          <table:table-cell table:style-name="ce39" office:value-type="float" office:value="1.01" calcext:value-type="float">
            <text:p>1,01</text:p>
          </table:table-cell>
          <table:table-cell table:style-name="ce42" table:formula="of:=IF([.E73]=&quot;&quot;;&quot;&quot;;IF([.$Q$46]=&quot;Erro&quot;;ABS([.H73]);ABS([.H73]+[.Q73])))" office:value-type="float" office:value="0.01" calcext:value-type="float">
            <text:p>0,01</text:p>
          </table:table-cell>
          <table:table-cell table:style-name="ce43" table:formula="of:=IF([.E73]=&quot;&quot;;&quot;&quot;;IF([.$O$46]=&quot;%&quot;;[.$P$46]*[.E73]/100;[.$P$46]))" office:value-type="float" office:value="0.0505" calcext:value-type="float">
            <text:p>0,05</text:p>
          </table:table-cell>
          <table:table-cell table:style-name="ce645" table:formula="of:=IF([.O49]=&quot;&quot;;&quot;&quot;;IF([.O49]&gt;[.P49];&quot;Reprovado&quot;;&quot;Aprovado&quot;))" office:value-type="string" office:string-value="Aprovado" calcext:value-type="string">
            <text:p>Aprov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3" calcext:value-type="float">
            <text:p>3</text:p>
          </table:table-cell>
          <table:table-cell table:style-name="ce38" table:formula="of:=IF(OR([.B74]=&quot;&quot;;[.$B$47]=&quot;&quot;);&quot;&quot;;[.B74]*[.$B$47])" office:value-type="float" office:value="294199.5" calcext:value-type="float">
            <text:p>2,942E+05</text:p>
          </table:table-cell>
          <table:table-cell table:style-name="ce374" office:value-type="float" office:value="3" calcext:value-type="float">
            <text:p>3,000</text:p>
          </table:table-cell>
          <table:table-cell table:style-name="ce40" table:formula="of:=IF([.C50]=&quot;&quot;;&quot;&quot;;[.C50]/[.$N$61])" office:value-type="float" office:value="3" calcext:value-type="float">
            <text:p>3,00</text:p>
          </table:table-cell>
          <table:table-cell table:style-name="ce41" office:value-type="float" office:value="3.02" calcext:value-type="float">
            <text:p>3,02</text:p>
          </table:table-cell>
          <table:table-cell table:style-name="ce374" office:value-type="float" office:value="3" calcext:value-type="float">
            <text:p>3,000</text:p>
          </table:table-cell>
          <table:table-cell table:style-name="ce40" table:formula="of:=IF([.F50]=&quot;&quot;;&quot;&quot;;[.F50]/[.$N$61])" office:value-type="float" office:value="3" calcext:value-type="float">
            <text:p>3,00</text:p>
          </table:table-cell>
          <table:table-cell table:style-name="ce39" office:value-type="float" office:value="3.01" calcext:value-type="float">
            <text:p>3,01</text:p>
          </table:table-cell>
          <table:table-cell table:style-name="ce374" office:value-type="float" office:value="3" calcext:value-type="float">
            <text:p>3,000</text:p>
          </table:table-cell>
          <table:table-cell table:style-name="ce40" table:formula="of:=IF([.I50]=&quot;&quot;;&quot;&quot;;[.I50]/[.$N$61])" office:value-type="float" office:value="3" calcext:value-type="float">
            <text:p>3,00</text:p>
          </table:table-cell>
          <table:table-cell table:style-name="ce41" office:value-type="float" office:value="3.02" calcext:value-type="float">
            <text:p>3,02</text:p>
          </table:table-cell>
          <table:table-cell table:style-name="ce374" office:value-type="float" office:value="3" calcext:value-type="float">
            <text:p>3,000</text:p>
          </table:table-cell>
          <table:table-cell table:style-name="ce40" table:formula="of:=IF([.L50]=&quot;&quot;;&quot;&quot;;[.L50]/[.$N$61])" office:value-type="float" office:value="3" calcext:value-type="float">
            <text:p>3,00</text:p>
          </table:table-cell>
          <table:table-cell table:style-name="ce39" office:value-type="float" office:value="3.01" calcext:value-type="float">
            <text:p>3,01</text:p>
          </table:table-cell>
          <table:table-cell table:style-name="ce42" table:formula="of:=IF([.E74]=&quot;&quot;;&quot;&quot;;IF([.$Q$46]=&quot;Erro&quot;;ABS([.H74]);ABS([.H74]+[.Q74])))" office:value-type="float" office:value="0.0150000000000001" calcext:value-type="float">
            <text:p>0,0150000000000001</text:p>
          </table:table-cell>
          <table:table-cell table:style-name="ce43" table:formula="of:=IF([.E74]=&quot;&quot;;&quot;&quot;;IF([.$O$46]=&quot;%&quot;;[.$P$46]*[.E74]/100;[.$P$46]))" office:value-type="float" office:value="0.15075" calcext:value-type="float">
            <text:p>0,15</text:p>
          </table:table-cell>
          <table:table-cell table:style-name="ce645" table:formula="of:=IF([.O50]=&quot;&quot;;&quot;&quot;;IF([.O50]&gt;[.P50];&quot;Reprovado&quot;;&quot;Aprovado&quot;))" office:value-type="string" office:string-value="Aprovado" calcext:value-type="string">
            <text:p>Aprov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4" calcext:value-type="float">
            <text:p>4</text:p>
          </table:table-cell>
          <table:table-cell table:style-name="ce38" table:formula="of:=IF(OR([.B75]=&quot;&quot;;[.$B$47]=&quot;&quot;);&quot;&quot;;[.B75]*[.$B$47])" office:value-type="float" office:value="392266" calcext:value-type="float">
            <text:p>3,923E+05</text:p>
          </table:table-cell>
          <table:table-cell table:style-name="ce374" office:value-type="float" office:value="4" calcext:value-type="float">
            <text:p>4,000</text:p>
          </table:table-cell>
          <table:table-cell table:style-name="ce40" table:formula="of:=IF([.C51]=&quot;&quot;;&quot;&quot;;[.C51]/[.$N$61])" office:value-type="float" office:value="4" calcext:value-type="float">
            <text:p>4,00</text:p>
          </table:table-cell>
          <table:table-cell table:style-name="ce41" office:value-type="float" office:value="4.01" calcext:value-type="float">
            <text:p>4,01</text:p>
          </table:table-cell>
          <table:table-cell table:style-name="ce374" office:value-type="float" office:value="4" calcext:value-type="float">
            <text:p>4,000</text:p>
          </table:table-cell>
          <table:table-cell table:style-name="ce40" table:formula="of:=IF([.F51]=&quot;&quot;;&quot;&quot;;[.F51]/[.$N$61])" office:value-type="float" office:value="4" calcext:value-type="float">
            <text:p>4,00</text:p>
          </table:table-cell>
          <table:table-cell table:style-name="ce39" office:value-type="float" office:value="4" calcext:value-type="float">
            <text:p>4,00</text:p>
          </table:table-cell>
          <table:table-cell table:style-name="ce374" office:value-type="float" office:value="4" calcext:value-type="float">
            <text:p>4,000</text:p>
          </table:table-cell>
          <table:table-cell table:style-name="ce40" table:formula="of:=IF([.I51]=&quot;&quot;;&quot;&quot;;[.I51]/[.$N$61])" office:value-type="float" office:value="4" calcext:value-type="float">
            <text:p>4,00</text:p>
          </table:table-cell>
          <table:table-cell table:style-name="ce41" office:value-type="float" office:value="4.01" calcext:value-type="float">
            <text:p>4,01</text:p>
          </table:table-cell>
          <table:table-cell table:style-name="ce374" office:value-type="float" office:value="4" calcext:value-type="float">
            <text:p>4,000</text:p>
          </table:table-cell>
          <table:table-cell table:style-name="ce40" table:formula="of:=IF([.L51]=&quot;&quot;;&quot;&quot;;[.L51]/[.$N$61])" office:value-type="float" office:value="4" calcext:value-type="float">
            <text:p>4,00</text:p>
          </table:table-cell>
          <table:table-cell table:style-name="ce39" office:value-type="float" office:value="4" calcext:value-type="float">
            <text:p>4,00</text:p>
          </table:table-cell>
          <table:table-cell table:style-name="ce42" table:formula="of:=IF([.E75]=&quot;&quot;;&quot;&quot;;IF([.$Q$46]=&quot;Erro&quot;;ABS([.H75]);ABS([.H75]+[.Q75])))" office:value-type="float" office:value="0.00499999999999989" calcext:value-type="float">
            <text:p>0,00499999999999989</text:p>
          </table:table-cell>
          <table:table-cell table:style-name="ce43" table:formula="of:=IF([.E75]=&quot;&quot;;&quot;&quot;;IF([.$O$46]=&quot;%&quot;;[.$P$46]*[.E75]/100;[.$P$46]))" office:value-type="float" office:value="0.20025" calcext:value-type="float">
            <text:p>0,20</text:p>
          </table:table-cell>
          <table:table-cell table:style-name="ce645" table:formula="of:=IF([.O51]=&quot;&quot;;&quot;&quot;;IF([.O51]&gt;[.P51];&quot;Reprovado&quot;;&quot;Aprovado&quot;))" office:value-type="string" office:string-value="Aprovado" calcext:value-type="string">
            <text:p>Aprov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5" calcext:value-type="float">
            <text:p>5</text:p>
          </table:table-cell>
          <table:table-cell table:style-name="ce38" table:formula="of:=IF(OR([.B76]=&quot;&quot;;[.$B$47]=&quot;&quot;);&quot;&quot;;[.B76]*[.$B$47])" office:value-type="float" office:value="490332.5" calcext:value-type="float">
            <text:p>4,903E+05</text:p>
          </table:table-cell>
          <table:table-cell table:style-name="ce374" office:value-type="float" office:value="5" calcext:value-type="float">
            <text:p>5,000</text:p>
          </table:table-cell>
          <table:table-cell table:style-name="ce40" table:formula="of:=IF([.C52]=&quot;&quot;;&quot;&quot;;[.C52]/[.$N$61])" office:value-type="float" office:value="5" calcext:value-type="float">
            <text:p>5,00</text:p>
          </table:table-cell>
          <table:table-cell table:style-name="ce41" office:value-type="float" office:value="5.01" calcext:value-type="float">
            <text:p>5,01</text:p>
          </table:table-cell>
          <table:table-cell table:style-name="ce374" office:value-type="float" office:value="5" calcext:value-type="float">
            <text:p>5,000</text:p>
          </table:table-cell>
          <table:table-cell table:style-name="ce40" table:formula="of:=IF([.F52]=&quot;&quot;;&quot;&quot;;[.F52]/[.$N$61])" office:value-type="float" office:value="5" calcext:value-type="float">
            <text:p>5,00</text:p>
          </table:table-cell>
          <table:table-cell table:style-name="ce39" office:value-type="float" office:value="5" calcext:value-type="float">
            <text:p>5,00</text:p>
          </table:table-cell>
          <table:table-cell table:style-name="ce374" office:value-type="float" office:value="5" calcext:value-type="float">
            <text:p>5,000</text:p>
          </table:table-cell>
          <table:table-cell table:style-name="ce40" table:formula="of:=IF([.I52]=&quot;&quot;;&quot;&quot;;[.I52]/[.$N$61])" office:value-type="float" office:value="5" calcext:value-type="float">
            <text:p>5,00</text:p>
          </table:table-cell>
          <table:table-cell table:style-name="ce41" office:value-type="float" office:value="5.01" calcext:value-type="float">
            <text:p>5,01</text:p>
          </table:table-cell>
          <table:table-cell table:style-name="ce374" office:value-type="float" office:value="5" calcext:value-type="float">
            <text:p>5,000</text:p>
          </table:table-cell>
          <table:table-cell table:style-name="ce40" table:formula="of:=IF([.L52]=&quot;&quot;;&quot;&quot;;[.L52]/[.$N$61])" office:value-type="float" office:value="5" calcext:value-type="float">
            <text:p>5,00</text:p>
          </table:table-cell>
          <table:table-cell table:style-name="ce39" office:value-type="float" office:value="5" calcext:value-type="float">
            <text:p>5,00</text:p>
          </table:table-cell>
          <table:table-cell table:style-name="ce42" table:formula="of:=IF([.E76]=&quot;&quot;;&quot;&quot;;IF([.$Q$46]=&quot;Erro&quot;;ABS([.H76]);ABS([.H76]+[.Q76])))" office:value-type="float" office:value="0.00499999999999989" calcext:value-type="float">
            <text:p>0,00499999999999989</text:p>
          </table:table-cell>
          <table:table-cell table:style-name="ce43" table:formula="of:=IF([.E76]=&quot;&quot;;&quot;&quot;;IF([.$O$46]=&quot;%&quot;;[.$P$46]*[.E76]/100;[.$P$46]))" office:value-type="float" office:value="0.25025" calcext:value-type="float">
            <text:p>0,25</text:p>
          </table:table-cell>
          <table:table-cell table:style-name="ce645" table:formula="of:=IF([.O52]=&quot;&quot;;&quot;&quot;;IF([.O52]&gt;[.P52];&quot;Reprovado&quot;;&quot;Aprovado&quot;))" office:value-type="string" office:string-value="Aprovado" calcext:value-type="string">
            <text:p>Aprov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6" calcext:value-type="float">
            <text:p>6</text:p>
          </table:table-cell>
          <table:table-cell table:style-name="ce38" table:formula="of:=IF(OR([.B77]=&quot;&quot;;[.$B$47]=&quot;&quot;);&quot;&quot;;[.B77]*[.$B$47])" office:value-type="float" office:value="686465.5" calcext:value-type="float">
            <text:p>6,865E+05</text:p>
          </table:table-cell>
          <table:table-cell table:style-name="ce374" office:value-type="float" office:value="7" calcext:value-type="float">
            <text:p>7,000</text:p>
          </table:table-cell>
          <table:table-cell table:style-name="ce40" table:formula="of:=IF([.C53]=&quot;&quot;;&quot;&quot;;[.C53]/[.$N$61])" office:value-type="float" office:value="7" calcext:value-type="float">
            <text:p>7,00</text:p>
          </table:table-cell>
          <table:table-cell table:style-name="ce41" office:value-type="float" office:value="7.01" calcext:value-type="float">
            <text:p>7,01</text:p>
          </table:table-cell>
          <table:table-cell table:style-name="ce374" office:value-type="float" office:value="7" calcext:value-type="float">
            <text:p>7,000</text:p>
          </table:table-cell>
          <table:table-cell table:style-name="ce40" table:formula="of:=IF([.F53]=&quot;&quot;;&quot;&quot;;[.F53]/[.$N$61])" office:value-type="float" office:value="7" calcext:value-type="float">
            <text:p>7,00</text:p>
          </table:table-cell>
          <table:table-cell table:style-name="ce39" office:value-type="float" office:value="7.01" calcext:value-type="float">
            <text:p>7,01</text:p>
          </table:table-cell>
          <table:table-cell table:style-name="ce374" office:value-type="float" office:value="7" calcext:value-type="float">
            <text:p>7,000</text:p>
          </table:table-cell>
          <table:table-cell table:style-name="ce40" table:formula="of:=IF([.I53]=&quot;&quot;;&quot;&quot;;[.I53]/[.$N$61])" office:value-type="float" office:value="7" calcext:value-type="float">
            <text:p>7,00</text:p>
          </table:table-cell>
          <table:table-cell table:style-name="ce41" office:value-type="float" office:value="7.01" calcext:value-type="float">
            <text:p>7,01</text:p>
          </table:table-cell>
          <table:table-cell table:style-name="ce374" office:value-type="float" office:value="7" calcext:value-type="float">
            <text:p>7,000</text:p>
          </table:table-cell>
          <table:table-cell table:style-name="ce40" table:formula="of:=IF([.L53]=&quot;&quot;;&quot;&quot;;[.L53]/[.$N$61])" office:value-type="float" office:value="7" calcext:value-type="float">
            <text:p>7,00</text:p>
          </table:table-cell>
          <table:table-cell table:style-name="ce39" office:value-type="float" office:value="7.01" calcext:value-type="float">
            <text:p>7,01</text:p>
          </table:table-cell>
          <table:table-cell table:style-name="ce42" table:formula="of:=IF([.E77]=&quot;&quot;;&quot;&quot;;IF([.$Q$46]=&quot;Erro&quot;;ABS([.H77]);ABS([.H77]+[.Q77])))" office:value-type="float" office:value="0.00999999999999979" calcext:value-type="float">
            <text:p>0,00999999999999979</text:p>
          </table:table-cell>
          <table:table-cell table:style-name="ce43" table:formula="of:=IF([.E77]=&quot;&quot;;&quot;&quot;;IF([.$O$46]=&quot;%&quot;;[.$P$46]*[.E77]/100;[.$P$46]))" office:value-type="float" office:value="0.3505" calcext:value-type="float">
            <text:p>0,35</text:p>
          </table:table-cell>
          <table:table-cell table:style-name="ce645" table:formula="of:=IF([.O53]=&quot;&quot;;&quot;&quot;;IF([.O53]&gt;[.P53];&quot;Reprovado&quot;;&quot;Aprovado&quot;))" office:value-type="string" office:string-value="Aprovado" calcext:value-type="string">
            <text:p>Aprov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7" calcext:value-type="float">
            <text:p>7</text:p>
          </table:table-cell>
          <table:table-cell table:style-name="ce38" table:formula="of:=IF(OR([.B78]=&quot;&quot;;[.$B$47]=&quot;&quot;);&quot;&quot;;[.B78]*[.$B$47])">
            <text:p/>
          </table:table-cell>
          <table:table-cell table:style-name="ce39"/>
          <table:table-cell table:style-name="ce40" table:formula="of:=IF([.C54]=&quot;&quot;;&quot;&quot;;[.C54]/[.$N$61])">
            <text:p/>
          </table:table-cell>
          <table:table-cell table:style-name="ce41"/>
          <table:table-cell table:style-name="ce39"/>
          <table:table-cell table:style-name="ce40" table:formula="of:=IF([.F54]=&quot;&quot;;&quot;&quot;;[.F54]/[.$N$61])">
            <text:p/>
          </table:table-cell>
          <table:table-cell table:style-name="ce39" table:number-columns-repeated="2"/>
          <table:table-cell table:style-name="ce40" table:formula="of:=IF([.I54]=&quot;&quot;;&quot;&quot;;[.I54]/[.$N$61])">
            <text:p/>
          </table:table-cell>
          <table:table-cell table:style-name="ce41"/>
          <table:table-cell table:style-name="ce39"/>
          <table:table-cell table:style-name="ce40" table:formula="of:=IF([.L54]=&quot;&quot;;&quot;&quot;;[.L54]/[.$N$61])">
            <text:p/>
          </table:table-cell>
          <table:table-cell table:style-name="ce39"/>
          <table:table-cell table:style-name="ce42" table:formula="of:=IF([.E78]=&quot;&quot;;&quot;&quot;;IF([.$Q$46]=&quot;Erro&quot;;ABS([.H78]);ABS([.H78]+[.Q78])))">
            <text:p/>
          </table:table-cell>
          <table:table-cell table:style-name="ce43" table:formula="of:=IF([.E78]=&quot;&quot;;&quot;&quot;;IF([.$O$46]=&quot;%&quot;;[.$P$46]*[.E78]/100;[.$P$46]))">
            <text:p/>
          </table:table-cell>
          <table:table-cell table:style-name="ce645" table:formula="of:=IF([.O54]=&quot;&quot;;&quot;&quot;;IF([.O54]&gt;[.P54];&quot;Reprovado&quot;;&quot;Aprovado&quot;))">
            <text:p/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8" calcext:value-type="float">
            <text:p>8</text:p>
          </table:table-cell>
          <table:table-cell table:style-name="ce38" table:formula="of:=IF(OR([.B79]=&quot;&quot;;[.$B$47]=&quot;&quot;);&quot;&quot;;[.B79]*[.$B$47])">
            <text:p/>
          </table:table-cell>
          <table:table-cell table:style-name="ce39"/>
          <table:table-cell table:style-name="ce40" table:formula="of:=IF([.C55]=&quot;&quot;;&quot;&quot;;[.C55]/[.$N$61])">
            <text:p/>
          </table:table-cell>
          <table:table-cell table:style-name="ce41"/>
          <table:table-cell table:style-name="ce39"/>
          <table:table-cell table:style-name="ce40" table:formula="of:=IF([.F55]=&quot;&quot;;&quot;&quot;;[.F55]/[.$N$61])">
            <text:p/>
          </table:table-cell>
          <table:table-cell table:style-name="ce39" table:number-columns-repeated="2"/>
          <table:table-cell table:style-name="ce40" table:formula="of:=IF([.I55]=&quot;&quot;;&quot;&quot;;[.I55]/[.$N$61])">
            <text:p/>
          </table:table-cell>
          <table:table-cell table:style-name="ce41"/>
          <table:table-cell table:style-name="ce39"/>
          <table:table-cell table:style-name="ce40" table:formula="of:=IF([.L55]=&quot;&quot;;&quot;&quot;;[.L55]/[.$N$61])">
            <text:p/>
          </table:table-cell>
          <table:table-cell table:style-name="ce39"/>
          <table:table-cell table:style-name="ce42" table:formula="of:=IF([.E79]=&quot;&quot;;&quot;&quot;;IF([.$Q$46]=&quot;Erro&quot;;ABS([.H79]);ABS([.H79]+[.Q79])))">
            <text:p/>
          </table:table-cell>
          <table:table-cell table:style-name="ce43" table:formula="of:=IF([.E79]=&quot;&quot;;&quot;&quot;;IF([.$O$46]=&quot;%&quot;;[.$P$46]*[.E79]/100;[.$P$46]))">
            <text:p/>
          </table:table-cell>
          <table:table-cell table:style-name="ce645" table:formula="of:=IF([.O55]=&quot;&quot;;&quot;&quot;;IF([.O55]&gt;[.P55];&quot;Reprovado&quot;;&quot;Aprovado&quot;))">
            <text:p/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9" calcext:value-type="float">
            <text:p>9</text:p>
          </table:table-cell>
          <table:table-cell table:style-name="ce38" table:formula="of:=IF(OR([.B80]=&quot;&quot;;[.$B$47]=&quot;&quot;);&quot;&quot;;[.B80]*[.$B$47])">
            <text:p/>
          </table:table-cell>
          <table:table-cell table:style-name="ce39"/>
          <table:table-cell table:style-name="ce40" table:formula="of:=IF([.C56]=&quot;&quot;;&quot;&quot;;[.C56]/[.$N$61])">
            <text:p/>
          </table:table-cell>
          <table:table-cell table:style-name="ce41"/>
          <table:table-cell table:style-name="ce39"/>
          <table:table-cell table:style-name="ce40" table:formula="of:=IF([.F56]=&quot;&quot;;&quot;&quot;;[.F56]/[.$N$61])">
            <text:p/>
          </table:table-cell>
          <table:table-cell table:style-name="ce39" table:number-columns-repeated="2"/>
          <table:table-cell table:style-name="ce40" table:formula="of:=IF([.I56]=&quot;&quot;;&quot;&quot;;[.I56]/[.$N$61])">
            <text:p/>
          </table:table-cell>
          <table:table-cell table:style-name="ce41"/>
          <table:table-cell table:style-name="ce39"/>
          <table:table-cell table:style-name="ce40" table:formula="of:=IF([.L56]=&quot;&quot;;&quot;&quot;;[.L56]/[.$N$61])">
            <text:p/>
          </table:table-cell>
          <table:table-cell table:style-name="ce39"/>
          <table:table-cell table:style-name="ce42" table:formula="of:=IF([.E80]=&quot;&quot;;&quot;&quot;;IF([.$Q$46]=&quot;Erro&quot;;ABS([.H80]);ABS([.H80]+[.Q80])))">
            <text:p/>
          </table:table-cell>
          <table:table-cell table:style-name="ce43" table:formula="of:=IF([.E80]=&quot;&quot;;&quot;&quot;;IF([.$O$46]=&quot;%&quot;;[.$P$46]*[.E80]/100;[.$P$46]))">
            <text:p/>
          </table:table-cell>
          <table:table-cell table:style-name="ce645" table:formula="of:=IF([.O56]=&quot;&quot;;&quot;&quot;;IF([.O56]&gt;[.P56];&quot;Reprovado&quot;;&quot;Aprovado&quot;))">
            <text:p/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10" calcext:value-type="float">
            <text:p>10</text:p>
          </table:table-cell>
          <table:table-cell table:style-name="ce38" table:formula="of:=IF(OR([.B81]=&quot;&quot;;[.$B$47]=&quot;&quot;);&quot;&quot;;[.B81]*[.$B$47])">
            <text:p/>
          </table:table-cell>
          <table:table-cell table:style-name="ce39"/>
          <table:table-cell table:style-name="ce40" table:formula="of:=IF([.C57]=&quot;&quot;;&quot;&quot;;[.C57]/[.$N$61])">
            <text:p/>
          </table:table-cell>
          <table:table-cell table:style-name="ce41"/>
          <table:table-cell table:style-name="ce39"/>
          <table:table-cell table:style-name="ce40" table:formula="of:=IF([.F57]=&quot;&quot;;&quot;&quot;;[.F57]/[.$N$61])">
            <text:p/>
          </table:table-cell>
          <table:table-cell table:style-name="ce39" table:number-columns-repeated="2"/>
          <table:table-cell table:style-name="ce40" table:formula="of:=IF([.I57]=&quot;&quot;;&quot;&quot;;[.I57]/[.$N$61])">
            <text:p/>
          </table:table-cell>
          <table:table-cell table:style-name="ce41"/>
          <table:table-cell table:style-name="ce39"/>
          <table:table-cell table:style-name="ce40" table:formula="of:=IF([.L57]=&quot;&quot;;&quot;&quot;;[.L57]/[.$N$61])">
            <text:p/>
          </table:table-cell>
          <table:table-cell table:style-name="ce39"/>
          <table:table-cell table:style-name="ce42" table:formula="of:=IF([.E81]=&quot;&quot;;&quot;&quot;;IF([.$Q$46]=&quot;Erro&quot;;ABS([.H81]);ABS([.H81]+[.Q81])))">
            <text:p/>
          </table:table-cell>
          <table:table-cell table:style-name="ce43" table:formula="of:=IF([.E81]=&quot;&quot;;&quot;&quot;;IF([.$O$46]=&quot;%&quot;;[.$P$46]*[.E81]/100;[.$P$46]))">
            <text:p/>
          </table:table-cell>
          <table:table-cell table:style-name="ce645" table:formula="of:=IF([.O57]=&quot;&quot;;&quot;&quot;;IF([.O57]&gt;[.P57];&quot;Reprovado&quot;;&quot;Aprovado&quot;))">
            <text:p/>
          </table:table-cell>
          <table:table-cell table:style-name="ce1" table:number-columns-repeated="6"/>
          <table:table-cell table:number-columns-repeated="2"/>
          <table:table-cell table:style-name="ce44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45" office:value-type="float" office:value="11" calcext:value-type="float">
            <text:p>11</text:p>
          </table:table-cell>
          <table:table-cell table:style-name="ce38" table:formula="of:=IF(OR([.B82]=&quot;&quot;;[.$B$47]=&quot;&quot;);&quot;&quot;;[.B82]*[.$B$47])">
            <text:p/>
          </table:table-cell>
          <table:table-cell table:style-name="ce39"/>
          <table:table-cell table:style-name="ce40" table:formula="of:=IF([.E58]=&quot;&quot;;&quot;&quot;;[.E58]/[.$N$61])">
            <text:p/>
          </table:table-cell>
          <table:table-cell table:style-name="ce41"/>
          <table:table-cell table:style-name="ce39"/>
          <table:table-cell table:style-name="ce40" table:formula="of:=IF([.F58]=&quot;&quot;;&quot;&quot;;[.F58]/[.$N$61])">
            <text:p/>
          </table:table-cell>
          <table:table-cell table:style-name="ce39" table:number-columns-repeated="2"/>
          <table:table-cell table:style-name="ce40" table:formula="of:=IF([.I58]=&quot;&quot;;&quot;&quot;;[.I58]/[.$N$61])">
            <text:p/>
          </table:table-cell>
          <table:table-cell table:style-name="ce41"/>
          <table:table-cell table:style-name="ce39"/>
          <table:table-cell table:style-name="ce40" table:formula="of:=IF([.L58]=&quot;&quot;;&quot;&quot;;[.L58]/[.$N$61])">
            <text:p/>
          </table:table-cell>
          <table:table-cell table:style-name="ce39"/>
          <table:table-cell table:style-name="ce42" table:formula="of:=IF([.E82]=&quot;&quot;;&quot;&quot;;IF([.$Q$46]=&quot;Erro&quot;;ABS([.H82]);ABS([.H82]+[.Q82])))">
            <text:p/>
          </table:table-cell>
          <table:table-cell table:style-name="ce43" table:formula="of:=IF([.E82]=&quot;&quot;;&quot;&quot;;IF([.$O$46]=&quot;%&quot;;[.$P$46]*[.E82]/100;[.$P$46]))">
            <text:p/>
          </table:table-cell>
          <table:table-cell table:style-name="ce645" table:formula="of:=IF([.O58]=&quot;&quot;;&quot;&quot;;IF([.O58]&gt;[.P58];&quot;Reprovado&quot;;&quot;Aprovado&quot;))">
            <text:p/>
          </table:table-cell>
          <table:table-cell table:style-name="ce1" table:number-columns-repeated="6"/>
          <table:table-cell table:number-columns-repeated="2"/>
          <table:table-cell table:style-name="ce44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45" office:value-type="float" office:value="12" calcext:value-type="float">
            <text:p>12</text:p>
          </table:table-cell>
          <table:table-cell table:style-name="ce38" table:formula="of:=IF(OR([.B83]=&quot;&quot;;[.$B$47]=&quot;&quot;);&quot;&quot;;[.B83]*[.$B$47])">
            <text:p/>
          </table:table-cell>
          <table:table-cell table:style-name="ce46"/>
          <table:table-cell table:style-name="ce40" table:formula="of:=IF([.E59]=&quot;&quot;;&quot;&quot;;[.E59]/[.$N$61])">
            <text:p/>
          </table:table-cell>
          <table:table-cell table:style-name="ce47"/>
          <table:table-cell table:style-name="ce46"/>
          <table:table-cell table:style-name="ce40" table:formula="of:=IF([.F59]=&quot;&quot;;&quot;&quot;;[.F59]/[.$N$61])">
            <text:p/>
          </table:table-cell>
          <table:table-cell table:style-name="ce46" table:number-columns-repeated="2"/>
          <table:table-cell table:style-name="ce40" table:formula="of:=IF([.I59]=&quot;&quot;;&quot;&quot;;[.I59]/[.$N$61])">
            <text:p/>
          </table:table-cell>
          <table:table-cell table:style-name="ce47"/>
          <table:table-cell table:style-name="ce46"/>
          <table:table-cell table:style-name="ce40" table:formula="of:=IF([.L59]=&quot;&quot;;&quot;&quot;;[.L59]/[.$N$61])">
            <text:p/>
          </table:table-cell>
          <table:table-cell table:style-name="ce46"/>
          <table:table-cell table:style-name="ce42" table:formula="of:=IF([.E83]=&quot;&quot;;&quot;&quot;;IF([.$Q$46]=&quot;Erro&quot;;ABS([.H83]);ABS([.H83]+[.Q83])))">
            <text:p/>
          </table:table-cell>
          <table:table-cell table:style-name="ce43" table:formula="of:=IF([.E83]=&quot;&quot;;&quot;&quot;;IF([.$O$46]=&quot;%&quot;;[.$P$46]*[.E83]/100;[.$P$46]))">
            <text:p/>
          </table:table-cell>
          <table:table-cell table:style-name="ce645" table:formula="of:=IF([.O59]=&quot;&quot;;&quot;&quot;;IF([.O59]&gt;[.P59];&quot;Reprovado&quot;;&quot;Aprovado&quot;))">
            <text:p/>
          </table:table-cell>
          <table:table-cell table:style-name="ce1" table:number-columns-repeated="6"/>
          <table:table-cell table:number-columns-repeated="2"/>
          <table:table-cell table:style-name="ce44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45" office:value-type="float" office:value="13" calcext:value-type="float">
            <text:p>13</text:p>
          </table:table-cell>
          <table:table-cell table:style-name="ce38" table:formula="of:=IF(OR([.B84]=&quot;&quot;;[.$B$47]=&quot;&quot;);&quot;&quot;;[.B84]*[.$B$47])">
            <text:p/>
          </table:table-cell>
          <table:table-cell table:style-name="ce46"/>
          <table:table-cell table:style-name="ce40" table:formula="of:=IF([.E60]=&quot;&quot;;&quot;&quot;;[.E60]/[.$N$61])">
            <text:p/>
          </table:table-cell>
          <table:table-cell table:style-name="ce47"/>
          <table:table-cell table:style-name="ce46"/>
          <table:table-cell table:style-name="ce40" table:formula="of:=IF([.F60]=&quot;&quot;;&quot;&quot;;[.F60]/[.$N$61])">
            <text:p/>
          </table:table-cell>
          <table:table-cell table:style-name="ce46" table:number-columns-repeated="2"/>
          <table:table-cell table:style-name="ce40" table:formula="of:=IF([.I60]=&quot;&quot;;&quot;&quot;;[.I60]/[.$N$61])">
            <text:p/>
          </table:table-cell>
          <table:table-cell table:style-name="ce47"/>
          <table:table-cell table:style-name="ce46"/>
          <table:table-cell table:style-name="ce40" table:formula="of:=IF([.L60]=&quot;&quot;;&quot;&quot;;[.L60]/[.$N$61])">
            <text:p/>
          </table:table-cell>
          <table:table-cell table:style-name="ce46"/>
          <table:table-cell table:style-name="ce42" table:formula="of:=IF([.E84]=&quot;&quot;;&quot;&quot;;IF([.$Q$46]=&quot;Erro&quot;;ABS([.H84]);ABS([.H84]+[.Q84])))">
            <text:p/>
          </table:table-cell>
          <table:table-cell table:style-name="ce43" table:formula="of:=IF([.E84]=&quot;&quot;;&quot;&quot;;IF([.$O$46]=&quot;%&quot;;[.$P$46]*[.E84]/100;[.$P$46]))">
            <text:p/>
          </table:table-cell>
          <table:table-cell table:style-name="ce645" table:formula="of:=IF([.O60]=&quot;&quot;;&quot;&quot;;IF([.O60]&gt;[.P60];&quot;Reprovado&quot;;&quot;Aprovado&quot;))">
            <text:p/>
          </table:table-cell>
          <table:table-cell table:style-name="ce1" table:number-columns-repeated="6"/>
          <table:table-cell table:number-columns-repeated="2"/>
          <table:table-cell table:style-name="ce44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Máximo erro do manômetro:</text:p>
          </table:table-cell>
          <table:covered-table-cell table:number-columns-repeated="2"/>
          <table:table-cell table:style-name="ce48" table:formula="of:=MAX([.H72:.H84])" office:value-type="float" office:value="0.0150000000000001" calcext:value-type="float">
            <text:p>0,0150</text:p>
          </table:table-cell>
          <table:table-cell table:style-name="ce49" table:formula="of:=[.K25]" office:value-type="string" office:string-value="kgf/cm2" calcext:value-type="string">
            <text:p>kgf/cm2</text:p>
          </table:table-cell>
          <table:table-cell table:style-name="ce119" office:value-type="string" calcext:value-type="string" table:number-columns-spanned="3" table:number-rows-spanned="1">
            <text:p>Mínimo erro do manômetro:</text:p>
          </table:table-cell>
          <table:covered-table-cell table:number-columns-repeated="2"/>
          <table:table-cell table:style-name="ce48" table:formula="of:=MIN([.H72:.H84])" office:value-type="float" office:value="0.0025" calcext:value-type="float">
            <text:p>0,0025</text:p>
          </table:table-cell>
          <table:table-cell table:style-name="ce49" table:formula="of:=[.K25]" office:value-type="string" office:string-value="kgf/cm2" calcext:value-type="string">
            <text:p>kgf/cm2</text:p>
          </table:table-cell>
          <table:table-cell/>
          <table:table-cell table:style-name="ce120" office:value-type="string" calcext:value-type="string" table:number-columns-spanned="1" table:number-rows-spanned="2">
            <text:p>Fator</text:p>
          </table:table-cell>
          <table:table-cell table:style-name="ce121" table:formula="of:=[$Conversão.A6]" office:value-type="float" office:value="1" calcext:value-type="float" table:number-columns-spanned="1" table:number-rows-spanned="2">
            <text:p>1,000000E+00</text:p>
          </table:table-cell>
          <table:table-cell table:style-name="ce1" table:number-columns-repeated="9"/>
          <table:table-cell table:style-name="ce44" table:number-columns-repeated="41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Erro fiducial % do Fundo de escala da calibração:</text:p>
          </table:table-cell>
          <table:covered-table-cell table:number-columns-repeated="2"/>
          <table:table-cell table:style-name="ce50" table:formula="of:=ABS(([.J61]-[.E61])/([.G26]-[.E26]))" office:value-type="percentage" office:value="0.0017857142857143" calcext:value-type="percentage">
            <text:p>0,18%</text:p>
          </table:table-cell>
          <table:table-cell/>
          <table:table-cell table:style-name="ce119" office:value-type="string" calcext:value-type="string" table:number-columns-spanned="3" table:number-rows-spanned="1">
            <text:p>Classe conforme o erro fiducial do fundo de Escala</text:p>
          </table:table-cell>
          <table:covered-table-cell table:number-columns-repeated="2"/>
          <table:table-cell table:style-name="ce42" table:formula="of:=IF([.E62]&gt;0.02;&quot;--------&quot;;LOOKUP([.E62];[$Conversão.E20:.E84];[$Conversão.D20:.D84]))" office:value-type="string" office:string-value="3A" calcext:value-type="string">
            <text:p>3A</text:p>
          </table:table-cell>
          <table:table-cell/>
          <table:table-cell table:style-name="ce52"/>
          <table:covered-table-cell table:number-columns-repeated="2"/>
          <table:table-cell table:style-name="ce52" table:number-columns-repeated="2"/>
          <table:table-cell table:style-name="ce44"/>
          <table:table-cell table:style-name="ce86" table:number-columns-spanned="1" table:number-rows-spanned="2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% Maior Erro fiducial de uma indicação:</text:p>
          </table:table-cell>
          <table:covered-table-cell table:number-columns-repeated="2"/>
          <table:table-cell table:style-name="ce53" table:formula="of:=ABS(MAX([.I72:.I84]))" office:value-type="percentage" office:value="0.01" calcext:value-type="percentage">
            <text:p>1,00%</text:p>
          </table:table-cell>
          <table:table-cell/>
          <table:table-cell table:style-name="ce119" office:value-type="string" calcext:value-type="string" table:number-columns-spanned="3" table:number-rows-spanned="1">
            <text:p>Classe conforme o erro fiducial da indicação:</text:p>
          </table:table-cell>
          <table:covered-table-cell table:number-columns-repeated="2"/>
          <table:table-cell table:style-name="ce42" table:formula="of:=IF([.E63]&gt;0.02;&quot;--------&quot;;LOOKUP([.E63];[$Conversão.E20:.E84];[$Conversão.D20:.D84]))" office:value-type="string" office:string-value="A" calcext:value-type="string">
            <text:p>A</text:p>
          </table:table-cell>
          <table:table-cell/>
          <table:table-cell table:style-name="ce52"/>
          <table:table-cell table:style-name="ce378" table:number-columns-spanned="1" table:number-rows-spanned="2"/>
          <table:table-cell table:style-name="ce1" table:number-columns-repeated="4"/>
          <table:covered-table-cell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Histerese % da escala de calibração:</text:p>
          </table:table-cell>
          <table:covered-table-cell table:number-columns-repeated="2"/>
          <table:table-cell table:style-name="ce54" table:formula="of:=ABS(MAX([.P72:.P84])/([.G26]-[.E26]))" office:value-type="percentage" office:value="0.00214285714285716" calcext:value-type="percentage">
            <text:p>0,21%</text:p>
          </table:table-cell>
          <table:table-cell/>
          <table:table-cell table:style-name="ce119" office:value-type="string" calcext:value-type="string" table:number-columns-spanned="3" table:number-rows-spanned="1">
            <text:p>Repetibilidade % da escala de calibração:</text:p>
          </table:table-cell>
          <table:covered-table-cell table:number-columns-repeated="2"/>
          <table:table-cell table:style-name="ce54" table:formula="of:=ABS(MAX([.G72:.G84])/([.G26]-[.E26]))" office:value-type="percentage" office:value="0.000412393049421171" calcext:value-type="percentage">
            <text:p>0,04%</text:p>
          </table:table-cell>
          <table:table-cell/>
          <table:table-cell table:style-name="ce52"/>
          <table:covered-table-cell/>
          <table:table-cell table:style-name="ce1" table:number-columns-repeated="4"/>
          <table:table-cell table:style-name="ce55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Incerteza da Calibração em %:</text:p>
          </table:table-cell>
          <table:covered-table-cell table:number-columns-repeated="2"/>
          <table:table-cell table:style-name="ce56" table:formula="of:=MAX([.Q72:.Q84])/([.G26]-[.E26])" office:value-type="percentage" office:value="0.0128571428571429" calcext:value-type="percentage">
            <text:p>1,29%</text:p>
          </table:table-cell>
          <table:table-cell/>
          <table:table-cell table:style-name="ce122" office:value-type="string" calcext:value-type="string" table:number-columns-spanned="3" table:number-rows-spanned="1">
            <text:p>Unidade:</text:p>
          </table:table-cell>
          <table:covered-table-cell table:number-columns-repeated="2"/>
          <table:table-cell table:style-name="ce42" table:formula="of:=[.K61]" office:value-type="string" office:string-value="kgf/cm2" calcext:value-type="string">
            <text:p>kgf/cm2</text:p>
          </table:table-cell>
          <table:table-cell/>
          <table:table-cell table:style-name="ce1" table:number-columns-repeated="6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23" table:number-columns-spanned="9" table:number-rows-spanned="1"/>
          <table:covered-table-cell table:number-columns-repeated="8"/>
          <table:table-cell/>
          <table:table-cell table:style-name="ce52"/>
          <table:table-cell table:style-name="ce58"/>
          <table:table-cell table:style-name="ce1" table:number-columns-repeated="4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" table:number-columns-repeated="16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24" office:value-type="string" calcext:value-type="string" table:number-columns-spanned="12" table:number-rows-spanned="1">
            <text:p>RESULTADOS</text:p>
          </table:table-cell>
          <table:covered-table-cell table:number-columns-repeated="11"/>
          <table:table-cell table:style-name="ce125" table:number-columns-spanned="6" table:number-rows-spanned="1"/>
          <table:covered-table-cell table:number-columns-repeated="5"/>
          <table:table-cell table:style-name="ce44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1"/>
          <table:table-cell table:style-name="ce120" office:value-type="string" calcext:value-type="string" table:number-columns-spanned="3" table:number-rows-spanned="1">
            <text:p>PADRÃO</text:p>
          </table:table-cell>
          <table:covered-table-cell table:number-columns-repeated="2"/>
          <table:table-cell table:style-name="ce120" office:value-type="string" calcext:value-type="string" table:number-columns-spanned="3" table:number-rows-spanned="1">
            <text:p>INSTRUMENTO</text:p>
          </table:table-cell>
          <table:covered-table-cell table:number-columns-repeated="2"/>
          <table:table-cell table:style-name="ce126" office:value-type="string" calcext:value-type="string" table:number-columns-spanned="1" table:number-rows-spanned="2">
            <text:p>Erro</text:p>
          </table:table-cell>
          <table:table-cell table:style-name="ce127" office:value-type="string" calcext:value-type="string" table:number-columns-spanned="1" table:number-rows-spanned="3">
            <text:p>% Erro</text:p>
          </table:table-cell>
          <table:table-cell table:style-name="ce128" office:value-type="string" calcext:value-type="string" table:number-columns-spanned="3" table:number-rows-spanned="1">
            <text:p>Diferença Ciclo 1</text:p>
          </table:table-cell>
          <table:covered-table-cell table:number-columns-repeated="2"/>
          <table:table-cell table:style-name="ce128" office:value-type="string" calcext:value-type="string" table:number-columns-spanned="3" table:number-rows-spanned="1">
            <text:p>Diferença Clico 2</text:p>
          </table:table-cell>
          <table:covered-table-cell table:number-columns-repeated="2"/>
          <table:table-cell table:style-name="ce129" office:value-type="string" calcext:value-type="string" table:number-columns-spanned="1" table:number-rows-spanned="2">
            <text:p>Histerese</text:p>
          </table:table-cell>
          <table:table-cell table:style-name="ce59" office:value-type="string" calcext:value-type="string">
            <text:p>Incerteza</text:p>
          </table:table-cell>
          <table:table-cell table:style-name="ce130" office:value-type="string" calcext:value-type="string" table:number-columns-spanned="1" table:number-rows-spanned="3">
            <text:p>k</text:p>
          </table:table-cell>
          <table:table-cell table:style-name="ce130" office:value-type="string" calcext:value-type="string" table:number-columns-spanned="1" table:number-rows-spanned="3">
            <text:p>Veff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1"/>
          <table:table-cell table:style-name="ce60" office:value-type="string" calcext:value-type="string">
            <text:p>média</text:p>
          </table:table-cell>
          <table:table-cell table:style-name="ce60" office:value-type="string" calcext:value-type="string">
            <text:p>Desvio Padrão</text:p>
          </table:table-cell>
          <table:table-cell table:style-name="ce61" office:value-type="string" calcext:value-type="string">
            <text:p>Repetibilidade</text:p>
          </table:table-cell>
          <table:table-cell table:style-name="ce60" office:value-type="string" calcext:value-type="string">
            <text:p>média</text:p>
          </table:table-cell>
          <table:table-cell table:style-name="ce60" office:value-type="string" calcext:value-type="string">
            <text:p>Desvio Padrão</text:p>
          </table:table-cell>
          <table:table-cell table:style-name="ce61" office:value-type="string" calcext:value-type="string">
            <text:p>Repetibilidade</text:p>
          </table:table-cell>
          <table:covered-table-cell table:number-columns-repeated="2"/>
          <table:table-cell table:style-name="ce131" table:formula="of:=[.$E$46]" office:value-type="string" office:string-value="kgf/cm2" calcext:value-type="string" table:number-columns-spanned="3" table:number-rows-spanned="1">
            <text:p>kgf/cm2</text:p>
          </table:table-cell>
          <table:covered-table-cell table:number-columns-repeated="2"/>
          <table:table-cell table:style-name="ce131" table:formula="of:=[.$E$46]" office:value-type="string" office:string-value="kgf/cm2" calcext:value-type="string" table:number-columns-spanned="3" table:number-rows-spanned="1">
            <text:p>kgf/cm2</text:p>
          </table:table-cell>
          <table:covered-table-cell table:number-columns-repeated="3"/>
          <table:table-cell table:style-name="ce62" office:value-type="string" calcext:value-type="string">
            <text:p>Expandida</text:p>
          </table:table-cell>
          <table:covered-table-cell table:number-columns-repeated="2"/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1"/>
          <table:table-cell table:style-name="ce63" table:formula="of:=[.$D$46]" office:value-type="string" office:string-value="kgf/cm2" calcext:value-type="string">
            <text:p>kgf/cm2</text:p>
          </table:table-cell>
          <table:table-cell table:style-name="ce63" table:formula="of:=[.$D$46]" office:value-type="string" office:string-value="kgf/cm2" calcext:value-type="string">
            <text:p>kgf/cm2</text:p>
          </table:table-cell>
          <table:table-cell table:style-name="ce63" table:formula="of:=[.$D$46]" office:value-type="string" office:string-value="kgf/cm2" calcext:value-type="string">
            <text:p>kgf/cm2</text:p>
          </table:table-cell>
          <table:table-cell table:style-name="ce63" table:formula="of:=[.$E$46]" office:value-type="string" office:string-value="kgf/cm2" calcext:value-type="string">
            <text:p>kgf/cm2</text:p>
          </table:table-cell>
          <table:table-cell table:style-name="ce63" table:formula="of:=[.$E$46]" office:value-type="string" office:string-value="kgf/cm2" calcext:value-type="string">
            <text:p>kgf/cm2</text:p>
          </table:table-cell>
          <table:table-cell table:style-name="ce63" table:formula="of:=[.$E$46]" office:value-type="string" office:string-value="kgf/cm2" calcext:value-type="string">
            <text:p>kgf/cm2</text:p>
          </table:table-cell>
          <table:table-cell table:style-name="ce64" table:formula="of:=[.$E$46]" office:value-type="string" office:string-value="kgf/cm2" calcext:value-type="string">
            <text:p>kgf/cm2</text:p>
          </table:table-cell>
          <table:covered-table-cell/>
          <table:table-cell table:style-name="ce582" office:value-type="string" calcext:value-type="string">
            <text:p>Padrão</text:p>
          </table:table-cell>
          <table:table-cell table:style-name="ce582" office:value-type="string" calcext:value-type="string">
            <text:p>Instrumento</text:p>
          </table:table-cell>
          <table:table-cell table:style-name="ce582" office:value-type="string" calcext:value-type="string">
            <text:p>Resultado</text:p>
          </table:table-cell>
          <table:table-cell table:style-name="ce582" office:value-type="string" calcext:value-type="string">
            <text:p>Padrão</text:p>
          </table:table-cell>
          <table:table-cell table:style-name="ce582" office:value-type="string" calcext:value-type="string">
            <text:p>Instrumento</text:p>
          </table:table-cell>
          <table:table-cell table:style-name="ce582" office:value-type="string" calcext:value-type="string">
            <text:p>Resultado</text:p>
          </table:table-cell>
          <table:table-cell table:style-name="ce64" table:formula="of:=[.$E$46]" office:value-type="string" office:string-value="kgf/cm2" calcext:value-type="string">
            <text:p>kgf/cm2</text:p>
          </table:table-cell>
          <table:table-cell table:style-name="ce65" table:formula="of:=[.$E$46]" office:value-type="string" office:string-value="kgf/cm2" calcext:value-type="string">
            <text:p>kgf/cm2</text:p>
          </table:table-cell>
          <table:covered-table-cell table:number-columns-repeated="2"/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1" calcext:value-type="float">
            <text:p>1</text:p>
          </table:table-cell>
          <table:table-cell table:style-name="ce66" table:formula="of:=IF([.C48]=&quot;&quot;;&quot;&quot;;AVERAGE([.D48];[.G48];[.J48];[.M48]))" office:value-type="float" office:value="0" calcext:value-type="float">
            <text:p>0,0000</text:p>
          </table:table-cell>
          <table:table-cell table:style-name="ce66" table:formula="of:=IF([.B72]=&quot;&quot;;&quot;&quot;;STDEV([.D48];[.G48];[.J48];[.M48]))" office:value-type="float" office:value="0" calcext:value-type="float">
            <text:p>0,0000</text:p>
          </table:table-cell>
          <table:table-cell table:style-name="ce66" table:formula="of:=IF([.C72]=&quot;&quot;;&quot;&quot;;[.C72]/SQRT(4))" office:value-type="float" office:value="0" calcext:value-type="float">
            <text:p>0,0000</text:p>
          </table:table-cell>
          <table:table-cell table:style-name="ce67" table:formula="of:=IF([.E48]=&quot;&quot;;&quot;&quot;;AVERAGE([.E48];[.H48];[.K48];[.N48])-[.E103])" office:value-type="float" office:value="0.0025" calcext:value-type="float">
            <text:p>0,003</text:p>
          </table:table-cell>
          <table:table-cell table:style-name="ce66" table:formula="of:=IF([.E72]=&quot;&quot;;&quot;&quot;;STDEV([.E48];[.H48];[.K48];[.N48]))" office:value-type="float" office:value="0.005" calcext:value-type="float">
            <text:p>0,0050</text:p>
          </table:table-cell>
          <table:table-cell table:style-name="ce66" table:formula="of:=IF([.F72]=&quot;&quot;;&quot;&quot;;[.F72]/SQRT(4))" office:value-type="float" office:value="0.0025" calcext:value-type="float">
            <text:p>0,0025</text:p>
          </table:table-cell>
          <table:table-cell table:style-name="ce68" table:formula="of:=IF([.E72]=&quot;&quot;;&quot;&quot;;[.E72]-[.B72])" office:value-type="float" office:value="0.0025" calcext:value-type="float">
            <text:p>0,0025</text:p>
          </table:table-cell>
          <table:table-cell table:style-name="ce69" office:value-type="percentage" office:value="0" calcext:value-type="percentage">
            <text:p>0,00%</text:p>
          </table:table-cell>
          <table:table-cell table:style-name="ce67" table:formula="of:=IF([.C48]=&quot;&quot;;&quot;&quot;;AVERAGE([.D48];[.G48]))" office:value-type="float" office:value="0" calcext:value-type="float">
            <text:p>0,000</text:p>
          </table:table-cell>
          <table:table-cell table:style-name="ce43" table:formula="of:=IF([.D48]=&quot;&quot;;&quot;&quot;;AVERAGE([.E48];[.H48]))" office:value-type="float" office:value="0.005" calcext:value-type="float">
            <text:p>0,01</text:p>
          </table:table-cell>
          <table:table-cell table:style-name="ce70" table:formula="of:=IF([.J72]=&quot;&quot;;&quot;&quot;;ABS([.K72]-[.J72]))" office:value-type="float" office:value="0.005" calcext:value-type="float">
            <text:p>0,01</text:p>
          </table:table-cell>
          <table:table-cell table:style-name="ce67" table:formula="of:=IF([.I48]=&quot;&quot;;&quot;&quot;;AVERAGE([.J48];[.M48]))" office:value-type="float" office:value="0" calcext:value-type="float">
            <text:p>0,000</text:p>
          </table:table-cell>
          <table:table-cell table:style-name="ce43" table:formula="of:=IF([.I48]=&quot;&quot;;&quot;&quot;;AVERAGE([.K48];[.N48]))" office:value-type="float" office:value="0" calcext:value-type="float">
            <text:p>0,00</text:p>
          </table:table-cell>
          <table:table-cell table:style-name="ce70" table:formula="of:=IF([.M72]=&quot;&quot;;&quot;&quot;;ABS([.N72]-[.M72]))" office:value-type="float" office:value="0" calcext:value-type="float">
            <text:p>0,00</text:p>
          </table:table-cell>
          <table:table-cell table:style-name="ce71" table:formula="of:=IF([.L72]=&quot;&quot;;&quot;&quot;;MAX([.L72];[.O72]))" office:value-type="float" office:value="0.005" calcext:value-type="float">
            <text:p>0,005</text:p>
          </table:table-cell>
          <table:table-cell table:style-name="ce67" table:formula="of:=IF(OR([.E72]=&quot;&quot;;[.E72]=0);&quot;--------&quot;;[$Incerteza.I17])" office:value-type="float" office:value="0.06" calcext:value-type="float">
            <text:p>0,060</text:p>
          </table:table-cell>
          <table:table-cell table:style-name="ce67" table:formula="of:=IF(OR([.E72]=&quot;&quot;;[.E72]=0);&quot;--------&quot;;[$Incerteza.I16])" office:value-type="float" office:value="2.00002972501454" calcext:value-type="float">
            <text:p>2,000</text:p>
          </table:table-cell>
          <table:table-cell table:style-name="ce67" table:formula="of:=IF(OR([.E72]=&quot;&quot;;[.E72]=0);&quot;--------&quot;;IF([$Incerteza.I14]&gt;1000;&quot;Infinito&quot;;[$Incerteza.I14]))" office:value-type="float" office:value="0.0290384087339525" calcext:value-type="float">
            <text:p>0,029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2" calcext:value-type="float">
            <text:p>2</text:p>
          </table:table-cell>
          <table:table-cell table:style-name="ce66" table:formula="of:=IF([.C49]=&quot;&quot;;&quot;&quot;;AVERAGE([.D49];[.G49];[.J49];[.M49]))" office:value-type="float" office:value="1" calcext:value-type="float">
            <text:p>1,0000</text:p>
          </table:table-cell>
          <table:table-cell table:style-name="ce66" table:formula="of:=IF([.B73]=&quot;&quot;;&quot;&quot;;STDEV([.D49];[.G49];[.J49];[.M49]))" office:value-type="float" office:value="0" calcext:value-type="float">
            <text:p>0,0000</text:p>
          </table:table-cell>
          <table:table-cell table:style-name="ce66" table:formula="of:=IF([.C73]=&quot;&quot;;&quot;&quot;;[.C73]/SQRT(4))" office:value-type="float" office:value="0" calcext:value-type="float">
            <text:p>0,0000</text:p>
          </table:table-cell>
          <table:table-cell table:style-name="ce67" table:formula="of:=IF([.E49]=&quot;&quot;;&quot;&quot;;AVERAGE([.E49];[.H49];[.K49];[.N49])-[.E104])" office:value-type="float" office:value="1.01" calcext:value-type="float">
            <text:p>1,010</text:p>
          </table:table-cell>
          <table:table-cell table:style-name="ce66" table:formula="of:=IF([.E73]=&quot;&quot;;&quot;&quot;;STDEV([.E49];[.H49];[.K49];[.N49]))" office:value-type="float" office:value="0" calcext:value-type="float">
            <text:p>0,0000</text:p>
          </table:table-cell>
          <table:table-cell table:style-name="ce66" table:formula="of:=IF([.F73]=&quot;&quot;;&quot;&quot;;[.F73]/SQRT(4))" office:value-type="float" office:value="0" calcext:value-type="float">
            <text:p>0,0000</text:p>
          </table:table-cell>
          <table:table-cell table:style-name="ce68" table:formula="of:=IF([.E73]=&quot;&quot;;&quot;&quot;;[.E73]-[.B73])" office:value-type="float" office:value="0.01" calcext:value-type="float">
            <text:p>0,0100</text:p>
          </table:table-cell>
          <table:table-cell table:style-name="ce69" table:formula="of:=IF([.H73]=&quot;&quot;;&quot;&quot;;ABS([.H73]/[.B73]))" office:value-type="percentage" office:value="0.01" calcext:value-type="percentage">
            <text:p>1,00%</text:p>
          </table:table-cell>
          <table:table-cell table:style-name="ce67" table:formula="of:=IF([.C49]=&quot;&quot;;&quot;&quot;;AVERAGE([.D49];[.G49]))" office:value-type="float" office:value="1" calcext:value-type="float">
            <text:p>1,000</text:p>
          </table:table-cell>
          <table:table-cell table:style-name="ce43" table:formula="of:=IF([.D49]=&quot;&quot;;&quot;&quot;;AVERAGE([.E49];[.H49]))" office:value-type="float" office:value="1.01" calcext:value-type="float">
            <text:p>1,01</text:p>
          </table:table-cell>
          <table:table-cell table:style-name="ce70" table:formula="of:=IF([.J73]=&quot;&quot;;&quot;&quot;;ABS([.K73]-[.J73]))" office:value-type="float" office:value="0.01" calcext:value-type="float">
            <text:p>0,01</text:p>
          </table:table-cell>
          <table:table-cell table:style-name="ce67" table:formula="of:=IF([.I49]=&quot;&quot;;&quot;&quot;;AVERAGE([.J49];[.M49]))" office:value-type="float" office:value="1" calcext:value-type="float">
            <text:p>1,000</text:p>
          </table:table-cell>
          <table:table-cell table:style-name="ce43" table:formula="of:=IF([.I49]=&quot;&quot;;&quot;&quot;;AVERAGE([.K49];[.N49]))" office:value-type="float" office:value="1.01" calcext:value-type="float">
            <text:p>1,01</text:p>
          </table:table-cell>
          <table:table-cell table:style-name="ce70" table:formula="of:=IF([.M73]=&quot;&quot;;&quot;&quot;;ABS([.N73]-[.M73]))" office:value-type="float" office:value="0.01" calcext:value-type="float">
            <text:p>0,01</text:p>
          </table:table-cell>
          <table:table-cell table:style-name="ce71" table:formula="of:=IF([.L73]=&quot;&quot;;&quot;&quot;;MAX([.L73];[.O73]))" office:value-type="float" office:value="0.01" calcext:value-type="float">
            <text:p>0,010</text:p>
          </table:table-cell>
          <table:table-cell table:style-name="ce67" table:formula="of:=IF(OR([.E73]=&quot;&quot;;[.E73]=0);&quot;--------&quot;;[$Incerteza.I33])" office:value-type="float" office:value="0.06" calcext:value-type="float">
            <text:p>0,060</text:p>
          </table:table-cell>
          <table:table-cell table:style-name="ce67" table:formula="of:=IF(OR([.E73]=&quot;&quot;;[.E73]=0);&quot;--------&quot;;[$Incerteza.I32])" office:value-type="float" office:value="2" calcext:value-type="float">
            <text:p>2,000</text:p>
          </table:table-cell>
          <table:table-cell table:style-name="ce67" table:formula="of:=IF(OR([.E73]=&quot;&quot;;[.E73]=0);&quot;--------&quot;;IF([$Incerteza.K30]&gt;1000;&quot;Infinito&quot;;[$Incerteza.K30]))" office:value-type="string" office:string-value="Infinito" calcext:value-type="string">
            <text:p>Infinito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3" calcext:value-type="float">
            <text:p>3</text:p>
          </table:table-cell>
          <table:table-cell table:style-name="ce66" table:formula="of:=IF([.C50]=&quot;&quot;;&quot;&quot;;AVERAGE([.D50];[.G50];[.J50];[.M50]))" office:value-type="float" office:value="3" calcext:value-type="float">
            <text:p>3,0000</text:p>
          </table:table-cell>
          <table:table-cell table:style-name="ce66" table:formula="of:=IF([.B74]=&quot;&quot;;&quot;&quot;;STDEV([.D50];[.G50];[.J50];[.M50]))" office:value-type="float" office:value="0" calcext:value-type="float">
            <text:p>0,0000</text:p>
          </table:table-cell>
          <table:table-cell table:style-name="ce66" table:formula="of:=IF([.C74]=&quot;&quot;;&quot;&quot;;[.C74]/SQRT(4))" office:value-type="float" office:value="0" calcext:value-type="float">
            <text:p>0,0000</text:p>
          </table:table-cell>
          <table:table-cell table:style-name="ce67" table:formula="of:=IF([.E50]=&quot;&quot;;&quot;&quot;;AVERAGE([.E50];[.H50];[.K50];[.N50])-[.E105])" office:value-type="float" office:value="3.015" calcext:value-type="float">
            <text:p>3,015</text:p>
          </table:table-cell>
          <table:table-cell table:style-name="ce66" table:formula="of:=IF([.E74]=&quot;&quot;;&quot;&quot;;STDEV([.E50];[.H50];[.K50];[.N50]))" office:value-type="float" office:value="0.00577350269189639" calcext:value-type="float">
            <text:p>0,0058</text:p>
          </table:table-cell>
          <table:table-cell table:style-name="ce66" table:formula="of:=IF([.F74]=&quot;&quot;;&quot;&quot;;[.F74]/SQRT(4))" office:value-type="float" office:value="0.0028867513459482" calcext:value-type="float">
            <text:p>0,0029</text:p>
          </table:table-cell>
          <table:table-cell table:style-name="ce68" table:formula="of:=IF([.E74]=&quot;&quot;;&quot;&quot;;[.E74]-[.B74])" office:value-type="float" office:value="0.0150000000000001" calcext:value-type="float">
            <text:p>0,0150</text:p>
          </table:table-cell>
          <table:table-cell table:style-name="ce69" table:formula="of:=IF([.H74]=&quot;&quot;;&quot;&quot;;ABS([.H74]/[.B74]))" office:value-type="percentage" office:value="0.00500000000000004" calcext:value-type="percentage">
            <text:p>0,50%</text:p>
          </table:table-cell>
          <table:table-cell table:style-name="ce67" table:formula="of:=IF([.C50]=&quot;&quot;;&quot;&quot;;AVERAGE([.D50];[.G50]))" office:value-type="float" office:value="3" calcext:value-type="float">
            <text:p>3,000</text:p>
          </table:table-cell>
          <table:table-cell table:style-name="ce43" table:formula="of:=IF([.D50]=&quot;&quot;;&quot;&quot;;AVERAGE([.E50];[.H50]))" office:value-type="float" office:value="3.015" calcext:value-type="float">
            <text:p>3,02</text:p>
          </table:table-cell>
          <table:table-cell table:style-name="ce70" table:formula="of:=IF([.J74]=&quot;&quot;;&quot;&quot;;ABS([.K74]-[.J74]))" office:value-type="float" office:value="0.0149999999999997" calcext:value-type="float">
            <text:p>0,01</text:p>
          </table:table-cell>
          <table:table-cell table:style-name="ce67" table:formula="of:=IF([.I50]=&quot;&quot;;&quot;&quot;;AVERAGE([.J50];[.M50]))" office:value-type="float" office:value="3" calcext:value-type="float">
            <text:p>3,000</text:p>
          </table:table-cell>
          <table:table-cell table:style-name="ce43" table:formula="of:=IF([.I50]=&quot;&quot;;&quot;&quot;;AVERAGE([.K50];[.N50]))" office:value-type="float" office:value="3.015" calcext:value-type="float">
            <text:p>3,02</text:p>
          </table:table-cell>
          <table:table-cell table:style-name="ce70" table:formula="of:=IF([.M74]=&quot;&quot;;&quot;&quot;;ABS([.N74]-[.M74]))" office:value-type="float" office:value="0.0150000000000001" calcext:value-type="float">
            <text:p>0,02</text:p>
          </table:table-cell>
          <table:table-cell table:style-name="ce71" table:formula="of:=IF([.L74]=&quot;&quot;;&quot;&quot;;MAX([.L74];[.O74]))" office:value-type="float" office:value="0.0150000000000001" calcext:value-type="float">
            <text:p>0,015</text:p>
          </table:table-cell>
          <table:table-cell table:style-name="ce67" table:formula="of:=IF(OR([.E74]=&quot;&quot;;[.E74]=0);&quot;--------&quot;;[$Incerteza.I49])" office:value-type="float" office:value="0.07" calcext:value-type="float">
            <text:p>0,070</text:p>
          </table:table-cell>
          <table:table-cell table:style-name="ce67" table:formula="of:=IF(OR([.E74]=&quot;&quot;;[.E74]=0);&quot;--------&quot;;[$Incerteza.I48])" office:value-type="float" office:value="2.00003189221608" calcext:value-type="float">
            <text:p>2,000</text:p>
          </table:table-cell>
          <table:table-cell table:style-name="ce67" table:formula="of:=IF(OR([.E74]=&quot;&quot;;[.E74]=0);&quot;--------&quot;;IF([$Incerteza.I46]&gt;1000;&quot;Infinito&quot;;[$Incerteza.I46]))" office:value-type="float" office:value="0.032691742144399" calcext:value-type="float">
            <text:p>0,033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4" calcext:value-type="float">
            <text:p>4</text:p>
          </table:table-cell>
          <table:table-cell table:style-name="ce66" table:formula="of:=IF([.C51]=&quot;&quot;;&quot;&quot;;AVERAGE([.D51];[.G51];[.J51];[.M51]))" office:value-type="float" office:value="4" calcext:value-type="float">
            <text:p>4,0000</text:p>
          </table:table-cell>
          <table:table-cell table:style-name="ce66" table:formula="of:=IF([.B75]=&quot;&quot;;&quot;&quot;;STDEV([.D51];[.G51];[.J51];[.M51]))" office:value-type="float" office:value="0" calcext:value-type="float">
            <text:p>0,0000</text:p>
          </table:table-cell>
          <table:table-cell table:style-name="ce66" table:formula="of:=IF([.C75]=&quot;&quot;;&quot;&quot;;[.C75]/SQRT(4))" office:value-type="float" office:value="0" calcext:value-type="float">
            <text:p>0,0000</text:p>
          </table:table-cell>
          <table:table-cell table:style-name="ce67" table:formula="of:=IF([.E51]=&quot;&quot;;&quot;&quot;;AVERAGE([.E51];[.H51];[.K51];[.N51])-[.E106])" office:value-type="float" office:value="4.005" calcext:value-type="float">
            <text:p>4,005</text:p>
          </table:table-cell>
          <table:table-cell table:style-name="ce66" table:formula="of:=IF([.E75]=&quot;&quot;;&quot;&quot;;STDEV([.E51];[.H51];[.K51];[.N51]))" office:value-type="float" office:value="0.00577350269189614" calcext:value-type="float">
            <text:p>0,0058</text:p>
          </table:table-cell>
          <table:table-cell table:style-name="ce66" table:formula="of:=IF([.F75]=&quot;&quot;;&quot;&quot;;[.F75]/SQRT(4))" office:value-type="float" office:value="0.00288675134594807" calcext:value-type="float">
            <text:p>0,0029</text:p>
          </table:table-cell>
          <table:table-cell table:style-name="ce68" table:formula="of:=IF([.E75]=&quot;&quot;;&quot;&quot;;[.E75]-[.B75])" office:value-type="float" office:value="0.00499999999999989" calcext:value-type="float">
            <text:p>0,0050</text:p>
          </table:table-cell>
          <table:table-cell table:style-name="ce69" table:formula="of:=IF([.H75]=&quot;&quot;;&quot;&quot;;ABS([.H75]/[.B75]))" office:value-type="percentage" office:value="0.00124999999999997" calcext:value-type="percentage">
            <text:p>0,12%</text:p>
          </table:table-cell>
          <table:table-cell table:style-name="ce67" table:formula="of:=IF([.C51]=&quot;&quot;;&quot;&quot;;AVERAGE([.D51];[.G51]))" office:value-type="float" office:value="4" calcext:value-type="float">
            <text:p>4,000</text:p>
          </table:table-cell>
          <table:table-cell table:style-name="ce43" table:formula="of:=IF([.D51]=&quot;&quot;;&quot;&quot;;AVERAGE([.E51];[.H51]))" office:value-type="float" office:value="4.005" calcext:value-type="float">
            <text:p>4,01</text:p>
          </table:table-cell>
          <table:table-cell table:style-name="ce70" table:formula="of:=IF([.J75]=&quot;&quot;;&quot;&quot;;ABS([.K75]-[.J75]))" office:value-type="float" office:value="0.00499999999999989" calcext:value-type="float">
            <text:p>0,00</text:p>
          </table:table-cell>
          <table:table-cell table:style-name="ce67" table:formula="of:=IF([.I51]=&quot;&quot;;&quot;&quot;;AVERAGE([.J51];[.M51]))" office:value-type="float" office:value="4" calcext:value-type="float">
            <text:p>4,000</text:p>
          </table:table-cell>
          <table:table-cell table:style-name="ce43" table:formula="of:=IF([.I51]=&quot;&quot;;&quot;&quot;;AVERAGE([.K51];[.N51]))" office:value-type="float" office:value="4.005" calcext:value-type="float">
            <text:p>4,01</text:p>
          </table:table-cell>
          <table:table-cell table:style-name="ce70" table:formula="of:=IF([.M75]=&quot;&quot;;&quot;&quot;;ABS([.N75]-[.M75]))" office:value-type="float" office:value="0.00499999999999989" calcext:value-type="float">
            <text:p>0,00</text:p>
          </table:table-cell>
          <table:table-cell table:style-name="ce71" table:formula="of:=IF([.L75]=&quot;&quot;;&quot;&quot;;MAX([.L75];[.O75]))" office:value-type="float" office:value="0.00499999999999989" calcext:value-type="float">
            <text:p>0,005</text:p>
          </table:table-cell>
          <table:table-cell table:style-name="ce67" table:formula="of:=IF(OR([.E75]=&quot;&quot;;[.E75]=0);&quot;--------&quot;;[$Incerteza.I65])" office:value-type="float" office:value="0.07" calcext:value-type="float">
            <text:p>0,070</text:p>
          </table:table-cell>
          <table:table-cell table:style-name="ce67" table:formula="of:=IF(OR([.E75]=&quot;&quot;;[.E75]=0);&quot;--------&quot;;[$Incerteza.I64])" office:value-type="float" office:value="2.00004186514818" calcext:value-type="float">
            <text:p>2,000</text:p>
          </table:table-cell>
          <table:table-cell table:style-name="ce67" table:formula="of:=IF(OR([.E75]=&quot;&quot;;[.E75]=0);&quot;--------&quot;;IF([$Incerteza.I62]&gt;1000;&quot;Infinito&quot;;[$Incerteza.I62]))" office:value-type="float" office:value="0.0352668399908985" calcext:value-type="float">
            <text:p>0,035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5" calcext:value-type="float">
            <text:p>5</text:p>
          </table:table-cell>
          <table:table-cell table:style-name="ce66" table:formula="of:=IF([.C52]=&quot;&quot;;&quot;&quot;;AVERAGE([.D52];[.G52];[.J52];[.M52]))" office:value-type="float" office:value="5" calcext:value-type="float">
            <text:p>5,0000</text:p>
          </table:table-cell>
          <table:table-cell table:style-name="ce66" table:formula="of:=IF([.B76]=&quot;&quot;;&quot;&quot;;STDEV([.D52];[.G52];[.J52];[.M52]))" office:value-type="float" office:value="0" calcext:value-type="float">
            <text:p>0,0000</text:p>
          </table:table-cell>
          <table:table-cell table:style-name="ce66" table:formula="of:=IF([.C76]=&quot;&quot;;&quot;&quot;;[.C76]/SQRT(4))" office:value-type="float" office:value="0" calcext:value-type="float">
            <text:p>0,0000</text:p>
          </table:table-cell>
          <table:table-cell table:style-name="ce67" table:formula="of:=IF([.E52]=&quot;&quot;;&quot;&quot;;AVERAGE([.E52];[.H52];[.K52];[.N52])-[.E107])" office:value-type="float" office:value="5.005" calcext:value-type="float">
            <text:p>5,005</text:p>
          </table:table-cell>
          <table:table-cell table:style-name="ce66" table:formula="of:=IF([.E76]=&quot;&quot;;&quot;&quot;;STDEV([.E52];[.H52];[.K52];[.N52]))" office:value-type="float" office:value="0.00577350269189614" calcext:value-type="float">
            <text:p>0,0058</text:p>
          </table:table-cell>
          <table:table-cell table:style-name="ce66" table:formula="of:=IF([.F76]=&quot;&quot;;&quot;&quot;;[.F76]/SQRT(4))" office:value-type="float" office:value="0.00288675134594807" calcext:value-type="float">
            <text:p>0,0029</text:p>
          </table:table-cell>
          <table:table-cell table:style-name="ce68" table:formula="of:=IF([.E76]=&quot;&quot;;&quot;&quot;;[.E76]-[.B76])" office:value-type="float" office:value="0.00499999999999989" calcext:value-type="float">
            <text:p>0,0050</text:p>
          </table:table-cell>
          <table:table-cell table:style-name="ce69" table:formula="of:=IF([.H76]=&quot;&quot;;&quot;&quot;;ABS([.H76]/[.B76]))" office:value-type="percentage" office:value="0.000999999999999979" calcext:value-type="percentage">
            <text:p>0,10%</text:p>
          </table:table-cell>
          <table:table-cell table:style-name="ce67" table:formula="of:=IF([.C52]=&quot;&quot;;&quot;&quot;;AVERAGE([.D52];[.G52]))" office:value-type="float" office:value="5" calcext:value-type="float">
            <text:p>5,000</text:p>
          </table:table-cell>
          <table:table-cell table:style-name="ce43" table:formula="of:=IF([.D52]=&quot;&quot;;&quot;&quot;;AVERAGE([.E52];[.H52]))" office:value-type="float" office:value="5.005" calcext:value-type="float">
            <text:p>5,01</text:p>
          </table:table-cell>
          <table:table-cell table:style-name="ce70" table:formula="of:=IF([.J76]=&quot;&quot;;&quot;&quot;;ABS([.K76]-[.J76]))" office:value-type="float" office:value="0.00499999999999989" calcext:value-type="float">
            <text:p>0,00</text:p>
          </table:table-cell>
          <table:table-cell table:style-name="ce67" table:formula="of:=IF([.I52]=&quot;&quot;;&quot;&quot;;AVERAGE([.J52];[.M52]))" office:value-type="float" office:value="5" calcext:value-type="float">
            <text:p>5,000</text:p>
          </table:table-cell>
          <table:table-cell table:style-name="ce43" table:formula="of:=IF([.I52]=&quot;&quot;;&quot;&quot;;AVERAGE([.K52];[.N52]))" office:value-type="float" office:value="5.005" calcext:value-type="float">
            <text:p>5,01</text:p>
          </table:table-cell>
          <table:table-cell table:style-name="ce70" table:formula="of:=IF([.M76]=&quot;&quot;;&quot;&quot;;ABS([.N76]-[.M76]))" office:value-type="float" office:value="0.00499999999999989" calcext:value-type="float">
            <text:p>0,00</text:p>
          </table:table-cell>
          <table:table-cell table:style-name="ce71" table:formula="of:=IF([.L76]=&quot;&quot;;&quot;&quot;;MAX([.L76];[.O76]))" office:value-type="float" office:value="0.00499999999999989" calcext:value-type="float">
            <text:p>0,005</text:p>
          </table:table-cell>
          <table:table-cell table:style-name="ce67" table:formula="of:=IF(OR([.E76]=&quot;&quot;;[.E76]=0);&quot;--------&quot;;[$Incerteza.I81])" office:value-type="float" office:value="0.08" calcext:value-type="float">
            <text:p>0,080</text:p>
          </table:table-cell>
          <table:table-cell table:style-name="ce67" table:formula="of:=IF(OR([.E76]=&quot;&quot;;[.E76]=0);&quot;--------&quot;;[$Incerteza.I80])" office:value-type="float" office:value="2.0000574413771" calcext:value-type="float">
            <text:p>2,000</text:p>
          </table:table-cell>
          <table:table-cell table:style-name="ce67" table:formula="of:=IF(OR([.E76]=&quot;&quot;;[.E76]=0);&quot;--------&quot;;IF([$Incerteza.I78]&gt;1000;&quot;Infinito&quot;;[$Incerteza.I78]))" office:value-type="float" office:value="0.0383242743181843" calcext:value-type="float">
            <text:p>0,038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6" calcext:value-type="float">
            <text:p>6</text:p>
          </table:table-cell>
          <table:table-cell table:style-name="ce66" table:formula="of:=IF([.C53]=&quot;&quot;;&quot;&quot;;AVERAGE([.D53];[.G53];[.J53];[.M53]))" office:value-type="float" office:value="7" calcext:value-type="float">
            <text:p>7,0000</text:p>
          </table:table-cell>
          <table:table-cell table:style-name="ce66" table:formula="of:=IF([.B77]=&quot;&quot;;&quot;&quot;;STDEV([.D53];[.G53];[.J53];[.M53]))" office:value-type="float" office:value="0" calcext:value-type="float">
            <text:p>0,0000</text:p>
          </table:table-cell>
          <table:table-cell table:style-name="ce66" table:formula="of:=IF([.C77]=&quot;&quot;;&quot;&quot;;[.C77]/SQRT(4))" office:value-type="float" office:value="0" calcext:value-type="float">
            <text:p>0,0000</text:p>
          </table:table-cell>
          <table:table-cell table:style-name="ce67" table:formula="of:=IF([.E53]=&quot;&quot;;&quot;&quot;;AVERAGE([.E53];[.H53];[.K53];[.N53])-[.E108])" office:value-type="float" office:value="7.01" calcext:value-type="float">
            <text:p>7,010</text:p>
          </table:table-cell>
          <table:table-cell table:style-name="ce66" table:formula="of:=IF([.E77]=&quot;&quot;;&quot;&quot;;STDEV([.E53];[.H53];[.K53];[.N53]))" office:value-type="float" office:value="0" calcext:value-type="float">
            <text:p>0,0000</text:p>
          </table:table-cell>
          <table:table-cell table:style-name="ce66" table:formula="of:=IF([.F77]=&quot;&quot;;&quot;&quot;;[.F77]/SQRT(4))" office:value-type="float" office:value="0" calcext:value-type="float">
            <text:p>0,0000</text:p>
          </table:table-cell>
          <table:table-cell table:style-name="ce68" table:formula="of:=IF([.E77]=&quot;&quot;;&quot;&quot;;[.E77]-[.B77])" office:value-type="float" office:value="0.00999999999999979" calcext:value-type="float">
            <text:p>0,0100</text:p>
          </table:table-cell>
          <table:table-cell table:style-name="ce69" table:formula="of:=IF([.H77]=&quot;&quot;;&quot;&quot;;ABS([.H77]/[.B77]))" office:value-type="percentage" office:value="0.0014285714285714" calcext:value-type="percentage">
            <text:p>0,14%</text:p>
          </table:table-cell>
          <table:table-cell table:style-name="ce67" table:formula="of:=IF([.C53]=&quot;&quot;;&quot;&quot;;AVERAGE([.D53];[.G53]))" office:value-type="float" office:value="7" calcext:value-type="float">
            <text:p>7,000</text:p>
          </table:table-cell>
          <table:table-cell table:style-name="ce42" table:formula="of:=IF([.D53]=&quot;&quot;;&quot;&quot;;AVERAGE([.E53];[.H53]))" office:value-type="float" office:value="7.01" calcext:value-type="float">
            <text:p>7,01</text:p>
          </table:table-cell>
          <table:table-cell table:style-name="ce70" table:formula="of:=IF([.J77]=&quot;&quot;;&quot;&quot;;ABS([.K77]-[.J77]))" office:value-type="float" office:value="0.00999999999999979" calcext:value-type="float">
            <text:p>0,01</text:p>
          </table:table-cell>
          <table:table-cell table:style-name="ce67" table:formula="of:=IF([.I53]=&quot;&quot;;&quot;&quot;;AVERAGE([.J53];[.M53]))" office:value-type="float" office:value="7" calcext:value-type="float">
            <text:p>7,000</text:p>
          </table:table-cell>
          <table:table-cell table:style-name="ce43" table:formula="of:=IF([.I53]=&quot;&quot;;&quot;&quot;;AVERAGE([.K53];[.N53]))" office:value-type="float" office:value="7.01" calcext:value-type="float">
            <text:p>7,01</text:p>
          </table:table-cell>
          <table:table-cell table:style-name="ce70" table:formula="of:=IF([.M77]=&quot;&quot;;&quot;&quot;;ABS([.N77]-[.M77]))" office:value-type="float" office:value="0.00999999999999979" calcext:value-type="float">
            <text:p>0,01</text:p>
          </table:table-cell>
          <table:table-cell table:style-name="ce71" table:formula="of:=IF([.L77]=&quot;&quot;;&quot;&quot;;MAX([.L77];[.O77]))" office:value-type="float" office:value="0.00999999999999979" calcext:value-type="float">
            <text:p>0,010</text:p>
          </table:table-cell>
          <table:table-cell table:style-name="ce67" table:formula="of:=IF(OR([.E77]=&quot;&quot;;[.E77]=0);&quot;--------&quot;;[$Incerteza.I97])" office:value-type="float" office:value="0.09" calcext:value-type="float">
            <text:p>0,090</text:p>
          </table:table-cell>
          <table:table-cell table:style-name="ce67" table:formula="of:=IF(OR([.E77]=&quot;&quot;;[.E77]=0);&quot;--------&quot;;[$Incerteza.I96])" office:value-type="float" office:value="2.00009434995951" calcext:value-type="float">
            <text:p>2,000</text:p>
          </table:table-cell>
          <table:table-cell table:style-name="ce67" table:formula="of:=IF(OR([.E77]=&quot;&quot;;[.E77]=0);&quot;--------&quot;;IF([$Incerteza.I94]&gt;1000;&quot;Infinito&quot;;[$Incerteza.I94]))" office:value-type="float" office:value="0.0454606056705117" calcext:value-type="float">
            <text:p>0,045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7" calcext:value-type="float">
            <text:p>7</text:p>
          </table:table-cell>
          <table:table-cell table:style-name="ce66" table:formula="of:=IF([.C54]=&quot;&quot;;&quot;&quot;;AVERAGE([.D54];[.G54];[.J54];[.M54]))">
            <text:p/>
          </table:table-cell>
          <table:table-cell table:style-name="ce66" table:formula="of:=IF([.B78]=&quot;&quot;;&quot;&quot;;STDEV([.D54];[.G54];[.J54];[.M54]))">
            <text:p/>
          </table:table-cell>
          <table:table-cell table:style-name="ce66" table:formula="of:=IF([.C78]=&quot;&quot;;&quot;&quot;;[.C78]/SQRT(4))">
            <text:p/>
          </table:table-cell>
          <table:table-cell table:style-name="ce67" table:formula="of:=IF([.E54]=&quot;&quot;;&quot;&quot;;AVERAGE([.E54];[.H54];[.K54];[.N54])-[.E109])">
            <text:p/>
          </table:table-cell>
          <table:table-cell table:style-name="ce66" table:formula="of:=IF([.E78]=&quot;&quot;;&quot;&quot;;STDEV([.E54];[.H54];[.K54];[.N54]))">
            <text:p/>
          </table:table-cell>
          <table:table-cell table:style-name="ce66" table:formula="of:=IF([.F78]=&quot;&quot;;&quot;&quot;;[.F78]/SQRT(4))">
            <text:p/>
          </table:table-cell>
          <table:table-cell table:style-name="ce68" table:formula="of:=IF([.E78]=&quot;&quot;;&quot;&quot;;[.E78]-[.B78])">
            <text:p/>
          </table:table-cell>
          <table:table-cell table:style-name="ce69" table:formula="of:=IF([.H78]=&quot;&quot;;&quot;&quot;;ABS([.H78]/[.B78]))">
            <text:p/>
          </table:table-cell>
          <table:table-cell table:style-name="ce42" table:formula="of:=IF([.C54]=&quot;&quot;;&quot;&quot;;AVERAGE([.D54];[.G54]))">
            <text:p/>
          </table:table-cell>
          <table:table-cell table:style-name="ce42" table:formula="of:=IF([.D54]=&quot;&quot;;&quot;&quot;;AVERAGE([.E54];[.H54]))">
            <text:p/>
          </table:table-cell>
          <table:table-cell table:style-name="ce70" table:formula="of:=IF([.J78]=&quot;&quot;;&quot;&quot;;ABS([.K78]-[.J78]))">
            <text:p/>
          </table:table-cell>
          <table:table-cell table:style-name="ce42" table:formula="of:=IF([.I54]=&quot;&quot;;&quot;&quot;;AVERAGE([.J54];[.M54]))">
            <text:p/>
          </table:table-cell>
          <table:table-cell table:style-name="ce43" table:formula="of:=IF([.I54]=&quot;&quot;;&quot;&quot;;AVERAGE([.K54];[.N54]))">
            <text:p/>
          </table:table-cell>
          <table:table-cell table:style-name="ce70" table:formula="of:=IF([.M78]=&quot;&quot;;&quot;&quot;;ABS([.N78]-[.M78]))">
            <text:p/>
          </table:table-cell>
          <table:table-cell table:style-name="ce71" table:formula="of:=IF([.L78]=&quot;&quot;;&quot;&quot;;MAX([.L78];[.O78]))">
            <text:p/>
          </table:table-cell>
          <table:table-cell table:style-name="ce67" table:formula="of:=IF(OR([.E78]=&quot;&quot;;[.E78]=0);&quot;--------&quot;;[$Incerteza.I113])" office:value-type="string" office:string-value="--------" calcext:value-type="string">
            <text:p>--------</text:p>
          </table:table-cell>
          <table:table-cell table:style-name="ce67" table:formula="of:=IF(OR([.E78]=&quot;&quot;;[.E78]=0);&quot;--------&quot;;[$Incerteza.I112])" office:value-type="string" office:string-value="--------" calcext:value-type="string">
            <text:p>--------</text:p>
          </table:table-cell>
          <table:table-cell table:style-name="ce67" table:formula="of:=IF(OR([.E78]=&quot;&quot;;[.E78]=0);&quot;--------&quot;;IF([$Incerteza.I110]&gt;1000;&quot;Infinito&quot;;[$Incerteza.I110]))" office:value-type="string" office:string-value="--------" calcext:value-type="string">
            <text:p>--------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8" calcext:value-type="float">
            <text:p>8</text:p>
          </table:table-cell>
          <table:table-cell table:style-name="ce66" table:formula="of:=IF([.C55]=&quot;&quot;;&quot;&quot;;AVERAGE([.D55];[.G55];[.J55];[.M55]))">
            <text:p/>
          </table:table-cell>
          <table:table-cell table:style-name="ce66" table:formula="of:=IF([.B79]=&quot;&quot;;&quot;&quot;;STDEV([.D55];[.G55];[.J55];[.M55]))">
            <text:p/>
          </table:table-cell>
          <table:table-cell table:style-name="ce66" table:formula="of:=IF([.C79]=&quot;&quot;;&quot;&quot;;[.C79]/SQRT(4))">
            <text:p/>
          </table:table-cell>
          <table:table-cell table:style-name="ce67" table:formula="of:=IF([.E55]=&quot;&quot;;&quot;&quot;;AVERAGE([.E55];[.H55];[.K55];[.N55])-[.E110])">
            <text:p/>
          </table:table-cell>
          <table:table-cell table:style-name="ce66" table:formula="of:=IF([.E79]=&quot;&quot;;&quot;&quot;;STDEV([.E55];[.H55];[.K55];[.N55]))">
            <text:p/>
          </table:table-cell>
          <table:table-cell table:style-name="ce66" table:formula="of:=IF([.F79]=&quot;&quot;;&quot;&quot;;[.F79]/SQRT(4))">
            <text:p/>
          </table:table-cell>
          <table:table-cell table:style-name="ce68" table:formula="of:=IF([.E79]=&quot;&quot;;&quot;&quot;;[.E79]-[.B79])">
            <text:p/>
          </table:table-cell>
          <table:table-cell table:style-name="ce69" table:formula="of:=IF([.H79]=&quot;&quot;;&quot;&quot;;ABS([.H79]/[.B79]))">
            <text:p/>
          </table:table-cell>
          <table:table-cell table:style-name="ce42" table:formula="of:=IF([.C55]=&quot;&quot;;&quot;&quot;;AVERAGE([.D55];[.G55]))">
            <text:p/>
          </table:table-cell>
          <table:table-cell table:style-name="ce42" table:formula="of:=IF([.D55]=&quot;&quot;;&quot;&quot;;AVERAGE([.E55];[.H55]))">
            <text:p/>
          </table:table-cell>
          <table:table-cell table:style-name="ce70" table:formula="of:=IF([.J79]=&quot;&quot;;&quot;&quot;;ABS([.K79]-[.J79]))">
            <text:p/>
          </table:table-cell>
          <table:table-cell table:style-name="ce42" table:formula="of:=IF([.I55]=&quot;&quot;;&quot;&quot;;AVERAGE([.J55];[.M55]))">
            <text:p/>
          </table:table-cell>
          <table:table-cell table:style-name="ce43" table:formula="of:=IF([.I55]=&quot;&quot;;&quot;&quot;;AVERAGE([.K55];[.N55]))">
            <text:p/>
          </table:table-cell>
          <table:table-cell table:style-name="ce70" table:formula="of:=IF([.M79]=&quot;&quot;;&quot;&quot;;ABS([.N79]-[.M79]))">
            <text:p/>
          </table:table-cell>
          <table:table-cell table:style-name="ce71" table:formula="of:=IF([.L79]=&quot;&quot;;&quot;&quot;;MAX([.L79];[.O79]))">
            <text:p/>
          </table:table-cell>
          <table:table-cell table:style-name="ce67" table:formula="of:=IF(OR([.E79]=&quot;&quot;;[.E79]=0);&quot;--------&quot;;[$Incerteza.V17])" office:value-type="string" office:string-value="--------" calcext:value-type="string">
            <text:p>--------</text:p>
          </table:table-cell>
          <table:table-cell table:style-name="ce67" table:formula="of:=IF(OR([.E79]=&quot;&quot;;[.E79]=0);&quot;--------&quot;;[$Incerteza.V16])" office:value-type="string" office:string-value="--------" calcext:value-type="string">
            <text:p>--------</text:p>
          </table:table-cell>
          <table:table-cell table:style-name="ce67" table:formula="of:=IF(OR([.E79]=&quot;&quot;;[.E79]=0);&quot;--------&quot;;IF([$Incerteza.V14]&gt;1000;&quot;Infinito&quot;;[$Incerteza.V14]))" office:value-type="string" office:string-value="--------" calcext:value-type="string">
            <text:p>--------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9" calcext:value-type="float">
            <text:p>9</text:p>
          </table:table-cell>
          <table:table-cell table:style-name="ce66" table:formula="of:=IF([.C56]=&quot;&quot;;&quot;&quot;;AVERAGE([.D56];[.G56];[.J56];[.M56]))">
            <text:p/>
          </table:table-cell>
          <table:table-cell table:style-name="ce66" table:formula="of:=IF([.B80]=&quot;&quot;;&quot;&quot;;STDEV([.D56];[.G56];[.J56];[.M56]))">
            <text:p/>
          </table:table-cell>
          <table:table-cell table:style-name="ce66" table:formula="of:=IF([.C80]=&quot;&quot;;&quot;&quot;;[.C80]/SQRT(4))">
            <text:p/>
          </table:table-cell>
          <table:table-cell table:style-name="ce67" table:formula="of:=IF([.E56]=&quot;&quot;;&quot;&quot;;AVERAGE([.E56];[.H56];[.K56];[.N56])-[.E111])">
            <text:p/>
          </table:table-cell>
          <table:table-cell table:style-name="ce66" table:formula="of:=IF([.E80]=&quot;&quot;;&quot;&quot;;STDEV([.E56];[.H56];[.K56];[.N56]))">
            <text:p/>
          </table:table-cell>
          <table:table-cell table:style-name="ce66" table:formula="of:=IF([.F80]=&quot;&quot;;&quot;&quot;;[.F80]/SQRT(4))">
            <text:p/>
          </table:table-cell>
          <table:table-cell table:style-name="ce68" table:formula="of:=IF([.E80]=&quot;&quot;;&quot;&quot;;[.E80]-[.B80])">
            <text:p/>
          </table:table-cell>
          <table:table-cell table:style-name="ce69" table:formula="of:=IF([.H80]=&quot;&quot;;&quot;&quot;;ABS([.H80]/[.B80]))">
            <text:p/>
          </table:table-cell>
          <table:table-cell table:style-name="ce42" table:formula="of:=IF([.C56]=&quot;&quot;;&quot;&quot;;AVERAGE([.D56];[.G56]))">
            <text:p/>
          </table:table-cell>
          <table:table-cell table:style-name="ce42" table:formula="of:=IF([.D56]=&quot;&quot;;&quot;&quot;;AVERAGE([.E56];[.H56]))">
            <text:p/>
          </table:table-cell>
          <table:table-cell table:style-name="ce70" table:formula="of:=IF([.J80]=&quot;&quot;;&quot;&quot;;ABS([.K80]-[.J80]))">
            <text:p/>
          </table:table-cell>
          <table:table-cell table:style-name="ce42" table:formula="of:=IF([.I56]=&quot;&quot;;&quot;&quot;;AVERAGE([.J56];[.M56]))">
            <text:p/>
          </table:table-cell>
          <table:table-cell table:style-name="ce43" table:formula="of:=IF([.I56]=&quot;&quot;;&quot;&quot;;AVERAGE([.K56];[.N56]))">
            <text:p/>
          </table:table-cell>
          <table:table-cell table:style-name="ce70" table:formula="of:=IF([.M80]=&quot;&quot;;&quot;&quot;;ABS([.N80]-[.M80]))">
            <text:p/>
          </table:table-cell>
          <table:table-cell table:style-name="ce71" table:formula="of:=IF([.L80]=&quot;&quot;;&quot;&quot;;MAX([.L80];[.O80]))">
            <text:p/>
          </table:table-cell>
          <table:table-cell table:style-name="ce67" table:formula="of:=IF(OR([.E80]=&quot;&quot;;[.E80]=0);&quot;--------&quot;;[$Incerteza.I40])" office:value-type="string" office:string-value="--------" calcext:value-type="string">
            <text:p>--------</text:p>
          </table:table-cell>
          <table:table-cell table:style-name="ce67" table:formula="of:=IF(OR([.E80]=&quot;&quot;;[.E80]=0);&quot;--------&quot;;[$Incerteza.I39])" office:value-type="string" office:string-value="--------" calcext:value-type="string">
            <text:p>--------</text:p>
          </table:table-cell>
          <table:table-cell table:style-name="ce67" table:formula="of:=IF(OR([.E80]=&quot;&quot;;[.E80]=0);&quot;--------&quot;;IF([$Incerteza.K37]&gt;1000;&quot;Infinito&quot;;[$Incerteza.K37]))" office:value-type="string" office:string-value="--------" calcext:value-type="string">
            <text:p>--------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10" calcext:value-type="float">
            <text:p>10</text:p>
          </table:table-cell>
          <table:table-cell table:style-name="ce66" table:formula="of:=IF([.C57]=&quot;&quot;;&quot;&quot;;AVERAGE([.D57];[.G57];[.J57];[.M57]))">
            <text:p/>
          </table:table-cell>
          <table:table-cell table:style-name="ce66" table:formula="of:=IF([.B81]=&quot;&quot;;&quot;&quot;;STDEV([.D57];[.G57];[.J57];[.M57]))">
            <text:p/>
          </table:table-cell>
          <table:table-cell table:style-name="ce66" table:formula="of:=IF([.C81]=&quot;&quot;;&quot;&quot;;[.C81]/SQRT(4))">
            <text:p/>
          </table:table-cell>
          <table:table-cell table:style-name="ce67" table:formula="of:=IF([.E57]=&quot;&quot;;&quot;&quot;;AVERAGE([.E57];[.H57];[.K57];[.N57])-[.E112])">
            <text:p/>
          </table:table-cell>
          <table:table-cell table:style-name="ce66" table:formula="of:=IF([.E81]=&quot;&quot;;&quot;&quot;;STDEV([.E57];[.H57];[.K57];[.N57]))">
            <text:p/>
          </table:table-cell>
          <table:table-cell table:style-name="ce66" table:formula="of:=IF([.F81]=&quot;&quot;;&quot;&quot;;[.F81]/SQRT(4))">
            <text:p/>
          </table:table-cell>
          <table:table-cell table:style-name="ce68" table:formula="of:=IF([.E81]=&quot;&quot;;&quot;&quot;;[.E81]-[.B81])">
            <text:p/>
          </table:table-cell>
          <table:table-cell table:style-name="ce69" table:formula="of:=IF([.H81]=&quot;&quot;;&quot;&quot;;ABS([.H81]/[.B81]))">
            <text:p/>
          </table:table-cell>
          <table:table-cell table:style-name="ce42" table:formula="of:=IF([.C57]=&quot;&quot;;&quot;&quot;;AVERAGE([.D57];[.G57]))">
            <text:p/>
          </table:table-cell>
          <table:table-cell table:style-name="ce42" table:formula="of:=IF([.D57]=&quot;&quot;;&quot;&quot;;AVERAGE([.E57];[.H57]))">
            <text:p/>
          </table:table-cell>
          <table:table-cell table:style-name="ce70" table:formula="of:=IF([.J81]=&quot;&quot;;&quot;&quot;;ABS([.K81]-[.J81]))">
            <text:p/>
          </table:table-cell>
          <table:table-cell table:style-name="ce42" table:formula="of:=IF([.I57]=&quot;&quot;;&quot;&quot;;AVERAGE([.J57];[.M57]))">
            <text:p/>
          </table:table-cell>
          <table:table-cell table:style-name="ce43" table:formula="of:=IF([.I57]=&quot;&quot;;&quot;&quot;;AVERAGE([.K57];[.N57]))">
            <text:p/>
          </table:table-cell>
          <table:table-cell table:style-name="ce70" table:formula="of:=IF([.M81]=&quot;&quot;;&quot;&quot;;ABS([.N81]-[.M81]))">
            <text:p/>
          </table:table-cell>
          <table:table-cell table:style-name="ce71" table:formula="of:=IF([.L81]=&quot;&quot;;&quot;&quot;;MAX([.L81];[.O81]))">
            <text:p/>
          </table:table-cell>
          <table:table-cell table:style-name="ce67" table:formula="of:=IF(OR([.E81]=&quot;&quot;;[.E81]=0);&quot;--------&quot;;[$Incerteza.I41])" office:value-type="string" office:string-value="--------" calcext:value-type="string">
            <text:p>--------</text:p>
          </table:table-cell>
          <table:table-cell table:style-name="ce67" table:formula="of:=IF(OR([.E81]=&quot;&quot;;[.E81]=0);&quot;--------&quot;;[$Incerteza.I40])" office:value-type="string" office:string-value="--------" calcext:value-type="string">
            <text:p>--------</text:p>
          </table:table-cell>
          <table:table-cell table:style-name="ce67" table:formula="of:=IF(OR([.E81]=&quot;&quot;;[.E81]=0);&quot;--------&quot;;IF([$Incerteza.K38]&gt;1000;&quot;Infinito&quot;;[$Incerteza.K38]))" office:value-type="string" office:string-value="--------" calcext:value-type="string">
            <text:p>--------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45" office:value-type="float" office:value="11" calcext:value-type="float">
            <text:p>11</text:p>
          </table:table-cell>
          <table:table-cell table:style-name="ce66" table:formula="of:=IF([.C58]=&quot;&quot;;&quot;&quot;;AVERAGE([.D58];[.G58];[.J58];[.M58]))">
            <text:p/>
          </table:table-cell>
          <table:table-cell table:style-name="ce66" table:formula="of:=IF([.B82]=&quot;&quot;;&quot;&quot;;STDEV([.D58];[.G58];[.J58];[.M58]))">
            <text:p/>
          </table:table-cell>
          <table:table-cell table:style-name="ce66" table:formula="of:=IF([.C82]=&quot;&quot;;&quot;&quot;;[.C82]/SQRT(4))">
            <text:p/>
          </table:table-cell>
          <table:table-cell table:style-name="ce67" table:formula="of:=IF([.E58]=&quot;&quot;;&quot;&quot;;AVERAGE([.E58];[.H58];[.K58];[.N58])-[.E113])">
            <text:p/>
          </table:table-cell>
          <table:table-cell table:style-name="ce66" table:formula="of:=IF([.E82]=&quot;&quot;;&quot;&quot;;STDEV([.E58];[.H58];[.K58];[.N58]))">
            <text:p/>
          </table:table-cell>
          <table:table-cell table:style-name="ce66" table:formula="of:=IF([.F82]=&quot;&quot;;&quot;&quot;;[.F82]/SQRT(4))">
            <text:p/>
          </table:table-cell>
          <table:table-cell table:style-name="ce68" table:formula="of:=IF([.E82]=&quot;&quot;;&quot;&quot;;[.E82]-[.B82])">
            <text:p/>
          </table:table-cell>
          <table:table-cell table:style-name="ce69" table:formula="of:=IF([.H82]=&quot;&quot;;&quot;&quot;;ABS([.H82]/[.B82]))">
            <text:p/>
          </table:table-cell>
          <table:table-cell table:style-name="ce42" table:formula="of:=IF([.C58]=&quot;&quot;;&quot;&quot;;AVERAGE([.D58];[.G58]))">
            <text:p/>
          </table:table-cell>
          <table:table-cell table:style-name="ce42" table:formula="of:=IF([.D58]=&quot;&quot;;&quot;&quot;;AVERAGE([.E58];[.H58]))">
            <text:p/>
          </table:table-cell>
          <table:table-cell table:style-name="ce70" table:formula="of:=IF([.J82]=&quot;&quot;;&quot;&quot;;ABS([.K82]-[.J82]))">
            <text:p/>
          </table:table-cell>
          <table:table-cell table:style-name="ce42" table:formula="of:=IF([.I58]=&quot;&quot;;&quot;&quot;;AVERAGE([.J58];[.M58]))">
            <text:p/>
          </table:table-cell>
          <table:table-cell table:style-name="ce43" table:formula="of:=IF([.I58]=&quot;&quot;;&quot;&quot;;AVERAGE([.K58];[.N58]))">
            <text:p/>
          </table:table-cell>
          <table:table-cell table:style-name="ce70" table:formula="of:=IF([.M82]=&quot;&quot;;&quot;&quot;;ABS([.N82]-[.M82]))">
            <text:p/>
          </table:table-cell>
          <table:table-cell table:style-name="ce71" table:formula="of:=IF([.L82]=&quot;&quot;;&quot;&quot;;MAX([.L82];[.O82]))">
            <text:p/>
          </table:table-cell>
          <table:table-cell table:style-name="ce67" table:formula="of:=IF(OR([.E82]=&quot;&quot;;[.E82]=0);&quot;--------&quot;;[$Incerteza.I42])" office:value-type="string" office:string-value="--------" calcext:value-type="string">
            <text:p>--------</text:p>
          </table:table-cell>
          <table:table-cell table:style-name="ce67" table:formula="of:=IF(OR([.E82]=&quot;&quot;;[.E82]=0);&quot;--------&quot;;[$Incerteza.I41])" office:value-type="string" office:string-value="--------" calcext:value-type="string">
            <text:p>--------</text:p>
          </table:table-cell>
          <table:table-cell table:style-name="ce67" table:formula="of:=IF(OR([.E82]=&quot;&quot;;[.E82]=0);&quot;--------&quot;;IF([$Incerteza.K39]&gt;1000;&quot;Infinito&quot;;[$Incerteza.K39]))" office:value-type="string" office:string-value="--------" calcext:value-type="string">
            <text:p>--------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45" office:value-type="float" office:value="12" calcext:value-type="float">
            <text:p>12</text:p>
          </table:table-cell>
          <table:table-cell table:style-name="ce66" table:formula="of:=IF([.C59]=&quot;&quot;;&quot;&quot;;AVERAGE([.D59];[.G59];[.J59];[.M59]))">
            <text:p/>
          </table:table-cell>
          <table:table-cell table:style-name="ce66" table:formula="of:=IF([.B83]=&quot;&quot;;&quot;&quot;;STDEV([.D59];[.G59];[.J59];[.M59]))">
            <text:p/>
          </table:table-cell>
          <table:table-cell table:style-name="ce66" table:formula="of:=IF([.C83]=&quot;&quot;;&quot;&quot;;[.C83]/SQRT(4))">
            <text:p/>
          </table:table-cell>
          <table:table-cell table:style-name="ce67" table:formula="of:=IF([.E59]=&quot;&quot;;&quot;&quot;;AVERAGE([.E59];[.H59];[.K59];[.N59])-[.E114])">
            <text:p/>
          </table:table-cell>
          <table:table-cell table:style-name="ce66" table:formula="of:=IF([.E83]=&quot;&quot;;&quot;&quot;;STDEV([.E59];[.H59];[.K59];[.N59]))">
            <text:p/>
          </table:table-cell>
          <table:table-cell table:style-name="ce66" table:formula="of:=IF([.F83]=&quot;&quot;;&quot;&quot;;[.F83]/SQRT(4))">
            <text:p/>
          </table:table-cell>
          <table:table-cell table:style-name="ce68" table:formula="of:=IF([.E83]=&quot;&quot;;&quot;&quot;;[.E83]-[.B83])">
            <text:p/>
          </table:table-cell>
          <table:table-cell table:style-name="ce69" table:formula="of:=IF([.H83]=&quot;&quot;;&quot;&quot;;ABS([.H83]/[.B83]))">
            <text:p/>
          </table:table-cell>
          <table:table-cell table:style-name="ce42" table:formula="of:=IF([.C59]=&quot;&quot;;&quot;&quot;;AVERAGE([.D59];[.G59]))">
            <text:p/>
          </table:table-cell>
          <table:table-cell table:style-name="ce42" table:formula="of:=IF([.D59]=&quot;&quot;;&quot;&quot;;AVERAGE([.E59];[.H59]))">
            <text:p/>
          </table:table-cell>
          <table:table-cell table:style-name="ce70" table:formula="of:=IF([.J83]=&quot;&quot;;&quot;&quot;;ABS([.K83]-[.J83]))">
            <text:p/>
          </table:table-cell>
          <table:table-cell table:style-name="ce42" table:formula="of:=IF([.I59]=&quot;&quot;;&quot;&quot;;AVERAGE([.J59];[.M59]))">
            <text:p/>
          </table:table-cell>
          <table:table-cell table:style-name="ce43" table:formula="of:=IF([.I59]=&quot;&quot;;&quot;&quot;;AVERAGE([.K59];[.N59]))">
            <text:p/>
          </table:table-cell>
          <table:table-cell table:style-name="ce70" table:formula="of:=IF([.M83]=&quot;&quot;;&quot;&quot;;ABS([.N83]-[.M83]))">
            <text:p/>
          </table:table-cell>
          <table:table-cell table:style-name="ce71" table:formula="of:=IF([.L83]=&quot;&quot;;&quot;&quot;;MAX([.L83];[.O83]))">
            <text:p/>
          </table:table-cell>
          <table:table-cell table:style-name="ce67" table:formula="of:=IF(OR([.E83]=&quot;&quot;;[.E83]=0);&quot;--------&quot;;[$Incerteza.I43])" office:value-type="string" office:string-value="--------" calcext:value-type="string">
            <text:p>--------</text:p>
          </table:table-cell>
          <table:table-cell table:style-name="ce67" table:formula="of:=IF(OR([.E83]=&quot;&quot;;[.E83]=0);&quot;--------&quot;;[$Incerteza.I42])" office:value-type="string" office:string-value="--------" calcext:value-type="string">
            <text:p>--------</text:p>
          </table:table-cell>
          <table:table-cell table:style-name="ce67" table:formula="of:=IF(OR([.E83]=&quot;&quot;;[.E83]=0);&quot;--------&quot;;IF([$Incerteza.K40]&gt;1000;&quot;Infinito&quot;;[$Incerteza.K40]))" office:value-type="string" office:string-value="--------" calcext:value-type="string">
            <text:p>--------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45" office:value-type="float" office:value="13" calcext:value-type="float">
            <text:p>13</text:p>
          </table:table-cell>
          <table:table-cell table:style-name="ce66" table:formula="of:=IF([.C60]=&quot;&quot;;&quot;&quot;;AVERAGE([.D60];[.G60];[.J60];[.M60]))">
            <text:p/>
          </table:table-cell>
          <table:table-cell table:style-name="ce66" table:formula="of:=IF([.B84]=&quot;&quot;;&quot;&quot;;STDEV([.D60];[.G60];[.J60];[.M60]))">
            <text:p/>
          </table:table-cell>
          <table:table-cell table:style-name="ce66" table:formula="of:=IF([.C84]=&quot;&quot;;&quot;&quot;;[.C84]/SQRT(4))">
            <text:p/>
          </table:table-cell>
          <table:table-cell table:style-name="ce67" table:formula="of:=IF([.E60]=&quot;&quot;;&quot;&quot;;AVERAGE([.E60];[.H60];[.K60];[.N60])-[.E115])">
            <text:p/>
          </table:table-cell>
          <table:table-cell table:style-name="ce66" table:formula="of:=IF([.E84]=&quot;&quot;;&quot;&quot;;STDEV([.E60];[.H60];[.K60];[.N60]))">
            <text:p/>
          </table:table-cell>
          <table:table-cell table:style-name="ce66" table:formula="of:=IF([.F84]=&quot;&quot;;&quot;&quot;;[.F84]/SQRT(4))">
            <text:p/>
          </table:table-cell>
          <table:table-cell table:style-name="ce68" table:formula="of:=IF([.E84]=&quot;&quot;;&quot;&quot;;[.E84]-[.B84])">
            <text:p/>
          </table:table-cell>
          <table:table-cell table:style-name="ce69" table:formula="of:=IF([.H84]=&quot;&quot;;&quot;&quot;;ABS([.H84]/[.B84]))">
            <text:p/>
          </table:table-cell>
          <table:table-cell table:style-name="ce42" table:formula="of:=IF([.C60]=&quot;&quot;;&quot;&quot;;AVERAGE([.D60];[.G60]))">
            <text:p/>
          </table:table-cell>
          <table:table-cell table:style-name="ce42" table:formula="of:=IF([.D60]=&quot;&quot;;&quot;&quot;;AVERAGE([.E60];[.H60]))">
            <text:p/>
          </table:table-cell>
          <table:table-cell table:style-name="ce70" table:formula="of:=IF([.J84]=&quot;&quot;;&quot;&quot;;ABS([.K84]-[.J84]))">
            <text:p/>
          </table:table-cell>
          <table:table-cell table:style-name="ce42" table:formula="of:=IF([.I60]=&quot;&quot;;&quot;&quot;;AVERAGE([.J60];[.M60]))">
            <text:p/>
          </table:table-cell>
          <table:table-cell table:style-name="ce43" table:formula="of:=IF([.I60]=&quot;&quot;;&quot;&quot;;AVERAGE([.K60];[.N60]))">
            <text:p/>
          </table:table-cell>
          <table:table-cell table:style-name="ce70" table:formula="of:=IF([.M84]=&quot;&quot;;&quot;&quot;;ABS([.N84]-[.M84]))">
            <text:p/>
          </table:table-cell>
          <table:table-cell table:style-name="ce71" table:formula="of:=IF([.L84]=&quot;&quot;;&quot;&quot;;MAX([.L84];[.O84]))">
            <text:p/>
          </table:table-cell>
          <table:table-cell table:style-name="ce67" table:formula="of:=IF(OR([.E84]=&quot;&quot;;[.E84]=0);&quot;--------&quot;;[$Incerteza.I44])" office:value-type="string" office:string-value="--------" calcext:value-type="string">
            <text:p>--------</text:p>
          </table:table-cell>
          <table:table-cell table:style-name="ce67" table:formula="of:=IF(OR([.E84]=&quot;&quot;;[.E84]=0);&quot;--------&quot;;[$Incerteza.I43])" office:value-type="string" office:string-value="--------" calcext:value-type="string">
            <text:p>--------</text:p>
          </table:table-cell>
          <table:table-cell table:style-name="ce67" table:formula="of:=IF(OR([.E84]=&quot;&quot;;[.E84]=0);&quot;--------&quot;;IF([$Incerteza.K41]&gt;1000;&quot;Infinito&quot;;[$Incerteza.K41]))" office:value-type="string" office:string-value="--------" calcext:value-type="string">
            <text:p>--------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" table:number-columns-repeated="1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 table:number-columns-repeated="5"/>
          <table:table-cell table:style-name="ce44"/>
          <table:table-cell table:style-name="ce72"/>
          <table:table-cell table:style-name="ce44" table:number-columns-repeated="5"/>
          <table:table-cell table:style-name="ce58"/>
          <table:table-cell table:style-name="ce73"/>
          <table:table-cell table:style-name="ce52" table:number-columns-repeated="2"/>
          <table:table-cell table:style-name="ce44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74"/>
          <table:table-cell/>
          <table:table-cell table:style-name="ce102" office:value-type="string" calcext:value-type="string" table:number-columns-spanned="2" table:number-rows-spanned="1">
            <text:p>Casas decimais Padrão:</text:p>
          </table:table-cell>
          <table:covered-table-cell/>
          <table:table-cell table:style-name="ce17" office:value-type="float" office:value="2" calcext:value-type="float">
            <text:p>2</text:p>
          </table:table-cell>
          <table:table-cell table:style-name="ce132" office:value-type="string" calcext:value-type="string" table:number-columns-spanned="2" table:number-rows-spanned="1">
            <text:p>Casas decimais Instrumento:</text:p>
          </table:table-cell>
          <table:covered-table-cell/>
          <table:table-cell table:style-name="ce17" office:value-type="float" office:value="2" calcext:value-type="float">
            <text:p>2</text:p>
          </table:table-cell>
          <table:table-cell table:number-columns-repeated="2"/>
          <table:table-cell table:style-name="ce52"/>
          <table:table-cell table:style-name="ce58"/>
          <table:table-cell table:style-name="ce73"/>
          <table:table-cell table:style-name="ce52" table:number-columns-repeated="2"/>
          <table:table-cell table:style-name="ce44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 table:number-columns-repeated="2"/>
          <table:table-cell table:style-name="ce1" table:number-columns-repeated="6"/>
          <table:table-cell table:style-name="ce75"/>
          <table:table-cell table:number-columns-repeated="2"/>
          <table:table-cell table:style-name="ce76"/>
          <table:table-cell table:style-name="ce58"/>
          <table:table-cell table:style-name="ce73"/>
          <table:table-cell table:style-name="ce77"/>
          <table:table-cell table:style-name="ce44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"/>
          <table:table-cell table:style-name="ce108" office:value-type="string" calcext:value-type="string" table:number-columns-spanned="9" table:number-rows-spanned="1">
            <text:p>OBSERVAÇÕES PARA O CERTIFICADO DE CALIBRAÇÃO</text:p>
          </table:table-cell>
          <table:covered-table-cell table:number-columns-repeated="8"/>
          <table:table-cell table:style-name="ce78"/>
          <table:table-cell table:style-name="ce58"/>
          <table:table-cell table:style-name="ce73"/>
          <table:table-cell table:style-name="ce77"/>
          <table:table-cell table:style-name="ce44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1" table:number-columns-repeated="2"/>
          <table:table-cell table:style-name="ce12" office:value-type="string" calcext:value-type="string">
            <text:p>1-</text:p>
          </table:table-cell>
          <table:table-cell table:style-name="ce397" table:number-columns-spanned="8" table:number-rows-spanned="1"/>
          <table:covered-table-cell table:number-columns-repeated="7"/>
          <table:table-cell table:style-name="ce52"/>
          <table:table-cell table:style-name="ce58"/>
          <table:table-cell table:style-name="ce73"/>
          <table:table-cell table:style-name="ce77"/>
          <table:table-cell table:style-name="ce44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1" table:number-columns-repeated="2"/>
          <table:table-cell table:style-name="ce12" office:value-type="string" calcext:value-type="string">
            <text:p>2-</text:p>
          </table:table-cell>
          <table:table-cell table:style-name="ce397" table:number-columns-spanned="8" table:number-rows-spanned="1"/>
          <table:covered-table-cell table:number-columns-repeated="7"/>
          <table:table-cell table:style-name="ce78"/>
          <table:table-cell table:style-name="ce58"/>
          <table:table-cell table:style-name="ce73"/>
          <table:table-cell table:style-name="ce77"/>
          <table:table-cell table:style-name="ce44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1" table:number-columns-repeated="2"/>
          <table:table-cell table:style-name="ce12" office:value-type="string" calcext:value-type="string">
            <text:p>3-</text:p>
          </table:table-cell>
          <table:table-cell table:style-name="ce397" table:number-columns-spanned="8" table:number-rows-spanned="1"/>
          <table:covered-table-cell table:number-columns-repeated="7"/>
          <table:table-cell table:style-name="ce1" table:number-columns-repeated="4"/>
          <table:table-cell table:style-name="ce44"/>
          <table:table-cell table:style-name="ce79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23" table:number-columns-spanned="9" table:number-rows-spanned="1"/>
          <table:covered-table-cell table:number-columns-repeated="8"/>
          <table:table-cell/>
          <table:table-cell table:style-name="ce1" table:number-columns-repeated="4"/>
          <table:table-cell table:style-name="ce52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" table:number-columns-repeated="2"/>
          <table:table-cell table:style-name="ce133" office:value-type="string" calcext:value-type="string" table:number-columns-spanned="3" table:number-rows-spanned="1">
            <text:p>Técnico(a) responsável pela calibração:</text:p>
          </table:table-cell>
          <table:covered-table-cell table:number-columns-repeated="2"/>
          <table:table-cell table:style-name="ce17" table:content-validation-name="val6" office:value-type="string" calcext:value-type="string" table:number-columns-spanned="4" table:number-rows-spanned="1">
            <text:p>DIEGO HENRIQUE ALVES SALDANHA</text:p>
          </table:table-cell>
          <table:covered-table-cell table:number-columns-repeated="3"/>
          <table:table-cell table:style-name="ce1" table:number-columns-repeated="5"/>
          <table:table-cell table:style-name="ce52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" table:number-columns-repeated="2"/>
          <table:table-cell table:style-name="ce133" table:number-columns-spanned="3" table:number-rows-spanned="1"/>
          <table:covered-table-cell table:number-columns-repeated="2"/>
          <table:table-cell table:style-name="ce17" table:content-validation-name="val6" table:number-columns-spanned="4" table:number-rows-spanned="1"/>
          <table:covered-table-cell table:number-columns-repeated="3"/>
          <table:table-cell table:style-name="ce1" table:number-columns-repeated="5"/>
          <table:table-cell table:style-name="ce52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2"/>
          <table:table-cell table:style-name="ce133" office:value-type="string" calcext:value-type="string" table:number-columns-spanned="3" table:number-rows-spanned="1">
            <text:p>Responsável pela autorização / Signatário autorizado:</text:p>
          </table:table-cell>
          <table:covered-table-cell table:number-columns-repeated="2"/>
          <table:table-cell table:style-name="ce17" table:content-validation-name="val6" office:value-type="string" calcext:value-type="string" table:number-columns-spanned="4" table:number-rows-spanned="1">
            <text:p>DIEGO HENRIQUE ALVES SALDANHA</text:p>
          </table:table-cell>
          <table:covered-table-cell table:number-columns-repeated="3"/>
          <table:table-cell table:style-name="ce1" table:number-columns-repeated="5"/>
          <table:table-cell table:style-name="ce52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" table:number-columns-repeated="2"/>
          <table:table-cell table:style-name="ce278" table:number-columns-spanned="3" table:number-rows-spanned="1"/>
          <table:covered-table-cell table:number-columns-repeated="2"/>
          <table:table-cell table:style-name="ce397" table:content-validation-name="val6" table:number-columns-spanned="4" table:number-rows-spanned="1"/>
          <table:covered-table-cell table:number-columns-repeated="3"/>
          <table:table-cell table:style-name="ce1" table:number-columns-repeated="5"/>
          <table:table-cell table:style-name="ce44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 table:number-rows-repeated="5">
          <table:table-cell/>
          <table:table-cell table:style-name="ce1" table:number-columns-repeated="20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 table:number-rows-repeated="2">
          <table:table-cell table:style-name="ce9"/>
          <table:table-cell table:style-name="ce1" table:number-columns-repeated="14"/>
          <table:table-cell table:style-name="ce44" table:number-columns-repeated="2"/>
          <table:table-cell table:style-name="ce10" table:number-columns-repeated="47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52" table:number-columns-repeated="6"/>
          <table:table-cell table:style-name="ce80" table:content-validation-name="val8"/>
          <table:table-cell table:style-name="ce52"/>
          <table:table-cell table:style-name="ce44"/>
          <table:table-cell table:style-name="ce9"/>
          <table:table-cell table:style-name="ce1" table:number-columns-repeated="4"/>
          <table:table-cell table:style-name="ce44" table:number-columns-repeated="2"/>
          <table:table-cell table:style-name="ce10" table:number-columns-repeated="47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52" table:number-columns-repeated="6"/>
          <table:table-cell table:style-name="ce80" table:content-validation-name="val8"/>
          <table:table-cell table:style-name="ce52"/>
          <table:table-cell table:style-name="ce44"/>
          <table:table-cell table:style-name="ce9"/>
          <table:table-cell table:style-name="ce1" table:number-columns-repeated="4"/>
          <table:table-cell table:style-name="ce44"/>
          <table:table-cell table:style-name="ce10" table:number-columns-repeated="48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52" table:number-columns-repeated="6"/>
          <table:table-cell table:style-name="ce80" table:content-validation-name="val8"/>
          <table:table-cell table:style-name="ce52"/>
          <table:table-cell table:style-name="ce44" table:number-columns-repeated="6"/>
          <table:table-cell table:style-name="ce10" table:number-columns-repeated="49"/>
          <table:table-cell table:number-columns-repeated="19"/>
          <table:table-cell table:style-name="ce1" table:number-columns-repeated="16301"/>
        </table:table-row>
        <table:table-row table:style-name="ro6">
          <table:table-cell table:number-columns-repeated="2"/>
          <table:table-cell table:style-name="ce1" table:number-columns-repeated="7"/>
          <table:table-cell table:style-name="ce10" table:number-columns-repeated="55"/>
          <table:table-cell table:number-columns-repeated="19"/>
          <table:table-cell table:style-name="ce1" table:number-columns-repeated="16301"/>
        </table:table-row>
        <table:table-row table:style-name="ro6" table:number-rows-repeated="3">
          <table:table-cell table:style-name="ce9"/>
          <table:table-cell/>
          <table:table-cell table:style-name="ce1" table:number-columns-repeated="7"/>
          <table:table-cell table:style-name="ce10" table:number-columns-repeated="55"/>
          <table:table-cell table:number-columns-repeated="19"/>
          <table:table-cell table:style-name="ce1" table:number-columns-repeated="16301"/>
        </table:table-row>
        <table:table-row table:style-name="ro6" table:number-rows-repeated="2">
          <table:table-cell table:style-name="ce9"/>
          <table:table-cell/>
          <table:table-cell table:style-name="ce1" table:number-columns-repeated="7"/>
          <table:table-cell table:style-name="ce44"/>
          <table:table-cell table:style-name="ce10" table:number-columns-repeated="54"/>
          <table:table-cell table:number-columns-repeated="19"/>
          <table:table-cell table:style-name="ce1" table:number-columns-repeated="16301"/>
        </table:table-row>
        <table:table-row table:style-name="ro6" table:number-rows-repeated="5">
          <table:table-cell table:style-name="ce9"/>
          <table:table-cell table:style-name="ce10"/>
          <table:table-cell table:style-name="ce1" table:number-columns-repeated="7"/>
          <table:table-cell table:style-name="ce10" table:number-columns-repeated="55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81"/>
          <table:table-cell table:style-name="ce1" table:number-columns-repeated="7"/>
          <table:table-cell table:style-name="ce81" table:number-columns-repeated="5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8"/>
          <table:table-cell table:style-name="ce75"/>
          <table:table-cell table:style-name="ce9"/>
          <table:table-cell table:style-name="ce81" table:number-columns-repeated="5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8"/>
          <table:table-cell table:style-name="ce86" table:number-columns-spanned="1" table:number-rows-spanned="3"/>
          <table:table-cell table:style-name="ce1" table:number-columns-repeated="7"/>
          <table:table-cell table:style-name="ce81" table:number-columns-repeated="47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8"/>
          <table:covered-table-cell/>
          <table:table-cell table:style-name="ce1" table:number-columns-repeated="7"/>
          <table:table-cell table:style-name="ce81" table:number-columns-repeated="47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8"/>
          <table:covered-table-cell/>
          <table:table-cell table:style-name="ce1" table:number-columns-repeated="7"/>
          <table:table-cell table:style-name="ce81" table:number-columns-repeated="47"/>
          <table:table-cell table:number-columns-repeated="19"/>
          <table:table-cell table:style-name="ce1" table:number-columns-repeated="16301"/>
        </table:table-row>
        <table:table-row table:style-name="ro7" table:number-rows-repeated="13">
          <table:table-cell table:style-name="ce9"/>
          <table:table-cell table:style-name="ce1" table:number-columns-repeated="8"/>
          <table:table-cell table:style-name="ce75"/>
          <table:table-cell table:style-name="ce1" table:number-columns-repeated="7"/>
          <table:table-cell table:style-name="ce81" table:number-columns-repeated="47"/>
          <table:table-cell table:number-columns-repeated="19"/>
          <table:table-cell table:style-name="ce1" table:number-columns-repeated="16301"/>
        </table:table-row>
        <table:table-row table:style-name="ro7" table:number-rows-repeated="2">
          <table:table-cell table:style-name="ce9"/>
          <table:table-cell table:style-name="ce1" table:number-columns-repeated="8"/>
          <table:table-cell table:style-name="ce75"/>
          <table:table-cell table:style-name="ce9"/>
          <table:table-cell table:style-name="ce81" table:number-columns-repeated="53"/>
          <table:table-cell table:number-columns-repeated="19"/>
          <table:table-cell table:style-name="ce1" table:number-columns-repeated="16301"/>
        </table:table-row>
        <table:table-row table:style-name="ro7" table:number-rows-repeated="65389">
          <table:table-cell/>
          <table:table-cell table:style-name="ce81" table:number-columns-repeated="63"/>
          <table:table-cell table:number-columns-repeated="19"/>
          <table:table-cell table:style-name="ce1" table:number-columns-repeated="16301"/>
        </table:table-row>
        <table:table-row table:style-name="ro8" table:number-rows-repeated="983048">
          <table:table-cell table:number-columns-repeated="83"/>
          <table:table-cell table:style-name="ce1" table:number-columns-repeated="16301"/>
        </table:table-row>
        <table:table-row table:style-name="ro8">
          <table:table-cell table:number-columns-repeated="83"/>
          <table:table-cell table:style-name="ce1" table:number-columns-repeated="16301"/>
        </table:table-row>
        <calcext:conditional-formats>
          <calcext:conditional-format calcext:target-range-address="Planilha.Q48:Planilha.Q60">
            <calcext:condition calcext:apply-style-name="cf13" calcext:value="=&quot;Aprovado&quot;" calcext:base-cell-address="Planilha.Q48"/>
            <calcext:condition calcext:apply-style-name="cf16" calcext:value="=&quot;Reprovado&quot;" calcext:base-cell-address="Planilha.Q48"/>
          </calcext:conditional-format>
          <calcext:conditional-format calcext:target-range-address="Planilha.C35:Planilha.C35">
            <calcext:condition calcext:apply-style-name="cf14" calcext:value="=&quot;PADRÕES EM DIA&quot;" calcext:base-cell-address="Planilha.C35"/>
            <calcext:condition calcext:apply-style-name="cf15" calcext:value="=&quot;PADRÕES VENCIDOS&quot;" calcext:base-cell-address="Planilha.C35"/>
          </calcext:conditional-format>
        </calcext:conditional-formats>
      </table:table>
      <table:table table:name="Padrões" table:style-name="ta2" table:protected="true" table:protection-key="H2YxmH4tDuFt/JOw+Y5A+Ml8E9g=" table:protection-key-digest-algorithm="http://www.w3.org/2000/09/xmldsig#sha1">
        <loext:table-protection loext:select-protected-cells="true" loext:select-unprotected-cells="true"/>
        <table:table-column table:style-name="co16" table:number-columns-repeated="9" table:default-cell-style-name="ce233"/>
        <table:table-column table:style-name="co17" table:number-columns-repeated="5" table:default-cell-style-name="ce233"/>
        <table:table-column table:style-name="co18" table:default-cell-style-name="ce233"/>
        <table:table-column table:style-name="co19" table:default-cell-style-name="ce233"/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24" table:default-cell-style-name="ce233"/>
        <table:table-column table:style-name="co25" table:default-cell-style-name="ce233"/>
        <table:table-column table:style-name="co26" table:default-cell-style-name="ce233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30" table:default-cell-style-name="ce233"/>
        <table:table-column table:style-name="co31" table:default-cell-style-name="ce233"/>
        <table:table-column table:style-name="co32" table:number-columns-repeated="3" table:default-cell-style-name="ce233"/>
        <table:table-column table:style-name="co33" table:default-cell-style-name="ce233"/>
        <table:table-column table:style-name="co18" table:default-cell-style-name="ce233"/>
        <table:table-column table:style-name="co34" table:number-columns-repeated="2" table:default-cell-style-name="ce233"/>
        <table:table-column table:style-name="co35" table:default-cell-style-name="ce233"/>
        <table:table-column table:style-name="co36" table:default-cell-style-name="ce233"/>
        <table:table-column table:style-name="co37" table:default-cell-style-name="ce233"/>
        <table:table-column table:style-name="co38" table:default-cell-style-name="ce233"/>
        <table:table-column table:style-name="co39" table:default-cell-style-name="ce233"/>
        <table:table-column table:style-name="co40" table:default-cell-style-name="ce233"/>
        <table:table-column table:style-name="co39" table:default-cell-style-name="ce233"/>
        <table:table-column table:style-name="co35" table:default-cell-style-name="ce233"/>
        <table:table-column table:style-name="co41" table:number-columns-repeated="29" table:default-cell-style-name="ce233"/>
        <table:table-column table:style-name="co41" table:number-columns-repeated="16312"/>
        <table:table-row table:style-name="ro6">
          <table:table-cell table:style-name="ce234" office:value-type="string" calcext:value-type="string" table:number-columns-spanned="14" table:number-rows-spanned="1">
            <text:p>Padrões</text:p>
          </table:table-cell>
          <table:covered-table-cell table:number-columns-repeated="13" table:style-name="ce498"/>
          <table:table-cell table:style-name="ce135" office:value-type="string" calcext:value-type="string">
            <text:p>Código</text:p>
          </table:table-cell>
          <table:table-cell table:style-name="ce532" office:value-type="string" calcext:value-type="string" table:number-columns-spanned="1" table:number-rows-spanned="2">
            <text:p>Descrição</text:p>
          </table:table-cell>
          <table:table-cell table:style-name="ce136" office:value-type="string" calcext:value-type="string">
            <text:p>Data da</text:p>
          </table:table-cell>
          <table:table-cell table:style-name="ce137" office:value-type="string" calcext:value-type="string">
            <text:p>Número do</text:p>
          </table:table-cell>
          <table:table-cell table:style-name="ce138" office:value-type="string" calcext:value-type="string">
            <text:p>Laboratório</text:p>
          </table:table-cell>
          <table:table-cell table:style-name="ce136" office:value-type="string" calcext:value-type="string">
            <text:p>Validade</text:p>
          </table:table-cell>
          <table:table-cell table:style-name="ce236" office:value-type="string" calcext:value-type="string" table:number-columns-spanned="1" table:number-rows-spanned="2">
            <text:p>Resolução</text:p>
          </table:table-cell>
          <table:table-cell table:style-name="ce138" office:value-type="string" calcext:value-type="string">
            <text:p>Rastreabilidade</text:p>
          </table:table-cell>
          <table:table-cell table:style-name="ce532" office:value-type="string" calcext:value-type="string" table:number-columns-spanned="1" table:number-rows-spanned="2">
            <text:p>IM padrão</text:p>
          </table:table-cell>
          <table:table-cell table:style-name="ce236" office:value-type="string" calcext:value-type="string" table:number-columns-spanned="1" table:number-rows-spanned="2">
            <text:p>k</text:p>
          </table:table-cell>
          <table:table-cell table:style-name="ce137" office:value-type="string" calcext:value-type="string">
            <text:p>Veff</text:p>
          </table:table-cell>
          <table:table-cell table:style-name="ce532" office:value-type="string" calcext:value-type="string" table:number-columns-spanned="2" table:number-rows-spanned="1">
            <text:p>Faixa</text:p>
          </table:table-cell>
          <table:covered-table-cell table:style-name="ce498"/>
          <table:table-cell table:style-name="ce532" office:value-type="string" calcext:value-type="string" table:number-columns-spanned="2" table:number-rows-spanned="1">
            <text:p>Equação</text:p>
          </table:table-cell>
          <table:covered-table-cell table:style-name="ce498"/>
          <table:table-cell table:style-name="ce532" office:value-type="string" calcext:value-type="string" table:number-columns-spanned="3" table:number-rows-spanned="1">
            <text:p>Incerteza da Curva</text:p>
          </table:table-cell>
          <table:covered-table-cell table:number-columns-repeated="2" table:style-name="ce498"/>
          <table:table-cell table:style-name="ce532" office:value-type="string" calcext:value-type="string" table:number-columns-spanned="1" table:number-rows-spanned="2">
            <text:p>Tipo</text:p>
          </table:table-cell>
          <table:table-cell table:style-name="ce139" table:number-columns-repeated="2"/>
          <table:table-cell table:style-name="ce138" office:value-type="string" calcext:value-type="string">
            <text:p>Unidade de</text:p>
          </table:table-cell>
          <table:table-cell table:style-name="ce236" office:value-type="string" calcext:value-type="string" table:number-columns-spanned="1" table:number-rows-spanned="2">
            <text:p>capacidade</text:p>
          </table:table-cell>
          <table:table-cell table:style-name="ce532" office:value-type="string" calcext:value-type="string" table:number-columns-spanned="1" table:number-rows-spanned="2">
            <text:p>deriva</text:p>
          </table:table-cell>
          <table:table-cell table:style-name="ce140" office:value-type="string" calcext:value-type="string">
            <text:p>Valor</text:p>
          </table:table-cell>
          <table:table-cell table:style-name="ce140" office:value-type="string" calcext:value-type="string">
            <text:p>Responsável</text:p>
          </table:table-cell>
          <table:table-cell table:style-name="ce140" office:value-type="string" calcext:value-type="string">
            <text:p>Data da</text:p>
          </table:table-cell>
          <table:table-cell table:style-name="ce140" office:value-type="string" calcext:value-type="string">
            <text:p>Responsável</text:p>
          </table:table-cell>
          <table:table-cell table:style-name="ce140" office:value-type="string" calcext:value-type="string">
            <text:p>Data</text:p>
          </table:table-cell>
          <table:table-cell table:style-name="ce141" table:number-columns-repeated="21"/>
          <table:table-cell table:style-name="ce1" table:number-columns-repeated="16320"/>
        </table:table-row>
        <table:table-row table:style-name="ro6">
          <table:table-cell table:style-name="ce134" office:value-type="string" calcext:value-type="string">
            <text:p>1°</text:p>
          </table:table-cell>
          <table:table-cell table:style-name="ce134" office:value-type="string" calcext:value-type="string">
            <text:p>2°</text:p>
          </table:table-cell>
          <table:table-cell table:style-name="ce134" office:value-type="string" calcext:value-type="string">
            <text:p>3°</text:p>
          </table:table-cell>
          <table:table-cell table:style-name="ce134" office:value-type="string" calcext:value-type="string">
            <text:p>4°</text:p>
          </table:table-cell>
          <table:table-cell table:style-name="ce134" office:value-type="string" calcext:value-type="string">
            <text:p>5°</text:p>
          </table:table-cell>
          <table:table-cell table:style-name="ce134" office:value-type="string" calcext:value-type="string">
            <text:p>6°</text:p>
          </table:table-cell>
          <table:table-cell table:style-name="ce134" office:value-type="string" calcext:value-type="string">
            <text:p>7°</text:p>
          </table:table-cell>
          <table:table-cell table:style-name="ce134" office:value-type="string" calcext:value-type="string">
            <text:p>8°</text:p>
          </table:table-cell>
          <table:table-cell table:style-name="ce134" office:value-type="string" calcext:value-type="string">
            <text:p>9°</text:p>
          </table:table-cell>
          <table:table-cell table:style-name="ce134" office:value-type="string" calcext:value-type="string">
            <text:p>10°</text:p>
          </table:table-cell>
          <table:table-cell table:style-name="ce134" office:value-type="string" calcext:value-type="string">
            <text:p>11°</text:p>
          </table:table-cell>
          <table:table-cell table:style-name="ce134" office:value-type="string" calcext:value-type="string">
            <text:p>12°</text:p>
          </table:table-cell>
          <table:table-cell table:style-name="ce134" office:value-type="string" calcext:value-type="string">
            <text:p>13°</text:p>
          </table:table-cell>
          <table:table-cell table:style-name="ce134" office:value-type="string" calcext:value-type="string">
            <text:p>14°</text:p>
          </table:table-cell>
          <table:table-cell table:style-name="ce142" office:value-type="string" calcext:value-type="string">
            <text:p>padrão</text:p>
          </table:table-cell>
          <table:covered-table-cell table:style-name="ce498"/>
          <table:table-cell table:style-name="ce143" office:value-type="string" calcext:value-type="string">
            <text:p>Calibração</text:p>
          </table:table-cell>
          <table:table-cell table:style-name="ce144" office:value-type="string" calcext:value-type="string">
            <text:p>Certificado</text:p>
          </table:table-cell>
          <table:table-cell table:style-name="ce145" office:value-type="string" calcext:value-type="string">
            <text:p>Emitente</text:p>
          </table:table-cell>
          <table:table-cell table:style-name="ce143" office:value-type="string" calcext:value-type="string">
            <text:p>Calibração</text:p>
          </table:table-cell>
          <table:covered-table-cell table:style-name="ce498"/>
          <table:table-cell table:style-name="ce145" office:value-type="string" calcext:value-type="string">
            <text:p>dos Padrões</text:p>
          </table:table-cell>
          <table:covered-table-cell table:number-columns-repeated="2" table:style-name="ce498"/>
          <table:table-cell table:style-name="ce144" office:value-type="string" calcext:value-type="string">
            <text:p>(IM)</text:p>
          </table:table-cell>
          <table:table-cell table:style-name="ce139" office:value-type="string" calcext:value-type="string">
            <text:p>Inicial</text:p>
          </table:table-cell>
          <table:table-cell table:style-name="ce139" office:value-type="string" calcext:value-type="string">
            <text:p>Final</text:p>
          </table:table-cell>
          <table:table-cell table:style-name="ce139" office:value-type="string" calcext:value-type="string">
            <text:p>a</text:p>
          </table:table-cell>
          <table:table-cell table:style-name="ce139" office:value-type="string" calcext:value-type="string">
            <text:p>b</text:p>
          </table:table-cell>
          <table:table-cell table:style-name="ce139" office:value-type="string" calcext:value-type="string">
            <text:p>u<text:span text:style-name="T1">a</text:span></text:p>
          </table:table-cell>
          <table:table-cell table:style-name="ce139" office:value-type="string" calcext:value-type="string">
            <text:p>u<text:span text:style-name="T1">b</text:span></text:p>
          </table:table-cell>
          <table:table-cell table:style-name="ce139" office:value-type="string" calcext:value-type="string">
            <text:p>r<text:span text:style-name="T1">(a,b)</text:span></text:p>
          </table:table-cell>
          <table:covered-table-cell table:style-name="ce498"/>
          <table:table-cell table:style-name="ce139" office:value-type="string" calcext:value-type="string">
            <text:p>X1</text:p>
          </table:table-cell>
          <table:table-cell table:style-name="ce139" office:value-type="string" calcext:value-type="string">
            <text:p>X0</text:p>
          </table:table-cell>
          <table:table-cell table:style-name="ce145" office:value-type="string" calcext:value-type="string">
            <text:p>medida</text:p>
          </table:table-cell>
          <table:covered-table-cell table:number-columns-repeated="2" table:style-name="ce498"/>
          <table:table-cell table:style-name="ce146" office:value-type="string" calcext:value-type="string">
            <text:p>nominal</text:p>
          </table:table-cell>
          <table:table-cell table:number-columns-repeated="2" table:style-name="ce146" office:value-type="string" calcext:value-type="string">
            <text:p>atualização</text:p>
          </table:table-cell>
          <table:table-cell table:number-columns-repeated="2" table:style-name="ce146" office:value-type="string" calcext:value-type="string">
            <text:p>verificação</text:p>
          </table:table-cell>
          <table:table-cell table:style-name="ce141" table:number-columns-repeated="21"/>
          <table:table-cell table:style-name="ce1" table:number-columns-repeated="16320"/>
        </table:table-row>
        <table:table-row table:style-name="ro6">
          <table:table-cell table:style-name="ce147"/>
          <table:table-cell table:style-name="ce148" table:number-columns-repeated="13"/>
          <table:table-cell table:style-name="ce149" office:value-type="string" calcext:value-type="string">
            <text:p>PADRÃO DE PRESSÃO</text:p>
          </table:table-cell>
          <table:table-cell table:style-name="ce150"/>
          <table:table-cell table:style-name="ce151"/>
          <table:table-cell table:style-name="ce152"/>
          <table:table-cell table:style-name="ce153"/>
          <table:table-cell table:style-name="ce151"/>
          <table:table-cell table:style-name="ce152"/>
          <table:table-cell table:style-name="ce153" table:number-columns-repeated="2"/>
          <table:table-cell table:style-name="ce152" table:number-columns-repeated="2"/>
          <table:table-cell table:style-name="ce153" table:number-columns-repeated="7"/>
          <table:table-cell table:style-name="ce149" office:value-type="string" calcext:value-type="string">
            <text:p>PADRÃO DE PRESSÃO</text:p>
          </table:table-cell>
          <table:table-cell table:style-name="ce153" table:number-columns-repeated="3"/>
          <table:table-cell table:style-name="ce152"/>
          <table:table-cell table:style-name="ce153"/>
          <table:table-cell table:style-name="ce154" table:number-columns-repeated="4"/>
          <table:table-cell table:style-name="ce155"/>
          <table:table-cell table:style-name="ce141" table:number-columns-repeated="21"/>
          <table:table-cell table:style-name="ce1" table:number-columns-repeated="16320"/>
        </table:table-row>
        <table:table-row table:style-name="ro6">
          <table:table-cell table:style-name="ce156" table:formula="of:=IF([.O4]=&quot;&quot;;&quot;&quot;;IF([Planilha.$E$33]=[.O4];1;&quot;&quot;))" office:value-type="float" office:value="1" calcext:value-type="float">
            <text:p>1</text:p>
          </table:table-cell>
          <table:table-cell table:style-name="ce505" table:formula="of:=IF([.O4]=&quot;&quot;;&quot;&quot;;IF([$Planilha.$J$96]=[.O4];2;&quot;&quot;))" table:number-columns-spanned="13" table:number-rows-spanned="10">
            <text:p/>
          </table:table-cell>
          <table:covered-table-cell table:number-columns-repeated="12" table:style-name="ce498"/>
          <table:table-cell table:style-name="ce157" office:value-type="string" calcext:value-type="string">
            <text:p>DSP-010</text:p>
          </table:table-cell>
          <table:table-cell table:style-name="ce158" office:value-type="string" calcext:value-type="string">
            <text:p>PADRÃO DE PRESSÃO</text:p>
          </table:table-cell>
          <table:table-cell table:style-name="ce159" office:value-type="date" office:date-value="2026-03-02" calcext:value-type="date">
            <text:p>2/3/26</text:p>
          </table:table-cell>
          <table:table-cell table:style-name="ce631" office:value-type="string" calcext:value-type="string">
            <text:p>455883/26 </text:p>
          </table:table-cell>
          <table:table-cell table:style-name="ce161" office:value-type="string" calcext:value-type="string">
            <text:p>CAL 0056</text:p>
          </table:table-cell>
          <table:table-cell table:style-name="ce162" table:formula="of:=[.Q4]+365*1" office:value-type="date" office:date-value="2027-03-02" calcext:value-type="date">
            <text:p>mar-27</text:p>
          </table:table-cell>
          <table:table-cell table:style-name="ce165" office:value-type="float" office:value="0.01" calcext:value-type="float">
            <text:p>0,010</text:p>
          </table:table-cell>
          <table:table-cell table:style-name="ce161" office:value-type="string" calcext:value-type="string">
            <text:p>SI</text:p>
          </table:table-cell>
          <table:table-cell table:style-name="ce161" office:value-type="float" office:value="0.01" calcext:value-type="float">
            <text:p>0,0100</text:p>
          </table:table-cell>
          <table:table-cell table:style-name="ce160" office:value-type="float" office:value="2" calcext:value-type="float">
            <text:p>2</text:p>
          </table:table-cell>
          <table:table-cell table:style-name="ce164" office:value-type="float" office:value="10000" calcext:value-type="float">
            <text:p>10000,00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40" calcext:value-type="float">
            <text:p>40</text:p>
          </table:table-cell>
          <table:table-cell table:style-name="ce165" office:value-type="float" office:value="0.00584090909090929" calcext:value-type="float">
            <text:p>0,006</text:p>
          </table:table-cell>
          <table:table-cell table:style-name="ce715" office:value-type="float" office:value="1.00048787878788" calcext:value-type="float">
            <text:p>1,0004878787879</text:p>
          </table:table-cell>
          <table:table-cell table:style-name="ce715" office:value-type="float" office:value="0.00197282094922579" calcext:value-type="float">
            <text:p>0,0019728209492</text:p>
          </table:table-cell>
          <table:table-cell table:style-name="ce715" office:value-type="float" office:value="0.000222311735874097" calcext:value-type="float">
            <text:p>0,0002223117359</text:p>
          </table:table-cell>
          <table:table-cell table:style-name="ce715" office:value-type="float" office:value="-0.845154254728516" calcext:value-type="float">
            <text:p>-0,8451542547285</text:p>
          </table:table-cell>
          <table:table-cell table:style-name="ce167" table:content-validation-name="val15" office:value-type="string" calcext:value-type="string">
            <text:p>Digital</text:p>
          </table:table-cell>
          <table:table-cell table:style-name="ce160" table:number-columns-repeated="2"/>
          <table:table-cell table:style-name="ce719" office:value-type="string" calcext:value-type="string">
            <text:p>kgf/cm2</text:p>
          </table:table-cell>
          <table:table-cell table:style-name="ce160"/>
          <table:table-cell table:style-name="ce161"/>
          <table:table-cell table:style-name="ce593"/>
          <table:table-cell table:style-name="ce593" table:content-validation-name="val16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593" table:content-validation-name="val16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" table:formula="of:=IF([.O5]=&quot;&quot;;&quot;&quot;;IF([Planilha.$E$33]=[.O5];1;&quot;&quot;))">
            <text:p/>
          </table:table-cell>
          <table:covered-table-cell table:number-columns-repeated="13" table:style-name="ce498"/>
          <table:table-cell table:style-name="ce157"/>
          <table:table-cell table:style-name="ce158"/>
          <table:table-cell table:style-name="ce171"/>
          <table:table-cell table:style-name="ce160"/>
          <table:table-cell table:style-name="ce161"/>
          <table:table-cell table:style-name="ce162"/>
          <table:table-cell table:style-name="ce165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5"/>
          <table:table-cell table:style-name="ce160" table:number-columns-repeated="4"/>
          <table:table-cell table:style-name="ce161"/>
          <table:table-cell table:style-name="ce593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5"/>
          <table:table-cell table:style-name="ce160" table:number-columns-repeated="3"/>
          <table:table-cell table:style-name="ce172"/>
          <table:table-cell table:style-name="ce158"/>
          <table:table-cell table:style-name="ce593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5"/>
          <table:table-cell table:style-name="ce160" table:number-columns-repeated="4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5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5"/>
          <table:table-cell table:style-name="ce160" table:number-columns-repeated="4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5"/>
          <table:table-cell table:style-name="ce160" table:number-columns-repeated="4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73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3"/>
          <table:table-cell table:style-name="ce717"/>
          <table:table-cell table:style-name="ce167" table:content-validation-name="val15"/>
          <table:table-cell table:style-name="ce160" table:number-columns-repeated="4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75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5"/>
          <table:table-cell table:style-name="ce160" table:number-columns-repeated="4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77"/>
          <table:table-cell table:style-name="ce159"/>
          <table:table-cell table:style-name="ce157" table:number-columns-repeated="2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5"/>
          <table:table-cell table:style-name="ce160" table:number-columns-repeated="3"/>
          <table:table-cell table:style-name="ce157" table:number-columns-repeated="3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73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5"/>
          <table:table-cell table:style-name="ce160" table:number-columns-repeated="4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238" table:number-columns-spanned="14" table:number-rows-spanned="1"/>
          <table:covered-table-cell table:number-columns-repeated="13" table:style-name="ce498"/>
          <table:table-cell table:style-name="ce178" office:value-type="string" calcext:value-type="string">
            <text:p>TERMÔMETRO AMBIENTE</text:p>
          </table:table-cell>
          <table:table-cell table:style-name="ce179"/>
          <table:table-cell table:style-name="ce180"/>
          <table:table-cell table:style-name="ce181"/>
          <table:table-cell table:style-name="ce182"/>
          <table:table-cell table:style-name="ce180"/>
          <table:table-cell table:style-name="ce183" table:number-columns-repeated="3"/>
          <table:table-cell table:style-name="ce184"/>
          <table:table-cell table:style-name="ce181"/>
          <table:table-cell table:style-name="ce182" table:number-columns-repeated="7"/>
          <table:table-cell table:style-name="ce178" office:value-type="string" calcext:value-type="string">
            <text:p>TERMÔMETRO AMBIENTE</text:p>
          </table:table-cell>
          <table:table-cell table:style-name="ce182" table:number-columns-repeated="2"/>
          <table:table-cell table:style-name="ce183"/>
          <table:table-cell table:style-name="ce181"/>
          <table:table-cell table:style-name="ce182"/>
          <table:table-cell table:style-name="ce185" table:number-columns-repeated="4"/>
          <table:table-cell table:style-name="ce186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 table:formula="of:=IF([.O15]=&quot;&quot;;&quot;&quot;;IF([Planilha.$K$34]=[.O15];6;&quot;&quot;))" office:value-type="float" office:value="6" calcext:value-type="float">
            <text:p>6</text:p>
          </table:table-cell>
          <table:table-cell table:style-name="ce505" table:formula="of:=IF([.O15]=&quot;&quot;;&quot;&quot;;IF([$Planilha.$J$96]=[.O15];2;&quot;&quot;))" table:number-columns-spanned="13" table:number-rows-spanned="5">
            <text:p/>
          </table:table-cell>
          <table:covered-table-cell table:number-columns-repeated="12" table:style-name="ce498"/>
          <table:table-cell table:style-name="ce187" office:value-type="string" calcext:value-type="string">
            <text:p>DSP-022</text:p>
          </table:table-cell>
          <table:table-cell table:style-name="ce177" office:value-type="string" calcext:value-type="string">
            <text:p>TERMÔMETRO AMBIENTE</text:p>
          </table:table-cell>
          <table:table-cell table:style-name="ce171" office:value-type="date" office:date-value="2026-03-10" calcext:value-type="date">
            <text:p>10/03/2026</text:p>
          </table:table-cell>
          <table:table-cell table:style-name="ce160" office:value-type="string" calcext:value-type="string">
            <text:p>LV01043-32754-26-R0</text:p>
          </table:table-cell>
          <table:table-cell table:style-name="ce161" office:value-type="string" calcext:value-type="string">
            <text:p>CAL 0127</text:p>
          </table:table-cell>
          <table:table-cell table:style-name="ce162" table:formula="of:=[.Q15]+365*2" office:value-type="date" office:date-value="2028-03-09" calcext:value-type="date">
            <text:p>mar-28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string" calcext:value-type="string">
            <text:p>SI</text:p>
          </table:table-cell>
          <table:table-cell table:style-name="ce158"/>
          <table:table-cell table:style-name="ce172"/>
          <table:table-cell table:style-name="ce160"/>
          <table:table-cell table:style-name="ce158" table:number-columns-repeated="10"/>
          <table:table-cell table:style-name="ce158" office:value-type="string" calcext:value-type="string">
            <text:p>ºC</text:p>
          </table:table-cell>
          <table:table-cell table:style-name="ce172"/>
          <table:table-cell table:style-name="ce158"/>
          <table:table-cell table:style-name="ce593"/>
          <table:table-cell table:style-name="ce593" table:content-validation-name="val16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593" table:content-validation-name="val16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" table:formula="of:=IF([.O16]=&quot;&quot;;&quot;&quot;;IF([Planilha.$K$34]=[.O16];6;&quot;&quot;))">
            <text:p/>
          </table:table-cell>
          <table:covered-table-cell table:number-columns-repeated="13" table:style-name="ce498"/>
          <table:table-cell table:style-name="ce187"/>
          <table:table-cell table:style-name="ce177"/>
          <table:table-cell table:style-name="ce171"/>
          <table:table-cell table:style-name="ce160"/>
          <table:table-cell table:style-name="ce161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89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90"/>
          <table:table-cell table:style-name="ce177"/>
          <table:table-cell table:style-name="ce159"/>
          <table:table-cell table:style-name="ce160"/>
          <table:table-cell table:style-name="ce161"/>
          <table:table-cell table:style-name="ce162"/>
          <table:table-cell table:style-name="ce160" table:number-columns-repeated="2"/>
          <table:table-cell table:style-name="ce161" table:number-columns-repeated="13"/>
          <table:table-cell table:style-name="ce158"/>
          <table:table-cell table:style-name="ce161" table:number-columns-repeated="3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497" table:number-columns-spanned="14" table:number-rows-spanned="1"/>
          <table:covered-table-cell table:number-columns-repeated="13" table:style-name="ce498"/>
          <table:table-cell table:style-name="ce191" office:value-type="string" calcext:value-type="string">
            <text:p>HIGRÔMETRO AMBIENTE</text:p>
          </table:table-cell>
          <table:table-cell table:style-name="ce192"/>
          <table:table-cell table:style-name="ce193"/>
          <table:table-cell table:style-name="ce194"/>
          <table:table-cell table:style-name="ce195"/>
          <table:table-cell table:style-name="ce193"/>
          <table:table-cell table:style-name="ce194"/>
          <table:table-cell table:style-name="ce195" table:number-columns-repeated="2"/>
          <table:table-cell table:style-name="ce194" table:number-columns-repeated="2"/>
          <table:table-cell table:style-name="ce195" table:number-columns-repeated="7"/>
          <table:table-cell table:style-name="ce191" office:value-type="string" calcext:value-type="string">
            <text:p>HIGRÔMETRO AMBIENTE</text:p>
          </table:table-cell>
          <table:table-cell table:style-name="ce195" table:number-columns-repeated="3"/>
          <table:table-cell table:style-name="ce194"/>
          <table:table-cell table:style-name="ce195"/>
          <table:table-cell table:style-name="ce196" table:number-columns-repeated="2"/>
          <table:table-cell table:style-name="ce197"/>
          <table:table-cell table:style-name="ce196"/>
          <table:table-cell table:style-name="ce198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497" table:number-columns-spanned="1" table:number-rows-spanned="4"/>
          <table:table-cell table:style-name="ce199"/>
          <table:table-cell table:style-name="ce200"/>
          <table:table-cell table:style-name="ce1" table:formula="of:=IF([.O21]=&quot;&quot;;&quot;&quot;;IF([Planilha.$K$34]=[.O21];8;&quot;&quot;))" office:value-type="float" office:value="8" calcext:value-type="float">
            <text:p>8</text:p>
          </table:table-cell>
          <table:table-cell table:style-name="ce201"/>
          <table:table-cell table:style-name="ce199" table:number-columns-repeated="8"/>
          <table:table-cell table:style-name="ce202"/>
          <table:table-cell table:style-name="ce187" office:value-type="string" calcext:value-type="string">
            <text:p>DSP-022</text:p>
          </table:table-cell>
          <table:table-cell table:style-name="ce177" office:value-type="string" calcext:value-type="string">
            <text:p>HIGRÔMETRO AMBIENTE</text:p>
          </table:table-cell>
          <table:table-cell table:style-name="ce171" office:value-type="date" office:date-value="2026-03-10" calcext:value-type="date">
            <text:p>10/03/2026</text:p>
          </table:table-cell>
          <table:table-cell table:style-name="ce160" office:value-type="string" calcext:value-type="string">
            <text:p>LV01043-32754-26-R0</text:p>
          </table:table-cell>
          <table:table-cell table:style-name="ce161" office:value-type="string" calcext:value-type="string">
            <text:p>CAL 0127</text:p>
          </table:table-cell>
          <table:table-cell table:style-name="ce162" table:formula="of:=[.Q21]+365*2" office:value-type="date" office:date-value="2028-03-09" calcext:value-type="date">
            <text:p>mar-28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string" calcext:value-type="string">
            <text:p>SI</text:p>
          </table:table-cell>
          <table:table-cell table:style-name="ce158"/>
          <table:table-cell table:style-name="ce172"/>
          <table:table-cell table:style-name="ce160"/>
          <table:table-cell table:style-name="ce158" table:number-columns-repeated="10"/>
          <table:table-cell table:style-name="ce158" office:value-type="string" calcext:value-type="string">
            <text:p>%</text:p>
          </table:table-cell>
          <table:table-cell table:style-name="ce172"/>
          <table:table-cell table:style-name="ce158"/>
          <table:table-cell table:style-name="ce593"/>
          <table:table-cell table:style-name="ce593" table:content-validation-name="val16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593" table:content-validation-name="val16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covered-table-cell table:style-name="ce498"/>
          <table:table-cell table:style-name="ce203"/>
          <table:table-cell table:style-name="ce204"/>
          <table:table-cell table:style-name="ce1" table:formula="of:=IF([.O22]=&quot;&quot;;&quot;&quot;;IF([Planilha.$K$34]=[.O22];8;&quot;&quot;))">
            <text:p/>
          </table:table-cell>
          <table:table-cell table:style-name="ce205"/>
          <table:table-cell table:style-name="ce203" table:number-columns-repeated="8"/>
          <table:table-cell table:style-name="ce206"/>
          <table:table-cell table:style-name="ce187"/>
          <table:table-cell table:style-name="ce177"/>
          <table:table-cell table:style-name="ce171"/>
          <table:table-cell table:style-name="ce160"/>
          <table:table-cell table:style-name="ce161"/>
          <table:table-cell table:style-name="ce207"/>
          <table:table-cell table:style-name="ce160" table:number-columns-repeated="2"/>
          <table:table-cell table:style-name="ce158"/>
          <table:table-cell table:style-name="ce172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covered-table-cell table:style-name="ce498"/>
          <table:table-cell table:style-name="ce203"/>
          <table:table-cell table:style-name="ce204"/>
          <table:table-cell table:style-name="ce1" table:formula="of:=IF([.O23]=&quot;&quot;;&quot;&quot;;IF([Planilha.$K$34]=[.O23];8;&quot;&quot;))">
            <text:p/>
          </table:table-cell>
          <table:table-cell table:style-name="ce205"/>
          <table:table-cell table:style-name="ce203" table:number-columns-repeated="8"/>
          <table:table-cell table:style-name="ce206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89" table:number-columns-repeated="2"/>
          <table:table-cell table:style-name="ce161"/>
          <table:table-cell table:style-name="ce160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covered-table-cell table:style-name="ce498"/>
          <table:table-cell table:style-name="ce208"/>
          <table:table-cell table:style-name="ce209"/>
          <table:table-cell table:style-name="ce1" table:formula="of:=IF([.O24]=&quot;&quot;;&quot;&quot;;IF([Planilha.$K$34]=[.O24];8;&quot;&quot;))">
            <text:p/>
          </table:table-cell>
          <table:table-cell table:style-name="ce210"/>
          <table:table-cell table:style-name="ce208" table:number-columns-repeated="8"/>
          <table:table-cell table:style-name="ce211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9">
          <table:table-cell table:style-name="ce212" table:number-columns-repeated="2"/>
          <table:table-cell table:style-name="ce1" table:formula="of:=IF([.O25]=&quot;&quot;;&quot;&quot;;IF([$Planilha.$H$34]=[.O25];7;&quot;&quot;))">
            <text:p/>
          </table:table-cell>
          <table:table-cell table:style-name="ce213" table:number-columns-repeated="6"/>
          <table:table-cell table:style-name="ce214" table:number-columns-repeated="6"/>
          <table:table-cell table:style-name="ce215"/>
          <table:table-cell table:style-name="ce216"/>
          <table:table-cell table:style-name="ce217"/>
          <table:table-cell table:style-name="ce218"/>
          <table:table-cell table:style-name="ce216"/>
          <table:table-cell table:style-name="ce217"/>
          <table:table-cell table:style-name="ce218" table:number-columns-repeated="2"/>
          <table:table-cell table:style-name="ce217" table:number-columns-repeated="2"/>
          <table:table-cell table:style-name="ce218" table:number-columns-repeated="11"/>
          <table:table-cell table:style-name="ce217"/>
          <table:table-cell table:style-name="ce218"/>
          <table:table-cell table:style-name="ce219" table:number-columns-repeated="5"/>
          <table:table-cell table:style-name="ce218" table:number-columns-repeated="29"/>
          <table:table-cell table:style-name="ce1" table:number-columns-repeated="16312"/>
        </table:table-row>
        <table:table-row table:style-name="ro10">
          <table:table-cell table:style-name="ce1" table:number-columns-repeated="43"/>
          <table:table-cell table:style-name="ce218" table:number-columns-repeated="29"/>
          <table:table-cell table:style-name="ce1" table:number-columns-repeated="16312"/>
        </table:table-row>
        <table:table-row table:style-name="ro10">
          <table:table-cell table:style-name="ce1" table:number-columns-repeated="6"/>
          <table:table-cell table:style-name="ce213" table:number-columns-repeated="7"/>
          <table:table-cell table:style-name="ce1" table:number-columns-repeated="16371"/>
        </table:table-row>
        <table:table-row table:style-name="ro9" table:number-rows-repeated="2">
          <table:table-cell table:style-name="ce1" table:number-columns-repeated="6"/>
          <table:table-cell table:style-name="ce213" table:number-columns-repeated="7"/>
          <table:table-cell table:style-name="ce1" table:number-columns-repeated="16371"/>
        </table:table-row>
        <table:table-row table:style-name="ro11">
          <table:table-cell table:style-name="ce1" table:number-columns-repeated="16384"/>
        </table:table-row>
        <table:table-row table:style-name="ro11">
          <table:table-cell table:style-name="ce1" table:number-columns-repeated="43"/>
          <table:table-cell table:style-name="ce218" table:number-columns-repeated="29"/>
          <table:table-cell table:style-name="ce1" table:number-columns-repeated="16312"/>
        </table:table-row>
        <table:table-row table:style-name="ro9">
          <table:table-cell table:style-name="ce1" table:number-columns-repeated="43"/>
          <table:table-cell table:style-name="ce218" table:number-columns-repeated="29"/>
          <table:table-cell table:style-name="ce1" table:number-columns-repeated="16312"/>
        </table:table-row>
        <table:table-row table:style-name="ro9" table:number-rows-repeated="2">
          <table:table-cell table:style-name="ce220" table:number-columns-repeated="9"/>
          <table:table-cell table:style-name="ce221" table:number-columns-repeated="6"/>
          <table:table-cell table:style-name="ce222"/>
          <table:table-cell table:style-name="ce223"/>
          <table:table-cell table:style-name="ce224"/>
          <table:table-cell table:style-name="ce141"/>
          <table:table-cell table:style-name="ce223"/>
          <table:table-cell table:style-name="ce224"/>
          <table:table-cell table:style-name="ce141" table:number-columns-repeated="2"/>
          <table:table-cell table:style-name="ce224" table:number-columns-repeated="2"/>
          <table:table-cell table:style-name="ce141" table:number-columns-repeated="11"/>
          <table:table-cell table:style-name="ce224"/>
          <table:table-cell table:style-name="ce141"/>
          <table:table-cell table:style-name="ce225" table:number-columns-repeated="5"/>
          <table:table-cell table:style-name="ce141" table:number-columns-repeated="21"/>
          <table:table-cell table:style-name="ce1" table:number-columns-repeated="16320"/>
        </table:table-row>
        <table:table-row table:style-name="ro10">
          <table:table-cell table:style-name="ce226" table:number-columns-repeated="6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/>
          <table:table-cell table:style-name="ce231"/>
          <table:table-cell table:style-name="ce227" table:number-columns-repeated="2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1" table:number-columns-repeated="16312"/>
        </table:table-row>
        <table:table-row table:style-name="ro9" table:number-rows-repeated="2">
          <table:table-cell table:style-name="ce226" table:number-columns-repeated="6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 table:number-columns-repeated="4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1" table:number-columns-repeated="16312"/>
        </table:table-row>
        <table:table-row table:style-name="ro11">
          <table:table-cell table:style-name="ce232"/>
          <table:table-cell table:style-name="ce226" table:number-columns-repeated="5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 table:number-columns-repeated="4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1" table:number-columns-repeated="16312"/>
        </table:table-row>
        <table:table-row table:style-name="ro12" table:number-rows-repeated="65495">
          <table:table-cell table:style-name="ce220" table:number-columns-repeated="9"/>
          <table:table-cell table:style-name="ce221" table:number-columns-repeated="6"/>
          <table:table-cell table:style-name="ce222"/>
          <table:table-cell table:style-name="ce223"/>
          <table:table-cell table:style-name="ce224"/>
          <table:table-cell table:style-name="ce141"/>
          <table:table-cell table:style-name="ce223"/>
          <table:table-cell table:style-name="ce224"/>
          <table:table-cell table:style-name="ce141" table:number-columns-repeated="2"/>
          <table:table-cell table:style-name="ce224" table:number-columns-repeated="2"/>
          <table:table-cell table:style-name="ce141" table:number-columns-repeated="11"/>
          <table:table-cell table:style-name="ce224"/>
          <table:table-cell table:style-name="ce141"/>
          <table:table-cell table:style-name="ce225" table:number-columns-repeated="5"/>
          <table:table-cell table:style-name="ce141" table:number-columns-repeated="21"/>
          <table:table-cell table:style-name="ce1" table:number-columns-repeated="16320"/>
        </table:table-row>
        <table:table-row table:style-name="ro8" table:number-rows-repeated="983042">
          <table:table-cell table:number-columns-repeated="72"/>
          <table:table-cell table:style-name="ce1" table:number-columns-repeated="16312"/>
        </table:table-row>
        <table:table-row table:style-name="ro8">
          <table:table-cell table:number-columns-repeated="72"/>
          <table:table-cell table:style-name="ce1" table:number-columns-repeated="16312"/>
        </table:table-row>
      </table:table>
      <table:table table:name="Incerteza" table:style-name="ta2" table:protected="true" table:protection-key="H2YxmH4tDuFt/JOw+Y5A+Ml8E9g=" table:protection-key-digest-algorithm="http://www.w3.org/2000/09/xmldsig#sha1">
        <loext:table-protection loext:select-protected-cells="true" loext:select-unprotected-cells="true" loext:insert-columns="true" loext:insert-rows="true" loext:delete-columns="true" loext:delete-rows="true" loext:use-autofilter="true" loext:use-pivot="true"/>
        <table:shapes>
          <draw:frame draw:z-index="0" draw:name="Figura 1" draw:style-name="gr1" draw:text-style-name="P1" svg:width="17.5cm" svg:height="12.351cm" svg:x="84.029cm" svg:y="13.927cm">
            <draw:image xlink:href="Pictures/10000000000002960000024C9D95D82F.png" xlink:type="simple" xlink:show="embed" xlink:actuate="onLoad" draw:mime-type="image/png">
              <text:p/>
            </draw:image>
          </draw:frame>
        </table:shapes>
        <table:table-column table:style-name="co42" table:default-cell-style-name="ce1"/>
        <table:table-column table:style-name="co43" table:default-cell-style-name="ce1"/>
        <table:table-column table:style-name="co44" table:default-cell-style-name="ce628"/>
        <table:table-column table:style-name="co45" table:default-cell-style-name="ce1"/>
        <table:table-column table:style-name="co44" table:default-cell-style-name="ce1"/>
        <table:table-column table:style-name="co46" table:default-cell-style-name="ce1"/>
        <table:table-column table:style-name="co44" table:default-cell-style-name="ce1"/>
        <table:table-column table:style-name="co8" table:default-cell-style-name="ce1"/>
        <table:table-column table:style-name="co47" table:default-cell-style-name="ce1"/>
        <table:table-column table:style-name="co3" table:default-cell-style-name="ce1"/>
        <table:table-column table:style-name="co48" table:default-cell-style-name="ce1"/>
        <table:table-column table:style-name="co44" table:number-columns-repeated="3" table:default-cell-style-name="ce1"/>
        <table:table-column table:style-name="co49" table:default-cell-style-name="ce1"/>
        <table:table-column table:style-name="co44" table:default-cell-style-name="ce242"/>
        <table:table-column table:style-name="co44" table:number-columns-repeated="8" table:default-cell-style-name="ce1"/>
        <table:table-column table:style-name="co50" table:number-columns-repeated="3" table:default-cell-style-name="ce1"/>
        <table:table-column table:style-name="co51" table:default-cell-style-name="ce1"/>
        <table:table-column table:style-name="co50" table:default-cell-style-name="ce1"/>
        <table:table-column table:style-name="co52" table:default-cell-style-name="ce1"/>
        <table:table-column table:style-name="co53" table:default-cell-style-name="ce1"/>
        <table:table-column table:style-name="co50" table:number-columns-repeated="2" table:default-cell-style-name="ce1"/>
        <table:table-column table:style-name="co54" table:default-cell-style-name="ce1"/>
        <table:table-column table:style-name="co55" table:default-cell-style-name="ce1"/>
        <table:table-column table:style-name="co50" table:number-columns-repeated="3" table:default-cell-style-name="ce1"/>
        <table:table-column table:style-name="co15" table:number-columns-repeated="16346"/>
        <table:table-row table:style-name="ro9">
          <table:table-cell table:style-name="ce339" office:value-type="string" calcext:value-type="string" table:number-columns-spanned="12" table:number-rows-spanned="2">
            <text:p>CALIBRAÇÃO DE MANÔMETRO</text:p>
          </table:table-cell>
          <table:covered-table-cell table:number-columns-repeated="11"/>
          <table:table-cell/>
          <table:table-cell table:style-name="ce340" office:value-type="string" calcext:value-type="string" table:number-columns-spanned="12" table:number-rows-spanned="2">
            <text:p>CALIBRAÇÃO DE MANÔMETROS</text:p>
          </table:table-cell>
          <table:covered-table-cell table:number-columns-repeated="11"/>
          <table:table-cell table:number-columns-repeated="13"/>
          <table:table-cell table:style-name="ce1" table:number-columns-repeated="16346"/>
        </table:table-row>
        <table:table-row table:style-name="ro9">
          <table:covered-table-cell table:number-columns-repeated="12"/>
          <table:table-cell/>
          <table:covered-table-cell table:number-columns-repeated="12"/>
          <table:table-cell/>
          <table:table-cell table:style-name="ce341" office:value-type="string" calcext:value-type="string" table:number-columns-spanned="2" table:number-rows-spanned="1">
            <text:p>Tabela de Conversão</text:p>
          </table:table-cell>
          <table:covered-table-cell/>
          <table:table-cell/>
          <table:table-cell table:style-name="ce342" office:value-type="string" calcext:value-type="string" table:number-columns-spanned="8" table:number-rows-spanned="1">
            <text:p>CALCULO DA CURVA</text:p>
          </table:table-cell>
          <table:covered-table-cell table:number-columns-repeated="7"/>
          <table:table-cell/>
          <table:table-cell table:style-name="ce1" table:number-columns-repeated="16346"/>
        </table:table-row>
        <table:table-row table:style-name="ro9">
          <table:table-cell table:style-name="ce343" table:formula="of:=CONCATENATE(&quot;INCERTEZA DE MEDIÇÃO - MANÔMETRO – Calibração – Ponto 1:&quot;;&quot;   &quot;;[Planilha.S48];&quot;  &quot;;[Planilha.K25])" office:value-type="string" office:string-value="INCERTEZA DE MEDIÇÃO - MANÔMETRO – Calibração – Ponto 1:     kgf/cm2" calcext:value-type="string" table:number-columns-spanned="12" table:number-rows-spanned="1">
            <text:p>INCERTEZA DE MEDIÇÃO - MANÔMETRO – Calibração – Ponto 1: <text:s text:c="4"/>kgf/cm2</text:p>
          </table:table-cell>
          <table:covered-table-cell table:number-columns-repeated="11"/>
          <table:table-cell/>
          <table:table-cell table:style-name="ce344" table:formula="of:=CONCATENATE(&quot;INCERTEZA DE MEDIÇÃO - MANÔMETRO – Calibração – Ponto 8:&quot;;&quot;   &quot;;[$Planilha.$S55];&quot;  &quot;;[$Planilha.$K$25])" office:value-type="string" office:string-value="INCERTEZA DE MEDIÇÃO - MANÔMETRO – Calibração – Ponto 8:     kgf/cm2" calcext:value-type="string" table:number-columns-spanned="12" table:number-rows-spanned="1">
            <text:p>INCERTEZA DE MEDIÇÃO - MANÔMETRO – Calibração – Ponto 8: <text:s text:c="4"/>kgf/cm2</text:p>
          </table:table-cell>
          <table:covered-table-cell table:number-columns-repeated="11"/>
          <table:table-cell/>
          <table:table-cell table:style-name="ce240"/>
          <table:table-cell table:style-name="ce241" office:value-type="string" calcext:value-type="string">
            <text:p>Pa</text:p>
          </table:table-cell>
          <table:table-cell table:style-name="ce242"/>
          <table:table-cell table:style-name="ce243" office:value-type="string" calcext:value-type="string">
            <text:p>Referência</text:p>
          </table:table-cell>
          <table:table-cell table:style-name="ce244" office:value-type="string" calcext:value-type="string">
            <text:p>Instrumento</text:p>
          </table:table-cell>
          <table:table-cell table:style-name="ce116" office:value-type="string" calcext:value-type="string" table:number-columns-spanned="2" table:number-rows-spanned="3">
            <text:p>Y = a + bX</text:p>
          </table:table-cell>
          <table:covered-table-cell/>
          <table:table-cell table:style-name="ce245" office:value-type="string" calcext:value-type="string">
            <text:p>Referência</text:p>
          </table:table-cell>
          <table:table-cell table:style-name="ce116" office:value-type="string" calcext:value-type="string" table:number-columns-spanned="1" table:number-rows-spanned="2">
            <text:p>Y-Ycal</text:p>
          </table:table-cell>
          <table:table-cell table:style-name="ce746" office:value-type="string" calcext:value-type="string" table:number-columns-spanned="1" table:number-rows-spanned="3">
            <text:p>u<text:span text:style-name="T6">2</text:span><text:span text:style-name="T7">Y</text:span></text:p>
          </table:table-cell>
          <table:table-cell table:style-name="ce746" office:value-type="string" calcext:value-type="string" table:number-columns-spanned="1" table:number-rows-spanned="2">
            <text:p>u<text:span text:style-name="T8">Y</text:span></text:p>
          </table:table-cell>
          <table:table-cell table:style-name="ce346" table:number-columns-spanned="1" table:number-rows-spanned="2"/>
          <table:table-cell table:style-name="ce1" table:number-columns-repeated="16346"/>
        </table:table-row>
        <table:table-row table:style-name="ro9">
          <table:table-cell table:style-name="ce246" office:value-type="string" calcext:value-type="string">
            <text:p>Tipo</text:p>
          </table:table-cell>
          <table:table-cell table:style-name="ce247" office:value-type="string" calcext:value-type="string">
            <text:p>Componente da incerteza</text:p>
          </table:table-cell>
          <table:table-cell table:style-name="ce760" office:value-type="string" calcext:value-type="string">
            <text:p>Valor</text:p>
          </table:table-cell>
          <table:table-cell table:style-name="ce246" office:value-type="string" calcext:value-type="string">
            <text:p>Divisor</text:p>
          </table:table-cell>
          <table:table-cell table:style-name="ce246" office:value-type="string" calcext:value-type="string">
            <text:p>µ(xi)</text:p>
          </table:table-cell>
          <table:table-cell table:style-name="ce246" office:value-type="string" calcext:value-type="string">
            <text:p>Distribuição</text:p>
          </table:table-cell>
          <table:table-cell table:style-name="ce246" office:value-type="string" calcext:value-type="string">
            <text:p>unid. ent.</text:p>
          </table:table-cell>
          <table:table-cell table:style-name="ce246" office:value-type="string" calcext:value-type="string">
            <text:p>Ci</text:p>
          </table:table-cell>
          <table:table-cell table:style-name="ce248" office:value-type="string" calcext:value-type="string">
            <text:p>µi(y)</text:p>
          </table:table-cell>
          <table:table-cell table:style-name="ce246" office:value-type="string" calcext:value-type="string">
            <text:p>unid. Saida</text:p>
          </table:table-cell>
          <table:table-cell table:style-name="ce246" office:value-type="string" calcext:value-type="string">
            <text:p>vi/veff</text:p>
          </table:table-cell>
          <table:table-cell table:style-name="ce246" office:value-type="string" calcext:value-type="string">
            <text:p>%</text:p>
          </table:table-cell>
          <table:table-cell/>
          <table:table-cell table:style-name="ce246" office:value-type="string" calcext:value-type="string">
            <text:p>Tipo</text:p>
          </table:table-cell>
          <table:table-cell table:style-name="ce247" office:value-type="string" calcext:value-type="string">
            <text:p>Componente da incerteza</text:p>
          </table:table-cell>
          <table:table-cell table:style-name="ce246" office:value-type="string" calcext:value-type="string">
            <text:p>Valor</text:p>
          </table:table-cell>
          <table:table-cell table:style-name="ce246" office:value-type="string" calcext:value-type="string">
            <text:p>Divisor</text:p>
          </table:table-cell>
          <table:table-cell table:style-name="ce246" office:value-type="string" calcext:value-type="string">
            <text:p>µ(xi)</text:p>
          </table:table-cell>
          <table:table-cell table:style-name="ce246" office:value-type="string" calcext:value-type="string">
            <text:p>Distribuição</text:p>
          </table:table-cell>
          <table:table-cell table:style-name="ce246" office:value-type="string" calcext:value-type="string">
            <text:p>unid. ent.</text:p>
          </table:table-cell>
          <table:table-cell table:style-name="ce246" office:value-type="string" calcext:value-type="string">
            <text:p>Ci</text:p>
          </table:table-cell>
          <table:table-cell table:style-name="ce248" office:value-type="string" calcext:value-type="string">
            <text:p>µi(y)</text:p>
          </table:table-cell>
          <table:table-cell table:style-name="ce246" office:value-type="string" calcext:value-type="string">
            <text:p>unid. Saida</text:p>
          </table:table-cell>
          <table:table-cell table:style-name="ce246" office:value-type="string" calcext:value-type="string">
            <text:p>vi/veff</text:p>
          </table:table-cell>
          <table:table-cell table:style-name="ce246" office:value-type="string" calcext:value-type="string">
            <text:p>%</text:p>
          </table:table-cell>
          <table:table-cell/>
          <table:table-cell table:style-name="ce241" office:value-type="string" calcext:value-type="string">
            <text:p>Pa</text:p>
          </table:table-cell>
          <table:table-cell table:style-name="ce249" office:value-type="float" office:value="1" calcext:value-type="float">
            <text:p>1,00E+00</text:p>
          </table:table-cell>
          <table:table-cell table:style-name="ce250"/>
          <table:table-cell table:style-name="ce251" office:value-type="string" calcext:value-type="string">
            <text:p>Y</text:p>
          </table:table-cell>
          <table:table-cell table:style-name="ce252" office:value-type="string" calcext:value-type="string">
            <text:p>X</text:p>
          </table:table-cell>
          <table:covered-table-cell table:number-columns-repeated="2"/>
          <table:table-cell table:style-name="ce253" office:value-type="string" calcext:value-type="string">
            <text:p>Ycal</text:p>
          </table:table-cell>
          <table:covered-table-cell table:number-columns-repeated="4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761" table:formula="of:=[$Planilha.$I$25]" office:value-type="float" office:value="0.1" calcext:value-type="float">
            <text:p>0,10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5]/[.D5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5]=0;0;[.E5]*[.H5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5]^2/[.$I$14]^2" office:value-type="percentage" office:value="0.98826434298013" calcext:value-type="percentage">
            <text:p>98,83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256" table:formula="of:=[$Planilha.$I$25]" office:value-type="float" office:value="0.1" calcext:value-type="float">
            <text:p>0,10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5]/[.Q5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5]=0;0;[.R5]*[.U5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5]^2/[.$V$14]^2" office:value-type="string" office:string-value="" calcext:value-type="error">
            <text:p>#VALOR!</text:p>
          </table:table-cell>
          <table:table-cell/>
          <table:table-cell table:style-name="ce241" office:value-type="string" calcext:value-type="string">
            <text:p>hPa</text:p>
          </table:table-cell>
          <table:table-cell table:style-name="ce261" office:value-type="float" office:value="100" calcext:value-type="float">
            <text:p>1,00E+02</text:p>
          </table:table-cell>
          <table:table-cell table:style-name="ce262"/>
          <table:table-cell table:style-name="ce263" table:formula="of:=[$Planilha.E71]" office:value-type="string" office:string-value="kgf/cm2" calcext:value-type="string">
            <text:p>kgf/cm2</text:p>
          </table:table-cell>
          <table:table-cell table:style-name="ce263" table:formula="of:=[$Planilha.S46]" office:value-type="float" office:value="0" calcext:value-type="float">
            <text:p>0</text:p>
          </table:table-cell>
          <table:covered-table-cell table:number-columns-repeated="2"/>
          <table:table-cell table:style-name="ce263" table:formula="of:=[.AD5]" office:value-type="string" office:string-value="kgf/cm2" calcext:value-type="string">
            <text:p>kgf/cm2</text:p>
          </table:table-cell>
          <table:table-cell table:style-name="ce263" table:formula="of:=[.AD5]" office:value-type="string" office:string-value="kgf/cm2" calcext:value-type="string">
            <text:p>kgf/cm2</text:p>
          </table:table-cell>
          <table:covered-table-cell/>
          <table:table-cell table:style-name="ce263" table:formula="of:=[.AD5]" office:value-type="string" office:string-value="kgf/cm2" calcext:value-type="string">
            <text:p>kgf/cm2</text:p>
          </table:table-cell>
          <table:table-cell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762" table:formula="of:=[Planilha.$G$72]/SQRT(4)" office:value-type="float" office:value="0.00125" calcext:value-type="float">
            <text:p>0,00125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6]/[.D6]" office:value-type="float" office:value="0.00125" calcext:value-type="float">
            <text:p>0,001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6]=0;0;[.E6]*[.H6])" office:value-type="float" office:value="0.00125" calcext:value-type="float">
            <text:p>0,001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6]^2/[.$I$14]^2" office:value-type="percentage" office:value="0.00185299564308774" calcext:value-type="percentage">
            <text:p>0,19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264" table:formula="of:=[Planilha.$G$79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6]/[.Q6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6]=0;0;[.R6]*[.U6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6]^2/[.$V$14]^2" office:value-type="string" office:string-value="" calcext:value-type="error">
            <text:p>#VALOR!</text:p>
          </table:table-cell>
          <table:table-cell/>
          <table:table-cell table:style-name="ce241" office:value-type="string" calcext:value-type="string">
            <text:p>kPa</text:p>
          </table:table-cell>
          <table:table-cell table:style-name="ce261" office:value-type="float" office:value="1000" calcext:value-type="float">
            <text:p>1,00E+03</text:p>
          </table:table-cell>
          <table:table-cell table:style-name="ce250"/>
          <table:table-cell table:style-name="ce265" table:formula="of:=IF([$Planilha.B72]=&quot;&quot;;&quot;&quot;;[$Planilha.B72])" office:value-type="float" office:value="0" calcext:value-type="float">
            <text:p>0,000</text:p>
          </table:table-cell>
          <table:table-cell table:style-name="ce265" table:formula="of:=IF([$Planilha.E72]=&quot;&quot;;&quot;&quot;;[$Planilha.E72])" office:value-type="float" office:value="0.0025" calcext:value-type="float">
            <text:p>0,003</text:p>
          </table:table-cell>
          <table:table-cell table:style-name="ce250" table:number-columns-repeated="2"/>
          <table:table-cell table:style-name="ce265" table:formula="of:=IF([.AD6]=&quot;&quot;;&quot;&quot;;([.$AG$7]+[.$AG$8]*[.AE6]))" office:value-type="float" office:value="-0.00423839474624413" calcext:value-type="float">
            <text:p>-0,004</text:p>
          </table:table-cell>
          <table:table-cell table:style-name="ce265" table:formula="of:=IF([.AD6]=&quot;&quot;;&quot;&quot;;[.AD6]-[.AH6])" office:value-type="float" office:value="0.00423839474624413" calcext:value-type="float">
            <text:p>0,004</text:p>
          </table:table-cell>
          <table:table-cell table:style-name="ce266" table:formula="of:=IF([.AH6]=&quot;&quot;;&quot;&quot;;[.$AI$26]^2+[.AH6]^2*[.$AI$28]^2+2*[.AH6]*[.$AI$26]*[.$AI$28]*[.$AI$29])" office:value-type="float" office:value="0.000012687310267179" calcext:value-type="float">
            <text:p>0,00</text:p>
          </table:table-cell>
          <table:table-cell table:style-name="ce267" table:formula="of:=IF([.AJ6]=&quot;&quot;;&quot;&quot;;SQRT([.AJ6]))" office:value-type="float" office:value="0.00356192507882732" calcext:value-type="float">
            <text:p>0,004</text:p>
          </table:table-cell>
          <table:table-cell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761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7]/[.D7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7]=0;0;[.E7]*[.H7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7]^2/[.$I$14]^2" office:value-type="percentage" office:value="0.00988264342980129" calcext:value-type="percentage">
            <text:p>0,99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256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7]/[.Q7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7]=0;0;[.R7]*[.U7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7]^2/[.$V$14]^2" office:value-type="string" office:string-value="" calcext:value-type="error">
            <text:p>#VALOR!</text:p>
          </table:table-cell>
          <table:table-cell/>
          <table:table-cell table:style-name="ce241" office:value-type="string" calcext:value-type="string">
            <text:p>bar</text:p>
          </table:table-cell>
          <table:table-cell table:style-name="ce261" office:value-type="float" office:value="100000" calcext:value-type="float">
            <text:p>1,00E+05</text:p>
          </table:table-cell>
          <table:table-cell table:style-name="ce250"/>
          <table:table-cell table:style-name="ce265" table:formula="of:=IF([$Planilha.B73]=&quot;&quot;;&quot;&quot;;[$Planilha.B73])" office:value-type="float" office:value="1" calcext:value-type="float">
            <text:p>1,000</text:p>
          </table:table-cell>
          <table:table-cell table:style-name="ce265" table:formula="of:=IF([$Planilha.E73]=&quot;&quot;;&quot;&quot;;[$Planilha.E73])" office:value-type="float" office:value="1.01" calcext:value-type="float">
            <text:p>1,010</text:p>
          </table:table-cell>
          <table:table-cell table:style-name="ce268" office:value-type="string" calcext:value-type="string">
            <text:p>a =</text:p>
          </table:table-cell>
          <table:table-cell table:style-name="ce269" table:formula="of:=INTERCEPT([.AD6:.AD18];[.AE6:.AE18])" office:value-type="float" office:value="-0.00673751247599297" calcext:value-type="float">
            <text:p>-0,00674</text:p>
          </table:table-cell>
          <table:table-cell table:style-name="ce265" table:formula="of:=IF([.AD7]=&quot;&quot;;&quot;&quot;;([.$AG$7]+[.$AG$8]*[.AE7]))" office:value-type="float" office:value="1.00290605034254" calcext:value-type="float">
            <text:p>1,003</text:p>
          </table:table-cell>
          <table:table-cell table:style-name="ce265" table:formula="of:=IF([.AD7]=&quot;&quot;;&quot;&quot;;[.AD7]-[.AH7])" office:value-type="float" office:value="-0.00290605034253888" calcext:value-type="float">
            <text:p>-0,003</text:p>
          </table:table-cell>
          <table:table-cell table:style-name="ce266" table:formula="of:=IF([.AH7]=&quot;&quot;;&quot;&quot;;[.$AI$26]^2+[.AH7]^2*[.$AI$28]^2+2*[.AH7]*[.$AI$26]*[.$AI$28]*[.$AI$29])" office:value-type="float" office:value="0.00000835177942868474" calcext:value-type="float">
            <text:p>0,00</text:p>
          </table:table-cell>
          <table:table-cell table:style-name="ce267" table:formula="of:=IF([.AJ7]=&quot;&quot;;&quot;&quot;;SQRT([.AJ7]))" office:value-type="float" office:value="0.00288994453730253" calcext:value-type="float">
            <text:p>0,003</text:p>
          </table:table-cell>
          <table:table-cell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761" table:formula="of:=[Incerteza.$K$119]*[$Planilha.$B$72]" office:value-type="float" office:value="0" calcext:value-type="float">
            <text:p>0,00000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C8]/[.D8]" office:value-type="float" office:value="0" calcext:value-type="float">
            <text:p>0,00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8]=0;0;[.E8]*[.H8])" office:value-type="float" office:value="0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I8]^2/[.$I$14]^2" office:value-type="percentage" office:value="0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256" table:formula="of:=[Incerteza.$K$119]*[$Planilha.$B$79]" office:value-type="string" office:string-value="" calcext:value-type="error">
            <text:p>#VALOR!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P8]/[.Q8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8]=0;0;[.R8]*[.U8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V8]^2/[.$V$14]^2" office:value-type="string" office:string-value="" calcext:value-type="error">
            <text:p>#VALOR!</text:p>
          </table:table-cell>
          <table:table-cell/>
          <table:table-cell table:style-name="ce241" office:value-type="string" calcext:value-type="string">
            <text:p>mbar</text:p>
          </table:table-cell>
          <table:table-cell table:style-name="ce270" office:value-type="float" office:value="100" calcext:value-type="float">
            <text:p>1,00E+02</text:p>
          </table:table-cell>
          <table:table-cell table:style-name="ce250"/>
          <table:table-cell table:style-name="ce265" table:formula="of:=IF([$Planilha.B74]=&quot;&quot;;&quot;&quot;;[$Planilha.B74])" office:value-type="float" office:value="3" calcext:value-type="float">
            <text:p>3,000</text:p>
          </table:table-cell>
          <table:table-cell table:style-name="ce265" table:formula="of:=IF([$Planilha.E74]=&quot;&quot;;&quot;&quot;;[$Planilha.E74])" office:value-type="float" office:value="3.015" calcext:value-type="float">
            <text:p>3,015</text:p>
          </table:table-cell>
          <table:table-cell table:style-name="ce268" office:value-type="string" calcext:value-type="string">
            <text:p>b =</text:p>
          </table:table-cell>
          <table:table-cell table:style-name="ce269" table:formula="of:=SLOPE([.AD6:.AD18];[.AE6:.AE18])" office:value-type="float" office:value="0.999647091899537" calcext:value-type="float">
            <text:p>0,99965</text:p>
          </table:table-cell>
          <table:table-cell table:style-name="ce265" table:formula="of:=IF([.AD8]=&quot;&quot;;&quot;&quot;;([.$AG$7]+[.$AG$8]*[.AE8]))" office:value-type="float" office:value="3.00719846960111" calcext:value-type="float">
            <text:p>3,007</text:p>
          </table:table-cell>
          <table:table-cell table:style-name="ce265" table:formula="of:=IF([.AD8]=&quot;&quot;;&quot;&quot;;[.AD8]-[.AH8])" office:value-type="float" office:value="-0.00719846960110981" calcext:value-type="float">
            <text:p>-0,007</text:p>
          </table:table-cell>
          <table:table-cell table:style-name="ce266" table:formula="of:=IF([.AH8]=&quot;&quot;;&quot;&quot;;[.$AI$26]^2+[.AH8]^2*[.$AI$28]^2+2*[.AH8]*[.$AI$26]*[.$AI$28]*[.$AI$29])" office:value-type="float" office:value="0.00000429509643633069" calcext:value-type="float">
            <text:p>0,00</text:p>
          </table:table-cell>
          <table:table-cell table:style-name="ce267" table:formula="of:=IF([.AJ8]=&quot;&quot;;&quot;&quot;;SQRT([.AJ8]))" office:value-type="float" office:value="0.00207246144387072" calcext:value-type="float">
            <text:p>0,002</text:p>
          </table:table-cell>
          <table:table-cell/>
          <table:table-cell table:style-name="ce1" table:number-columns-repeated="16346"/>
        </table:table-row>
        <table:table-row table:style-name="ro13">
          <table:table-cell table:style-name="ce608" table:content-validation-name="val17" office:value-type="string" calcext:value-type="string">
            <text:p>A</text:p>
          </table:table-cell>
          <table:table-cell table:style-name="ce240" office:value-type="string" calcext:value-type="string">
            <text:p>Incerteza da curva de calibração</text:p>
          </table:table-cell>
          <table:table-cell table:style-name="ce761" table:formula="of:=[.$R$119]^2+[.$S$119]^2*([$Planilha.$E$72])^2+2*([$Planilha.$E$72])*[.$R$119]*[.$S$119]*[.$T$119]" office:value-type="float" office:value="0.0000038901694625483" calcext:value-type="float">
            <text:p>0,00000</text:p>
          </table:table-cell>
          <table:table-cell table:style-name="ce271" office:value-type="float" office:value="1" calcext:value-type="float">
            <text:p>1,00</text:p>
          </table:table-cell>
          <table:table-cell table:style-name="ce258" table:formula="of:=[.C9]/[.D9]" office:value-type="float" office:value="0.0000038901694625483" calcext:value-type="float">
            <text:p>0,000</text:p>
          </table:table-cell>
          <table:table-cell table:style-name="ce241" office:value-type="string" calcext:value-type="string">
            <text:p>Normal</text:p>
          </table:table-cell>
          <table:table-cell table:style-name="ce242" table:formula="of:=[.G8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9]=0;0;[.E9]*[.H9])" office:value-type="float" office:value="0.0000038901694625483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2" office:value-type="float" office:value="100000" calcext:value-type="float">
            <text:p>100000</text:p>
          </table:table-cell>
          <table:table-cell table:style-name="ce820" table:formula="of:=[.I9]^2/[.$I$14]^2" office:value-type="percentage" office:value="0.0000000179469814066885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office:value-type="string" calcext:value-type="string">
            <text:p>Incerteza da curva de calibração</text:p>
          </table:table-cell>
          <table:table-cell table:style-name="ce256" table:formula="of:=[.$R$119]^2+[.$S$119]^2*([$Planilha.$E$79])^2+2*([$Planilha.$E$79])*[.$R$119]*[.$S$119]*[.$T$119]" office:value-type="string" office:string-value="" calcext:value-type="error">
            <text:p>#VALOR!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P9]/[.Q9]" office:value-type="string" office:string-value="" calcext:value-type="error">
            <text:p>#VALOR!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T8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9]=0;0;[.R9]*[.U9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V9]^2/[.$V$14]^2" office:value-type="string" office:string-value="" calcext:value-type="error">
            <text:p>#VALOR!</text:p>
          </table:table-cell>
          <table:table-cell/>
          <table:table-cell table:style-name="ce241" office:value-type="string" calcext:value-type="string">
            <text:p>psi</text:p>
          </table:table-cell>
          <table:table-cell table:style-name="ce261" office:value-type="float" office:value="6894.757" calcext:value-type="float">
            <text:p>6,89E+03</text:p>
          </table:table-cell>
          <table:table-cell table:style-name="ce250"/>
          <table:table-cell table:style-name="ce265" table:formula="of:=IF([$Planilha.B75]=&quot;&quot;;&quot;&quot;;[$Planilha.B75])" office:value-type="float" office:value="4" calcext:value-type="float">
            <text:p>4,000</text:p>
          </table:table-cell>
          <table:table-cell table:style-name="ce265" table:formula="of:=IF([$Planilha.E75]=&quot;&quot;;&quot;&quot;;[$Planilha.E75])" office:value-type="float" office:value="4.005" calcext:value-type="float">
            <text:p>4,005</text:p>
          </table:table-cell>
          <table:table-cell table:style-name="ce275" office:value-type="string" calcext:value-type="string">
            <text:p>R<text:span text:style-name="T2">2</text:span> =</text:p>
          </table:table-cell>
          <table:table-cell table:style-name="ce276" table:formula="of:=RSQ([.AD6:.AD18];[.AE6:.AE18])" office:value-type="float" office:value="0.999996968381701" calcext:value-type="float">
            <text:p>1,00000</text:p>
          </table:table-cell>
          <table:table-cell table:style-name="ce265" table:formula="of:=IF([.AD9]=&quot;&quot;;&quot;&quot;;([.$AG$7]+[.$AG$8]*[.AE9]))" office:value-type="float" office:value="3.99684909058165" calcext:value-type="float">
            <text:p>3,997</text:p>
          </table:table-cell>
          <table:table-cell table:style-name="ce265" table:formula="of:=IF([.AD9]=&quot;&quot;;&quot;&quot;;[.AD9]-[.AH9])" office:value-type="float" office:value="0.00315090941834972" calcext:value-type="float">
            <text:p>0,003</text:p>
          </table:table-cell>
          <table:table-cell table:style-name="ce266" table:formula="of:=IF([.AH9]=&quot;&quot;;&quot;&quot;;[.$AI$26]^2+[.AH9]^2*[.$AI$28]^2+2*[.AH9]*[.$AI$26]*[.$AI$28]*[.$AI$29])" office:value-type="float" office:value="0.00000453610716680071" calcext:value-type="float">
            <text:p>0,00</text:p>
          </table:table-cell>
          <table:table-cell table:style-name="ce267" table:formula="of:=IF([.AJ9]=&quot;&quot;;&quot;&quot;;SQRT([.AJ9]))" office:value-type="float" office:value="0.00212981388078881" calcext:value-type="float">
            <text:p>0,002</text:p>
          </table:table-cell>
          <table:table-cell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762" table:formula="of:=[Planilha.$D$72]/SQRT(4)" office:value-type="float" office:value="0" calcext:value-type="float">
            <text:p>0,00000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10]/[.D10]" office:value-type="float" office:value="0" calcext:value-type="float">
            <text:p>0,00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10]=0;0;[.E10]*[.H10])" office:value-type="float" office:value="0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10]^2/[.$I$14]^2" office:value-type="percentage" office:value="0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264" table:formula="of:=[Planilha.$D$79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10]/[.Q10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10]=0;0;[.R10]*[.U10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10]^2/[.$I$14]^2" office:value-type="string" office:string-value="" calcext:value-type="error">
            <text:p>#VALOR!</text:p>
          </table:table-cell>
          <table:table-cell/>
          <table:table-cell table:style-name="ce241" office:value-type="string" calcext:value-type="string">
            <text:p>kgf/cm<text:span text:style-name="T2">2</text:span></text:p>
          </table:table-cell>
          <table:table-cell table:style-name="ce261" office:value-type="float" office:value="98066.5" calcext:value-type="float">
            <text:p>9,81E+04</text:p>
          </table:table-cell>
          <table:table-cell table:style-name="ce250"/>
          <table:table-cell table:style-name="ce265" table:formula="of:=IF([$Planilha.B76]=&quot;&quot;;&quot;&quot;;[$Planilha.B76])" office:value-type="float" office:value="5" calcext:value-type="float">
            <text:p>5,000</text:p>
          </table:table-cell>
          <table:table-cell table:style-name="ce265" table:formula="of:=IF([$Planilha.E76]=&quot;&quot;;&quot;&quot;;[$Planilha.E76])" office:value-type="float" office:value="5.005" calcext:value-type="float">
            <text:p>5,005</text:p>
          </table:table-cell>
          <table:table-cell table:style-name="ce250"/>
          <table:table-cell table:style-name="ce262"/>
          <table:table-cell table:style-name="ce265" table:formula="of:=IF([.AD10]=&quot;&quot;;&quot;&quot;;([.$AG$7]+[.$AG$8]*[.AE10]))" office:value-type="float" office:value="4.99649618248119" calcext:value-type="float">
            <text:p>4,996</text:p>
          </table:table-cell>
          <table:table-cell table:style-name="ce265" table:formula="of:=IF([.AD10]=&quot;&quot;;&quot;&quot;;[.AD10]-[.AH10])" office:value-type="float" office:value="0.00350381751881379" calcext:value-type="float">
            <text:p>0,004</text:p>
          </table:table-cell>
          <table:table-cell table:style-name="ce266" table:formula="of:=IF([.AH10]=&quot;&quot;;&quot;&quot;;[.$AI$26]^2+[.AH10]^2*[.$AI$28]^2+2*[.AH10]*[.$AI$26]*[.$AI$28]*[.$AI$29])" office:value-type="float" office:value="0.00000628565907890924" calcext:value-type="float">
            <text:p>0,00</text:p>
          </table:table-cell>
          <table:table-cell table:style-name="ce267" table:formula="of:=IF([.AJ10]=&quot;&quot;;&quot;&quot;;SQRT([.AJ10]))" office:value-type="float" office:value="0.00250712167213904" calcext:value-type="float">
            <text:p>0,003</text:p>
          </table:table-cell>
          <table:table-cell/>
          <table:table-cell table:style-name="ce1" table:number-columns-repeated="16346"/>
        </table:table-row>
        <table:table-row table:style-name="ro9">
          <table:table-cell table:style-name="ce608" table:content-validation-name="val17"/>
          <table:table-cell table:style-name="ce240"/>
          <table:table-cell table:style-name="ce761"/>
          <table:table-cell table:style-name="ce256" table:number-columns-repeated="2"/>
          <table:table-cell table:style-name="ce608" table:content-validation-name="val18"/>
          <table:table-cell table:style-name="ce256" table:number-columns-repeated="4"/>
          <table:table-cell table:style-name="ce259"/>
          <table:table-cell table:style-name="ce260"/>
          <table:table-cell/>
          <table:table-cell table:style-name="ce608" table:content-validation-name="val17"/>
          <table:table-cell table:style-name="ce277"/>
          <table:table-cell table:style-name="ce256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/>
          <table:table-cell table:style-name="ce274"/>
          <table:table-cell table:style-name="ce240"/>
          <table:table-cell/>
          <table:table-cell table:style-name="ce241" office:value-type="string" calcext:value-type="string">
            <text:p>mm Hg</text:p>
          </table:table-cell>
          <table:table-cell table:style-name="ce261" office:value-type="float" office:value="133.3222" calcext:value-type="float">
            <text:p>1,33E+02</text:p>
          </table:table-cell>
          <table:table-cell table:style-name="ce250"/>
          <table:table-cell table:style-name="ce265" table:formula="of:=IF([$Planilha.B77]=&quot;&quot;;&quot;&quot;;[$Planilha.B77])" office:value-type="float" office:value="7" calcext:value-type="float">
            <text:p>7,000</text:p>
          </table:table-cell>
          <table:table-cell table:style-name="ce265" table:formula="of:=IF([$Planilha.E77]=&quot;&quot;;&quot;&quot;;[$Planilha.E77])" office:value-type="float" office:value="7.01" calcext:value-type="float">
            <text:p>7,010</text:p>
          </table:table-cell>
          <table:table-cell table:style-name="ce250" table:number-columns-repeated="2"/>
          <table:table-cell table:style-name="ce265" table:formula="of:=IF([.AD11]=&quot;&quot;;&quot;&quot;;([.$AG$7]+[.$AG$8]*[.AE11]))" office:value-type="float" office:value="7.00078860173976" calcext:value-type="float">
            <text:p>7,001</text:p>
          </table:table-cell>
          <table:table-cell table:style-name="ce265" table:formula="of:=IF([.AD11]=&quot;&quot;;&quot;&quot;;[.AD11]-[.AH11])" office:value-type="float" office:value="-0.000788601739758477" calcext:value-type="float">
            <text:p>-0,001</text:p>
          </table:table-cell>
          <table:table-cell table:style-name="ce266" table:formula="of:=IF([.AH11]=&quot;&quot;;&quot;&quot;;[.$AI$26]^2+[.AH11]^2*[.$AI$28]^2+2*[.AH11]*[.$AI$26]*[.$AI$28]*[.$AI$29])" office:value-type="float" office:value="0.0000143534758384693" calcext:value-type="float">
            <text:p>0,00</text:p>
          </table:table-cell>
          <table:table-cell table:style-name="ce267" table:formula="of:=IF([.AJ11]=&quot;&quot;;&quot;&quot;;SQRT([.AJ11]))" office:value-type="float" office:value="0.00378859813631234" calcext:value-type="float">
            <text:p>0,004</text:p>
          </table:table-cell>
          <table:table-cell/>
          <table:table-cell table:style-name="ce1" table:number-columns-repeated="16346"/>
        </table:table-row>
        <table:table-row table:style-name="ro9">
          <table:table-cell table:style-name="ce768" table:content-validation-name="val17"/>
          <table:table-cell table:style-name="ce280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8" table:content-validation-name="val17"/>
          <table:table-cell table:style-name="ce281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/>
          <table:table-cell table:style-name="ce274"/>
          <table:table-cell table:style-name="ce269"/>
          <table:table-cell/>
          <table:table-cell table:style-name="ce241" office:value-type="string" calcext:value-type="string">
            <text:p>m H2O</text:p>
          </table:table-cell>
          <table:table-cell table:style-name="ce261" office:value-type="float" office:value="9806.65" calcext:value-type="float">
            <text:p>9,81E+03</text:p>
          </table:table-cell>
          <table:table-cell table:style-name="ce250"/>
          <table:table-cell table:style-name="ce265" table:formula="of:=IF([$Planilha.B78]=&quot;&quot;;&quot;&quot;;[$Planilha.B78])">
            <text:p/>
          </table:table-cell>
          <table:table-cell table:style-name="ce265" table:formula="of:=IF([$Planilha.E78]=&quot;&quot;;&quot;&quot;;[$Planilha.E78])">
            <text:p/>
          </table:table-cell>
          <table:table-cell table:style-name="ce250" table:number-columns-repeated="2"/>
          <table:table-cell table:style-name="ce265" table:formula="of:=IF([.AD12]=&quot;&quot;;&quot;&quot;;([.$AG$7]+[.$AG$8]*[.AE12]))">
            <text:p/>
          </table:table-cell>
          <table:table-cell table:style-name="ce265" table:formula="of:=IF([.AD12]=&quot;&quot;;&quot;&quot;;[.AD12]-[.AH12])">
            <text:p/>
          </table:table-cell>
          <table:table-cell table:style-name="ce266" table:formula="of:=IF([.AH12]=&quot;&quot;;&quot;&quot;;[.$AI$26]^2+[.AH12]^2*[.$AI$28]^2+2*[.AH12]*[.$AI$26]*[.$AI$28]*[.$AI$29])">
            <text:p/>
          </table:table-cell>
          <table:table-cell table:style-name="ce267" table:formula="of:=IF([.AJ12]=&quot;&quot;;&quot;&quot;;SQRT([.AJ12]))">
            <text:p/>
          </table:table-cell>
          <table:table-cell/>
          <table:table-cell table:style-name="ce1" table:number-columns-repeated="16346"/>
        </table:table-row>
        <table:table-row table:style-name="ro9">
          <table:table-cell table:style-name="ce769" table:content-validation-name="val17"/>
          <table:table-cell table:style-name="ce282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9" table:content-validation-name="val17"/>
          <table:table-cell table:style-name="ce282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283" office:value-type="string" calcext:value-type="string">
            <text:p>in H2O</text:p>
          </table:table-cell>
          <table:table-cell table:style-name="ce261" table:formula="of:=1/[$Conversão.N7]" office:value-type="float" office:value="249.095099776288" calcext:value-type="float">
            <text:p>2,49E+02</text:p>
          </table:table-cell>
          <table:table-cell/>
          <table:table-cell table:style-name="ce265" table:formula="of:=IF([$Planilha.B79]=&quot;&quot;;&quot;&quot;;[$Planilha.B79])">
            <text:p/>
          </table:table-cell>
          <table:table-cell table:style-name="ce265" table:formula="of:=IF([$Planilha.E79]=&quot;&quot;;&quot;&quot;;[$Planilha.E79])">
            <text:p/>
          </table:table-cell>
          <table:table-cell table:style-name="ce250" table:number-columns-repeated="2"/>
          <table:table-cell table:style-name="ce265" table:formula="of:=IF([.AD13]=&quot;&quot;;&quot;&quot;;([.$AG$7]+[.$AG$8]*[.AE13]))">
            <text:p/>
          </table:table-cell>
          <table:table-cell table:style-name="ce265" table:formula="of:=IF([.AD13]=&quot;&quot;;&quot;&quot;;[.AD13]-[.AH13])">
            <text:p/>
          </table:table-cell>
          <table:table-cell table:style-name="ce266" table:formula="of:=IF([.AH13]=&quot;&quot;;&quot;&quot;;[.$AI$26]^2+[.AH13]^2*[.$AI$28]^2+2*[.AH13]*[.$AI$26]*[.$AI$28]*[.$AI$29])">
            <text:p/>
          </table:table-cell>
          <table:table-cell table:style-name="ce267" table:formula="of:=IF([.AJ13]=&quot;&quot;;&quot;&quot;;SQRT([.AJ13]))">
            <text:p/>
          </table:table-cell>
          <table:table-cell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764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I5:.I12]))" office:value-type="float" office:value="0.0290384087339525" calcext:value-type="float">
            <text:p>0,0290384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I14]^4)/((([.I5]^4)/[.K5])+([.I6]^4/[.K6]+(([.I7]^4)/[.K7])+(([.I8]^4)/[.K8])+(([.I9]^4)/[.K9])+([.I10]^4)/[.K10])))" office:value-type="float" office:value="91640.7864919734" calcext:value-type="float">
            <text:p>91640,8</text:p>
          </table:table-cell>
          <table:table-cell table:style-name="ce822" table:formula="of:=SUM([.L5:.L13])" office:value-type="percentage" office:value="1" calcext:value-type="percentage">
            <text:p>100,00%</text:p>
          </table:table-cell>
          <table:table-cell/>
          <table:table-cell table:style-name="ce347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283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V5:.V12]))" office:value-type="string" office:string-value="" calcext:value-type="error">
            <text:p>#VALOR!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V14]^4)/((([.V5]^4)/[.X5])+([.V6]^4/[.X6]+(([.V7]^4)/[.X7])+(([.V8]^4)/[.X8])+(([.V9]^4)/[.X9])+([.V10]^4)/[.X10])))" office:value-type="string" office:string-value="" calcext:value-type="error">
            <text:p>#VALOR!</text:p>
          </table:table-cell>
          <table:table-cell table:style-name="ce822" table:formula="of:=SUM([.Y5:.Y13])" office:value-type="string" office:string-value="" calcext:value-type="error">
            <text:p>#VALOR!</text:p>
          </table:table-cell>
          <table:table-cell table:number-columns-repeated="4"/>
          <table:table-cell table:style-name="ce265" table:formula="of:=IF([$Planilha.B80]=&quot;&quot;;&quot;&quot;;[$Planilha.B80])">
            <text:p/>
          </table:table-cell>
          <table:table-cell table:style-name="ce265" table:formula="of:=IF([$Planilha.E80]=&quot;&quot;;&quot;&quot;;[$Planilha.E80])">
            <text:p/>
          </table:table-cell>
          <table:table-cell table:number-columns-repeated="2"/>
          <table:table-cell table:style-name="ce265" table:formula="of:=IF([.AD14]=&quot;&quot;;&quot;&quot;;([.$AG$7]+[.$AG$8]*[.AE14]))">
            <text:p/>
          </table:table-cell>
          <table:table-cell table:style-name="ce265" table:formula="of:=IF([.AD14]=&quot;&quot;;&quot;&quot;;[.AD14]-[.AH14])">
            <text:p/>
          </table:table-cell>
          <table:table-cell table:style-name="ce266" table:formula="of:=IF([.AH14]=&quot;&quot;;&quot;&quot;;[.$AI$26]^2+[.AH14]^2*[.$AI$28]^2+2*[.AH14]*[.$AI$26]*[.$AI$28]*[.$AI$29])">
            <text:p/>
          </table:table-cell>
          <table:table-cell table:style-name="ce267" table:formula="of:=IF([.AJ14]=&quot;&quot;;&quot;&quot;;SQRT([.AJ14]))">
            <text:p/>
          </table:table-cell>
          <table:table-cell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765" table:formula="of:=TRUNC([.I15];[.C14])" office:value-type="float" office:value="0.05" calcext:value-type="float">
            <text:p>0,050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I14]*[.I16]" office:value-type="float" office:value="0.0580776806350268" calcext:value-type="float">
            <text:p>0,0580777</text:p>
          </table:table-cell>
          <table:table-cell table:style-name="ce282" table:number-columns-repeated="3"/>
          <table:table-cell/>
          <table:table-cell table:style-name="ce347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267" table:formula="of:=TRUNC([.V15];[.P14])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V14]*[.V16]" office:value-type="string" office:string-value="" calcext:value-type="error">
            <text:p>#VALOR!</text:p>
          </table:table-cell>
          <table:table-cell table:style-name="ce282" table:number-columns-repeated="3"/>
          <table:table-cell table:number-columns-repeated="4"/>
          <table:table-cell table:style-name="ce265" table:formula="of:=IF([$Planilha.B81]=&quot;&quot;;&quot;&quot;;[$Planilha.B81])">
            <text:p/>
          </table:table-cell>
          <table:table-cell table:style-name="ce265" table:formula="of:=IF([$Planilha.E81]=&quot;&quot;;&quot;&quot;;[$Planilha.E81])">
            <text:p/>
          </table:table-cell>
          <table:table-cell table:number-columns-repeated="2"/>
          <table:table-cell table:style-name="ce265" table:formula="of:=IF([.AD15]=&quot;&quot;;&quot;&quot;;([.$AG$7]+[.$AG$8]*[.AE15]))">
            <text:p/>
          </table:table-cell>
          <table:table-cell table:style-name="ce265" table:formula="of:=IF([.AD15]=&quot;&quot;;&quot;&quot;;[.AD15]-[.AH15])">
            <text:p/>
          </table:table-cell>
          <table:table-cell table:style-name="ce266" table:formula="of:=IF([.AH15]=&quot;&quot;;&quot;&quot;;[.$AI$26]^2+[.AH15]^2*[.$AI$28]^2+2*[.AH15]*[.$AI$26]*[.$AI$28]*[.$AI$29])">
            <text:p/>
          </table:table-cell>
          <table:table-cell table:style-name="ce267" table:formula="of:=IF([.AJ15]=&quot;&quot;;&quot;&quot;;SQRT([.AJ15]))">
            <text:p/>
          </table:table-cell>
          <table:table-cell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Diferença</text:p>
          </table:table-cell>
          <table:covered-table-cell/>
          <table:table-cell table:style-name="ce763" table:formula="of:=[.I15]-[.C15]" office:value-type="float" office:value="0.00807768063502679" calcext:value-type="float">
            <text:p>0,00808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K14]&gt;100000;2;TINV(0.0455;[.K14]))" office:value-type="float" office:value="2.00002972501454" calcext:value-type="float">
            <text:p>2,00</text:p>
          </table:table-cell>
          <table:table-cell table:style-name="ce286" table:number-columns-repeated="3"/>
          <table:table-cell/>
          <table:table-cell table:style-name="ce347" office:value-type="string" calcext:value-type="string" table:number-columns-spanned="2" table:number-rows-spanned="1">
            <text:p>Diferença</text:p>
          </table:table-cell>
          <table:covered-table-cell/>
          <table:table-cell table:style-name="ce269" table:formula="of:=[.V15]-[.P15]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X14]&gt;100000;2;TINV(0.0455;[.X14]))" office:value-type="string" office:string-value="" calcext:value-type="error">
            <text:p>#VALOR!</text:p>
          </table:table-cell>
          <table:table-cell table:style-name="ce286" table:number-columns-repeated="3"/>
          <table:table-cell table:number-columns-repeated="4"/>
          <table:table-cell table:formula="of:=IF([$Planilha.B82]=&quot;&quot;;&quot;&quot;;[$Planilha.B82])">
            <text:p/>
          </table:table-cell>
          <table:table-cell table:formula="of:=IF([$Planilha.E82]=&quot;&quot;;&quot;&quot;;[$Planilha.E82])">
            <text:p/>
          </table:table-cell>
          <table:table-cell table:number-columns-repeated="2"/>
          <table:table-cell table:style-name="ce265" table:formula="of:=IF([.AD16]=&quot;&quot;;&quot;&quot;;([.$AG$7]+[.$AG$8]*[.AE16]))">
            <text:p/>
          </table:table-cell>
          <table:table-cell table:style-name="ce265" table:formula="of:=IF([.AD16]=&quot;&quot;;&quot;&quot;;[.AD16]-[.AH16])">
            <text:p/>
          </table:table-cell>
          <table:table-cell table:style-name="ce266" table:formula="of:=IF([.AH16]=&quot;&quot;;&quot;&quot;;[.$AI$26]^2+[.AH16]^2*[.$AI$28]^2+2*[.AH16]*[.$AI$26]*[.$AI$28]*[.$AI$29])">
            <text:p/>
          </table:table-cell>
          <table:table-cell table:style-name="ce267" table:formula="of:=IF([.AJ16]=&quot;&quot;;&quot;&quot;;SQRT([.AJ16]))">
            <text:p/>
          </table:table-cell>
          <table:table-cell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Percentual</text:p>
          </table:table-cell>
          <table:covered-table-cell/>
          <table:table-cell table:style-name="ce763" table:formula="of:=([.C16]/[.I15])*100" office:value-type="float" office:value="13.9084077509719" calcext:value-type="float">
            <text:p>13,90841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C17]&lt;=5;ROUND([.I15];[.C14]);ROUNDUP([.I15];[.C14]))" office:value-type="float" office:value="0.06" calcext:value-type="float">
            <text:p>0,060</text:p>
          </table:table-cell>
          <table:table-cell table:style-name="ce288" table:formula="of:=[.J6]" office:value-type="string" office:string-value="kgf/cm2" calcext:value-type="string">
            <text:p>kgf/cm2</text:p>
          </table:table-cell>
          <table:table-cell table:style-name="ce282" table:number-columns-repeated="2"/>
          <table:table-cell/>
          <table:table-cell table:style-name="ce347" office:value-type="string" calcext:value-type="string" table:number-columns-spanned="2" table:number-rows-spanned="1">
            <text:p>Percentual</text:p>
          </table:table-cell>
          <table:covered-table-cell/>
          <table:table-cell table:style-name="ce269" table:formula="of:=([.P16]/[.V15])*100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P17]&lt;=5;ROUND([.V15];[.P14]);ROUNDUP([.V15];[.P14]))" office:value-type="string" office:string-value="" calcext:value-type="error">
            <text:p>#VALOR!</text:p>
          </table:table-cell>
          <table:table-cell table:style-name="ce288" table:formula="of:=[.W5]" office:value-type="string" office:string-value="kgf/cm2" calcext:value-type="string">
            <text:p>kgf/cm2</text:p>
          </table:table-cell>
          <table:table-cell table:style-name="ce282" table:number-columns-repeated="2"/>
          <table:table-cell table:number-columns-repeated="4"/>
          <table:table-cell table:formula="of:=IF([$Planilha.B83]=&quot;&quot;;&quot;&quot;;[$Planilha.B83])">
            <text:p/>
          </table:table-cell>
          <table:table-cell table:formula="of:=IF([$Planilha.S59]=&quot;&quot;;&quot;&quot;;[$Planilha.S59])">
            <text:p/>
          </table:table-cell>
          <table:table-cell table:number-columns-repeated="2"/>
          <table:table-cell table:style-name="ce265" table:formula="of:=IF([.AD17]=&quot;&quot;;&quot;&quot;;([.$AG$7]+[.$AG$8]*[.AE17]))">
            <text:p/>
          </table:table-cell>
          <table:table-cell table:style-name="ce265" table:formula="of:=IF([.AD17]=&quot;&quot;;&quot;&quot;;[.AD17]-[.AH17])">
            <text:p/>
          </table:table-cell>
          <table:table-cell table:style-name="ce266" table:formula="of:=IF([.AH17]=&quot;&quot;;&quot;&quot;;[.$AI$26]^2+[.AH17]^2*[.$AI$28]^2+2*[.AH17]*[.$AI$26]*[.$AI$28]*[.$AI$29])">
            <text:p/>
          </table:table-cell>
          <table:table-cell table:style-name="ce267" table:formula="of:=IF([.AJ17]=&quot;&quot;;&quot;&quot;;SQRT([.AJ17]))">
            <text:p/>
          </table:table-cell>
          <table:table-cell/>
          <table:table-cell table:style-name="ce1" table:number-columns-repeated="16346"/>
        </table:table-row>
        <table:table-row table:style-name="ro9">
          <table:table-cell table:style-name="ce107" table:number-columns-spanned="12" table:number-rows-spanned="1"/>
          <table:covered-table-cell table:number-columns-repeated="11"/>
          <table:table-cell/>
          <table:table-cell table:style-name="ce107" table:number-columns-spanned="12" table:number-rows-spanned="1"/>
          <table:covered-table-cell table:number-columns-repeated="11"/>
          <table:table-cell table:number-columns-repeated="4"/>
          <table:table-cell table:formula="of:=IF([$Planilha.B84]=&quot;&quot;;&quot;&quot;;[$Planilha.B84])">
            <text:p/>
          </table:table-cell>
          <table:table-cell table:formula="of:=IF([$Planilha.S60]=&quot;&quot;;&quot;&quot;;[$Planilha.S60])">
            <text:p/>
          </table:table-cell>
          <table:table-cell table:number-columns-repeated="2"/>
          <table:table-cell table:style-name="ce265" table:formula="of:=IF([.AD18]=&quot;&quot;;&quot;&quot;;([.$AG$7]+[.$AG$8]*[.AE18]))">
            <text:p/>
          </table:table-cell>
          <table:table-cell table:style-name="ce265" table:formula="of:=IF([.AD18]=&quot;&quot;;&quot;&quot;;[.AD18]-[.AH18])">
            <text:p/>
          </table:table-cell>
          <table:table-cell table:style-name="ce266" table:formula="of:=IF([.AH18]=&quot;&quot;;&quot;&quot;;[.$AI$26]^2+[.AH18]^2*[.$AI$28]^2+2*[.AH18]*[.$AI$26]*[.$AI$28]*[.$AI$29])">
            <text:p/>
          </table:table-cell>
          <table:table-cell table:style-name="ce267" table:formula="of:=IF([.AJ18]=&quot;&quot;;&quot;&quot;;SQRT([.AJ18]))">
            <text:p/>
          </table:table-cell>
          <table:table-cell/>
          <table:table-cell table:style-name="ce1" table:number-columns-repeated="16346"/>
        </table:table-row>
        <table:table-row table:style-name="ro9">
          <table:table-cell table:style-name="ce349" table:formula="of:=CONCATENATE(&quot;INCERTEZA DE MEDIÇÃO - MANÔMETRO – Calibração – Ponto 2:&quot;;&quot;   &quot;;[$Planilha.$S49];&quot;  &quot;;[$Planilha.$K$25])" office:value-type="string" office:string-value="INCERTEZA DE MEDIÇÃO - MANÔMETRO – Calibração – Ponto 2:     kgf/cm2" calcext:value-type="string" table:number-columns-spanned="12" table:number-rows-spanned="1">
            <text:p>INCERTEZA DE MEDIÇÃO - MANÔMETRO – Calibração – Ponto 2: <text:s text:c="4"/>kgf/cm2</text:p>
          </table:table-cell>
          <table:covered-table-cell table:number-columns-repeated="11"/>
          <table:table-cell/>
          <table:table-cell table:style-name="ce350" table:formula="of:=CONCATENATE(&quot;INCERTEZA DE MEDIÇÃO - MANÔMETRO – Calibração – Ponto 9:&quot;;&quot;   &quot;;[$Planilha.$S56];&quot;  &quot;;[$Planilha.$K$25])" office:value-type="string" office:string-value="INCERTEZA DE MEDIÇÃO - MANÔMETRO – Calibração – Ponto 9:     kgf/cm2" calcext:value-type="string" table:number-columns-spanned="12" table:number-rows-spanned="1">
            <text:p>INCERTEZA DE MEDIÇÃO - MANÔMETRO – Calibração – Ponto 9: <text:s text:c="4"/>kgf/cm2</text:p>
          </table:table-cell>
          <table:covered-table-cell table:number-columns-repeated="11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289" office:value-type="string" calcext:value-type="string">
            <text:p>Tipo</text:p>
          </table:table-cell>
          <table:table-cell table:style-name="ce290" office:value-type="string" calcext:value-type="string">
            <text:p>Componente da incerteza</text:p>
          </table:table-cell>
          <table:table-cell table:style-name="ce766" office:value-type="string" calcext:value-type="string">
            <text:p>Valor</text:p>
          </table:table-cell>
          <table:table-cell table:style-name="ce289" office:value-type="string" calcext:value-type="string">
            <text:p>Divisor</text:p>
          </table:table-cell>
          <table:table-cell table:style-name="ce289" office:value-type="string" calcext:value-type="string">
            <text:p>µ(xi)</text:p>
          </table:table-cell>
          <table:table-cell table:style-name="ce289" office:value-type="string" calcext:value-type="string">
            <text:p>Distribuição</text:p>
          </table:table-cell>
          <table:table-cell table:style-name="ce289" office:value-type="string" calcext:value-type="string">
            <text:p>unid. ent.</text:p>
          </table:table-cell>
          <table:table-cell table:style-name="ce289" office:value-type="string" calcext:value-type="string">
            <text:p>Ci</text:p>
          </table:table-cell>
          <table:table-cell table:style-name="ce291" office:value-type="string" calcext:value-type="string">
            <text:p>µi(y)</text:p>
          </table:table-cell>
          <table:table-cell table:style-name="ce289" office:value-type="string" calcext:value-type="string">
            <text:p>unid. Saida</text:p>
          </table:table-cell>
          <table:table-cell table:style-name="ce289" office:value-type="string" calcext:value-type="string">
            <text:p>vi/veff</text:p>
          </table:table-cell>
          <table:table-cell table:style-name="ce289" office:value-type="string" calcext:value-type="string">
            <text:p>%</text:p>
          </table:table-cell>
          <table:table-cell/>
          <table:table-cell table:style-name="ce289" office:value-type="string" calcext:value-type="string">
            <text:p>Tipo</text:p>
          </table:table-cell>
          <table:table-cell table:style-name="ce290" office:value-type="string" calcext:value-type="string">
            <text:p>Componente da incerteza</text:p>
          </table:table-cell>
          <table:table-cell table:style-name="ce289" office:value-type="string" calcext:value-type="string">
            <text:p>Valor</text:p>
          </table:table-cell>
          <table:table-cell table:style-name="ce289" office:value-type="string" calcext:value-type="string">
            <text:p>Divisor</text:p>
          </table:table-cell>
          <table:table-cell table:style-name="ce289" office:value-type="string" calcext:value-type="string">
            <text:p>µ(xi)</text:p>
          </table:table-cell>
          <table:table-cell table:style-name="ce289" office:value-type="string" calcext:value-type="string">
            <text:p>Distribuição</text:p>
          </table:table-cell>
          <table:table-cell table:style-name="ce289" office:value-type="string" calcext:value-type="string">
            <text:p>unid. ent.</text:p>
          </table:table-cell>
          <table:table-cell table:style-name="ce289" office:value-type="string" calcext:value-type="string">
            <text:p>Ci</text:p>
          </table:table-cell>
          <table:table-cell table:style-name="ce291" office:value-type="string" calcext:value-type="string">
            <text:p>µi(y)</text:p>
          </table:table-cell>
          <table:table-cell table:style-name="ce289" office:value-type="string" calcext:value-type="string">
            <text:p>unid. Saida</text:p>
          </table:table-cell>
          <table:table-cell table:style-name="ce289" office:value-type="string" calcext:value-type="string">
            <text:p>vi/veff</text:p>
          </table:table-cell>
          <table:table-cell table:style-name="ce289" office:value-type="string" calcext:value-type="string">
            <text:p>%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767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21]/[.D21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21]=0;0;[.E21]*[.H21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21]^2/[.$I$30]^2" office:value-type="percentage" office:value="0.961538450222294" calcext:value-type="percentage">
            <text:p>96,15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258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21]/[.Q21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21]=0;0;[.R21]*[.U21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21]^2/[.$V$30]^2" office:value-type="string" office:string-value="" calcext:value-type="error">
            <text:p>#VALOR!</text:p>
          </table:table-cell>
          <table:table-cell table:number-columns-repeated="4"/>
          <table:table-cell table:style-name="ce351" office:value-type="string" calcext:value-type="string" table:number-columns-spanned="6" table:number-rows-spanned="2">
            <text:p>Entradas Para o Cálculo da Incerteza da Curva</text:p>
          </table:table-cell>
          <table:covered-table-cell table:number-columns-repeated="5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761" table:formula="of:=[Planilha.$G$73]/SQRT(4)" office:value-type="float" office:value="0" calcext:value-type="float">
            <text:p>0,00000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22]/[.D22]" office:value-type="float" office:value="0" calcext:value-type="float">
            <text:p>0,00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22]=0;0;[.E22]*[.H22])" office:value-type="float" office:value="0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22]^2/[.$I$30]^2" office:value-type="percentage" office:value="0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264" table:formula="of:=[Planilha.$G$80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22]/[.Q22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22]=0;0;[.R22]*[.U22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22]^2/[.$V$30]^2" office:value-type="string" office:string-value="" calcext:value-type="error">
            <text:p>#VALOR!</text:p>
          </table:table-cell>
          <table:table-cell table:number-columns-repeated="4"/>
          <table:covered-table-cell table:number-columns-repeated="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761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23]/[.D23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23]=0;0;[.E23]*[.H23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23]^2/[.$I$30]^2" office:value-type="percentage" office:value="0.00961538450222294" calcext:value-type="percentage">
            <text:p>0,96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256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23]/[.Q23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23]=0;0;[.R23]*[.U23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23]^2/[.$V$30]^2" office:value-type="string" office:string-value="" calcext:value-type="error">
            <text:p>#VALOR!</text:p>
          </table:table-cell>
          <table:table-cell table:number-columns-repeated="4"/>
          <table:table-cell table:style-name="ce292" office:value-type="string" calcext:value-type="string">
            <text:p>Soma (X) =</text:p>
          </table:table-cell>
          <table:table-cell table:style-name="ce293" table:formula="of:=SUM([.AE6:.AE18])" office:value-type="float" office:value="20.0475" calcext:value-type="float">
            <text:p>20,05</text:p>
          </table:table-cell>
          <table:table-cell table:style-name="ce294" table:number-columns-repeated="2"/>
          <table:table-cell table:style-name="ce293" office:value-type="string" calcext:value-type="string">
            <text:p>Soma Quad (Y-Ycal) <text:s text:c="2"/>=</text:p>
          </table:table-cell>
          <table:table-cell table:style-name="ce295" table:formula="of:=SUMSQ([.AI6:.AI18])" office:value-type="float" office:value="0.000101053943288204" calcext:value-type="float">
            <text:p>1,01E-04</text:p>
          </table:table-cell>
          <table:table-cell table:number-columns-repeated="3"/>
          <table:table-cell table:style-name="ce1" table:number-columns-repeated="16346"/>
        </table:table-row>
        <table:table-row table:style-name="ro14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761" table:formula="of:=[Incerteza.$K$119]*[$Planilha.$B$73]" office:value-type="float" office:value="0.01" calcext:value-type="float">
            <text:p>0,01000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C24]/[.D24]" office:value-type="float" office:value="0.005" calcext:value-type="float">
            <text:p>0,005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24]=0;0;[.E24]*[.H24])" office:value-type="float" office:value="0.005" calcext:value-type="float">
            <text:p>0,005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I24]^2/[.$I$30]^2" office:value-type="percentage" office:value="0.0288461535066688" calcext:value-type="percentage">
            <text:p>2,88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256" table:formula="of:=[Incerteza.$K$119]*[$Planilha.$B$80]" office:value-type="string" office:string-value="" calcext:value-type="error">
            <text:p>#VALOR!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P24]/[.Q24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24]=0;0;[.R24]*[.U24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V24]^2/[.$V$30]^2" office:value-type="string" office:string-value="" calcext:value-type="error">
            <text:p>#VALOR!</text:p>
          </table:table-cell>
          <table:table-cell table:number-columns-repeated="4"/>
          <table:table-cell table:style-name="ce296" office:value-type="string" calcext:value-type="string">
            <text:p>Soma Quad (X) =</text:p>
          </table:table-cell>
          <table:table-cell table:style-name="ce250" table:formula="of:=SUMSQ([.AE6:.AE18])" office:value-type="float" office:value="100.34048125" calcext:value-type="float">
            <text:p>100,34</text:p>
          </table:table-cell>
          <table:table-cell table:number-columns-repeated="2"/>
          <table:table-cell table:style-name="ce297" office:value-type="string" calcext:value-type="string">
            <text:p>S<text:span text:style-name="T3">2</text:span><text:span text:style-name="T4"> =</text:span></text:p>
          </table:table-cell>
          <table:table-cell table:style-name="ce298" table:formula="of:=[.AI23]/([.AE26]-2)" office:value-type="float" office:value="0.0000252634858220509" calcext:value-type="float">
            <text:p>2,53E-05</text:p>
          </table:table-cell>
          <table:table-cell table:number-columns-repeated="3"/>
          <table:table-cell table:style-name="ce1" table:number-columns-repeated="16346"/>
        </table:table-row>
        <table:table-row table:style-name="ro15">
          <table:table-cell table:style-name="ce608" table:content-validation-name="val17" office:value-type="string" calcext:value-type="string">
            <text:p>A</text:p>
          </table:table-cell>
          <table:table-cell table:style-name="ce240" office:value-type="string" calcext:value-type="string">
            <text:p>Incerteza da curva de calibração</text:p>
          </table:table-cell>
          <table:table-cell table:style-name="ce761" table:formula="of:=[.$R$119]^2+[.$S$119]^2*([$Planilha.$E$73])^2+2*([$Planilha.$E$73])*[.$R$119]*[.$S$119]*[.$T$119]" office:value-type="float" office:value="0.00000319368740322402" calcext:value-type="float">
            <text:p>0,00000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C25]/[.D25]" office:value-type="float" office:value="0.00000319368740322402" calcext:value-type="float">
            <text:p>0,000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G24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25]=0;0;[.E25]*[.H25])" office:value-type="float" office:value="0.00000319368740322402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I25]^2/[.$I$30]^2" office:value-type="percentage" office:value="0.0000000117688143570855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40" office:value-type="string" calcext:value-type="string">
            <text:p>Incerteza da curva de calibração</text:p>
          </table:table-cell>
          <table:table-cell table:style-name="ce256" table:formula="of:=[.$R$119]^2+[.$S$119]^2*([$Planilha.$E$80])^2+2*([$Planilha.$E$80])*[.$R$119]*[.$S$119]*[.$T$119]" office:value-type="string" office:string-value="" calcext:value-type="error">
            <text:p>#VALOR!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P25]/[.Q25]" office:value-type="string" office:string-value="" calcext:value-type="error">
            <text:p>#VALOR!</text:p>
          </table:table-cell>
          <table:table-cell table:style-name="ce242" office:value-type="string" calcext:value-type="string">
            <text:p>Normal</text:p>
          </table:table-cell>
          <table:table-cell table:style-name="ce242" table:formula="of:=[.T24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25]=0;0;[.R25]*[.U25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2" office:value-type="float" office:value="100000" calcext:value-type="float">
            <text:p>100000</text:p>
          </table:table-cell>
          <table:table-cell table:style-name="ce820" table:formula="of:=[.V25]^2/[.$V$30]^2" office:value-type="string" office:string-value="" calcext:value-type="error">
            <text:p>#VALOR!</text:p>
          </table:table-cell>
          <table:table-cell table:number-columns-repeated="4"/>
          <table:table-cell table:style-name="ce296" office:value-type="string" calcext:value-type="string">
            <text:p>Soma ao Quadradao (X) =</text:p>
          </table:table-cell>
          <table:table-cell table:style-name="ce250" table:formula="of:=[.AE23]^2" office:value-type="float" office:value="401.90225625" calcext:value-type="float">
            <text:p>401,90</text:p>
          </table:table-cell>
          <table:table-cell table:number-columns-repeated="2"/>
          <table:table-cell table:style-name="ce297" office:value-type="string" calcext:value-type="string">
            <text:p>S<text:span text:style-name="T3">2</text:span><text:span text:style-name="T5">a</text:span><text:span text:style-name="T4"> =</text:span></text:p>
          </table:table-cell>
          <table:table-cell table:style-name="ce298" table:formula="of:=[.AI24]*[.AE24]/[.AE27]" office:value-type="float" office:value="0.0000126658455587196" calcext:value-type="float">
            <text:p>1,27E-05</text:p>
          </table:table-cell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762" table:formula="of:=[Planilha.$D$73]/SQRT(4)" office:value-type="float" office:value="0" calcext:value-type="float">
            <text:p>0,00000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26]/[.D26]" office:value-type="float" office:value="0" calcext:value-type="float">
            <text:p>0,00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26]=0;0;[.E26]*[.H26])" office:value-type="float" office:value="0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26]^2/[.$I$14]^2" office:value-type="percentage" office:value="0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264" table:formula="of:=[Planilha.$D$80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26]/[.Q26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26]=0;0;[.R26]*[.U26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26]^2/[.$I$14]^2" office:value-type="string" office:string-value="" calcext:value-type="error">
            <text:p>#VALOR!</text:p>
          </table:table-cell>
          <table:table-cell table:number-columns-repeated="4"/>
          <table:table-cell table:style-name="ce296" office:value-type="string" calcext:value-type="string">
            <text:p>n=</text:p>
          </table:table-cell>
          <table:table-cell table:style-name="ce250" table:formula="of:=COUNT([.AE6:.AE18])" office:value-type="float" office:value="6" calcext:value-type="float">
            <text:p>6,00</text:p>
          </table:table-cell>
          <table:table-cell table:number-columns-repeated="2"/>
          <table:table-cell table:style-name="ce297" office:value-type="string" calcext:value-type="string">
            <text:p>Incerteza a =</text:p>
          </table:table-cell>
          <table:table-cell table:style-name="ce298" table:formula="of:=SQRT([.AI25])" office:value-type="float" office:value="0.00355891072643296" calcext:value-type="float">
            <text:p>3,56E-03</text:p>
          </table:table-cell>
          <table:table-cell table:number-columns-repeated="3"/>
          <table:table-cell table:style-name="ce1" table:number-columns-repeated="16346"/>
        </table:table-row>
        <table:table-row table:style-name="ro15">
          <table:table-cell table:style-name="ce608" table:content-validation-name="val17"/>
          <table:table-cell table:style-name="ce277"/>
          <table:table-cell table:style-name="ce761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3"/>
          <table:table-cell/>
          <table:table-cell table:style-name="ce608" table:content-validation-name="val17"/>
          <table:table-cell table:style-name="ce277"/>
          <table:table-cell table:style-name="ce256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2"/>
          <table:table-cell table:style-name="ce240"/>
          <table:table-cell table:number-columns-repeated="4"/>
          <table:table-cell table:style-name="ce296" office:value-type="string" calcext:value-type="string">
            <text:p>D =</text:p>
          </table:table-cell>
          <table:table-cell table:style-name="ce250" table:formula="of:=[.AE26]*[.AE24]-[.AE25]" office:value-type="float" office:value="200.14063125" calcext:value-type="float">
            <text:p>200,14</text:p>
          </table:table-cell>
          <table:table-cell table:number-columns-repeated="2"/>
          <table:table-cell table:style-name="ce297" office:value-type="string" calcext:value-type="string">
            <text:p>S<text:span text:style-name="T3">2</text:span><text:span text:style-name="T5">b</text:span><text:span text:style-name="T4"> =</text:span></text:p>
          </table:table-cell>
          <table:table-cell table:style-name="ce298" table:formula="of:=([.AE26]*[.AI24])/[.AE27]" office:value-type="float" office:value="0.000000757372023789425" calcext:value-type="float">
            <text:p>7,57E-07</text:p>
          </table:table-cell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768" table:content-validation-name="val17"/>
          <table:table-cell table:style-name="ce281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8" table:content-validation-name="val17"/>
          <table:table-cell table:style-name="ce281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4"/>
          <table:table-cell table:style-name="ce299" office:value-type="string" calcext:value-type="string">
            <text:p>u(y) =</text:p>
          </table:table-cell>
          <table:table-cell table:style-name="ce300"/>
          <table:table-cell table:number-columns-repeated="2"/>
          <table:table-cell table:style-name="ce297" office:value-type="string" calcext:value-type="string">
            <text:p>Incerteza b =</text:p>
          </table:table-cell>
          <table:table-cell table:style-name="ce298" table:formula="of:=SQRT([.AI27])" office:value-type="float" office:value="0.000870271235758959" calcext:value-type="float">
            <text:p>8,70E-04</text:p>
          </table:table-cell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769" table:content-validation-name="val17"/>
          <table:table-cell table:style-name="ce282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9" table:content-validation-name="val17"/>
          <table:table-cell table:style-name="ce282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4"/>
          <table:table-cell table:style-name="ce301"/>
          <table:table-cell table:style-name="ce302" table:number-columns-repeated="3"/>
          <table:table-cell table:style-name="ce303" office:value-type="string" calcext:value-type="string">
            <text:p>r(a,b)=</text:p>
          </table:table-cell>
          <table:table-cell table:style-name="ce304" table:formula="of:=-[.AE23]/(SQRT([.AE26]*[.AE24]))" office:value-type="float" office:value="-0.817045998058529" calcext:value-type="float">
            <text:p>-8,17E-01</text:p>
          </table:table-cell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764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I21:.I28]))" office:value-type="float" office:value="0.0294392030609918" calcext:value-type="float">
            <text:p>0,0294392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I30]^4)/((([.I21]^4)/[.K21])+([.I22]^4/[.K22]+(([.I23]^4)/[.K23])+(([.I24]^4)/[.K24])+(([.I25]^4)/[.K25])+([.I26]^4)/[.K26])))" office:value-type="float" office:value="107184.622481251" calcext:value-type="float">
            <text:p>107184,6</text:p>
          </table:table-cell>
          <table:table-cell table:style-name="ce285" table:formula="of:=SUM([.L21:.L29])" office:value-type="percentage" office:value="1" calcext:value-type="percentage">
            <text:p>100,00%</text:p>
          </table:table-cell>
          <table:table-cell/>
          <table:table-cell table:style-name="ce352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283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V21:.V28]))" office:value-type="string" office:string-value="" calcext:value-type="error">
            <text:p>#VALOR!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V30]^4)/((([.V21]^4)/[.X21])+([.V22]^4/[.X22]+(([.V23]^4)/[.X23])+(([.V24]^4)/[.X24])+(([.V25]^4)/[.X25])+([.V26]^4)/[.X26])))" office:value-type="string" office:string-value="" calcext:value-type="error">
            <text:p>#VALOR!</text:p>
          </table:table-cell>
          <table:table-cell table:style-name="ce822" table:formula="of:=SUM([.Y21:.Y29])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763" table:formula="of:=TRUNC([.I31];[.C30])" office:value-type="float" office:value="0.05" calcext:value-type="float">
            <text:p>0,05000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I30]*[.I32]" office:value-type="float" office:value="0.0588784061219835" calcext:value-type="float">
            <text:p>0,0588784</text:p>
          </table:table-cell>
          <table:table-cell table:style-name="ce282" table:number-columns-repeated="3"/>
          <table:table-cell/>
          <table:table-cell table:style-name="ce352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267" table:formula="of:=TRUNC([.V31];[.P30])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V30]*[.V32]" office:value-type="string" office:string-value="" calcext:value-type="error">
            <text:p>#VALOR!</text:p>
          </table:table-cell>
          <table:table-cell table:style-name="ce282" table:number-columns-repeated="3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Diferença</text:p>
          </table:table-cell>
          <table:covered-table-cell/>
          <table:table-cell table:style-name="ce763" table:formula="of:=[.I31]-[.C31]" office:value-type="float" office:value="0.00887840612198352" calcext:value-type="float">
            <text:p>0,00888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K30]&gt;100000;2;TINV(0.0455;[.K30]))" office:value-type="float" office:value="2" calcext:value-type="float">
            <text:p>2,00</text:p>
          </table:table-cell>
          <table:table-cell table:style-name="ce286" table:number-columns-repeated="3"/>
          <table:table-cell/>
          <table:table-cell table:style-name="ce352" office:value-type="string" calcext:value-type="string" table:number-columns-spanned="2" table:number-rows-spanned="1">
            <text:p>Diferença</text:p>
          </table:table-cell>
          <table:covered-table-cell/>
          <table:table-cell table:style-name="ce269" table:formula="of:=[.V31]-[.P31]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X30]&gt;100000;2;TINV(0.0455;[.X30]))" office:value-type="string" office:string-value="" calcext:value-type="error">
            <text:p>#VALOR!</text:p>
          </table:table-cell>
          <table:table-cell table:style-name="ce286" table:number-columns-repeated="3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Percentual</text:p>
          </table:table-cell>
          <table:covered-table-cell/>
          <table:table-cell table:style-name="ce763" table:formula="of:=([.C32]/[.I31])*100" office:value-type="float" office:value="15.0792229388638" calcext:value-type="float">
            <text:p>15,07922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C33]&lt;=5;ROUND([.I31];[.C30]);ROUNDUP([.I31];[.C30]))" office:value-type="float" office:value="0.06" calcext:value-type="float">
            <text:p>0,060</text:p>
          </table:table-cell>
          <table:table-cell table:style-name="ce288" table:formula="of:=[.J21]" office:value-type="string" office:string-value="kgf/cm2" calcext:value-type="string">
            <text:p>kgf/cm2</text:p>
          </table:table-cell>
          <table:table-cell table:style-name="ce282" table:number-columns-repeated="2"/>
          <table:table-cell/>
          <table:table-cell table:style-name="ce352" office:value-type="string" calcext:value-type="string" table:number-columns-spanned="2" table:number-rows-spanned="1">
            <text:p>Percentual</text:p>
          </table:table-cell>
          <table:covered-table-cell/>
          <table:table-cell table:style-name="ce269" table:formula="of:=([.P32]/[.V31])*100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P33]&lt;=5;ROUND([.V31];[.P30]);ROUNDUP([.V31];[.P30]))" office:value-type="string" office:string-value="" calcext:value-type="error">
            <text:p>#VALOR!</text:p>
          </table:table-cell>
          <table:table-cell table:style-name="ce288" table:formula="of:=[.W21]" office:value-type="string" office:string-value="kgf/cm2" calcext:value-type="string">
            <text:p>kgf/cm2</text:p>
          </table:table-cell>
          <table:table-cell table:style-name="ce282" table:number-columns-repeated="2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107" table:number-columns-spanned="12" table:number-rows-spanned="1"/>
          <table:covered-table-cell table:number-columns-repeated="11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43" table:formula="of:=CONCATENATE(&quot;INCERTEZA DE MEDIÇÃO - MANÔMETRO – Calibração – Ponto 3:&quot;;&quot;   &quot;;[$Planilha.$S50];&quot;  &quot;;[$Planilha.$K$25])" office:value-type="string" office:string-value="INCERTEZA DE MEDIÇÃO - MANÔMETRO – Calibração – Ponto 3:     kgf/cm2" calcext:value-type="string" table:number-columns-spanned="12" table:number-rows-spanned="1">
            <text:p>INCERTEZA DE MEDIÇÃO - MANÔMETRO – Calibração – Ponto 3: <text:s text:c="4"/>kgf/cm2</text:p>
          </table:table-cell>
          <table:covered-table-cell table:number-columns-repeated="11"/>
          <table:table-cell/>
          <table:table-cell table:style-name="ce344" table:formula="of:=CONCATENATE(&quot;INCERTEZA DE MEDIÇÃO - MANÔMETRO – Calibração – Ponto 10:&quot;;&quot;   &quot;;[$Planilha.$S57];&quot;  &quot;;[$Planilha.$K$25])" office:value-type="string" office:string-value="INCERTEZA DE MEDIÇÃO - MANÔMETRO – Calibração – Ponto 10:     kgf/cm2" calcext:value-type="string" table:number-columns-spanned="12" table:number-rows-spanned="1">
            <text:p>INCERTEZA DE MEDIÇÃO - MANÔMETRO – Calibração – Ponto 10: <text:s text:c="4"/>kgf/cm2</text:p>
          </table:table-cell>
          <table:covered-table-cell table:number-columns-repeated="11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246" office:value-type="string" calcext:value-type="string">
            <text:p>Tipo</text:p>
          </table:table-cell>
          <table:table-cell table:style-name="ce247" office:value-type="string" calcext:value-type="string">
            <text:p>Componente da incerteza</text:p>
          </table:table-cell>
          <table:table-cell table:style-name="ce760" office:value-type="string" calcext:value-type="string">
            <text:p>Valor</text:p>
          </table:table-cell>
          <table:table-cell table:style-name="ce246" office:value-type="string" calcext:value-type="string">
            <text:p>Divisor</text:p>
          </table:table-cell>
          <table:table-cell table:style-name="ce246" office:value-type="string" calcext:value-type="string">
            <text:p>µ(xi)</text:p>
          </table:table-cell>
          <table:table-cell table:style-name="ce246" office:value-type="string" calcext:value-type="string">
            <text:p>Distribuição</text:p>
          </table:table-cell>
          <table:table-cell table:style-name="ce246" office:value-type="string" calcext:value-type="string">
            <text:p>unid. ent.</text:p>
          </table:table-cell>
          <table:table-cell table:style-name="ce246" office:value-type="string" calcext:value-type="string">
            <text:p>Ci</text:p>
          </table:table-cell>
          <table:table-cell table:style-name="ce248" office:value-type="string" calcext:value-type="string">
            <text:p>µi(y)</text:p>
          </table:table-cell>
          <table:table-cell table:style-name="ce246" office:value-type="string" calcext:value-type="string">
            <text:p>unid. Saida</text:p>
          </table:table-cell>
          <table:table-cell table:style-name="ce246" office:value-type="string" calcext:value-type="string">
            <text:p>vi/veff</text:p>
          </table:table-cell>
          <table:table-cell table:style-name="ce246" office:value-type="string" calcext:value-type="string">
            <text:p>%</text:p>
          </table:table-cell>
          <table:table-cell/>
          <table:table-cell table:style-name="ce246" office:value-type="string" calcext:value-type="string">
            <text:p>Tipo</text:p>
          </table:table-cell>
          <table:table-cell table:style-name="ce247" office:value-type="string" calcext:value-type="string">
            <text:p>Componente da incerteza</text:p>
          </table:table-cell>
          <table:table-cell table:style-name="ce246" office:value-type="string" calcext:value-type="string">
            <text:p>Valor</text:p>
          </table:table-cell>
          <table:table-cell table:style-name="ce246" office:value-type="string" calcext:value-type="string">
            <text:p>Divisor</text:p>
          </table:table-cell>
          <table:table-cell table:style-name="ce246" office:value-type="string" calcext:value-type="string">
            <text:p>µ(xi)</text:p>
          </table:table-cell>
          <table:table-cell table:style-name="ce246" office:value-type="string" calcext:value-type="string">
            <text:p>Distribuição</text:p>
          </table:table-cell>
          <table:table-cell table:style-name="ce246" office:value-type="string" calcext:value-type="string">
            <text:p>unid. ent.</text:p>
          </table:table-cell>
          <table:table-cell table:style-name="ce246" office:value-type="string" calcext:value-type="string">
            <text:p>Ci</text:p>
          </table:table-cell>
          <table:table-cell table:style-name="ce248" office:value-type="string" calcext:value-type="string">
            <text:p>µi(y)</text:p>
          </table:table-cell>
          <table:table-cell table:style-name="ce246" office:value-type="string" calcext:value-type="string">
            <text:p>unid. Saida</text:p>
          </table:table-cell>
          <table:table-cell table:style-name="ce246" office:value-type="string" calcext:value-type="string">
            <text:p>vi/veff</text:p>
          </table:table-cell>
          <table:table-cell table:style-name="ce246" office:value-type="string" calcext:value-type="string">
            <text:p>%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767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37]/[.D37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37]=0;0;[.E37]*[.H37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37]^2/[.$I$46]^2" office:value-type="percentage" office:value="0.779727092280293" calcext:value-type="percentage">
            <text:p>77,97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258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37]/[.Q37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37]=0;0;[.R37]*[.U37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37]^2/[.$V$46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761" table:formula="of:=[Planilha.$G$74]/SQRT(4)" office:value-type="float" office:value="0.0014433756729741" calcext:value-type="float">
            <text:p>0,00144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38]/[.D38]" office:value-type="float" office:value="0.0014433756729741" calcext:value-type="float">
            <text:p>0,001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38]=0;0;[.E38]*[.H38])" office:value-type="float" office:value="0.0014433756729741" calcext:value-type="float">
            <text:p>0,001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38]^2/[.$I$46]^2" office:value-type="percentage" office:value="0.00194931773070083" calcext:value-type="percentage">
            <text:p>0,19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256" table:formula="of:=[Planilha.$G$81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38]/[.Q38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38]=0;0;[.R38]*[.U38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38]^2/[.$V$46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761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39]/[.D39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39]=0;0;[.E39]*[.H39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39]^2/[.$I$46]^2" office:value-type="percentage" office:value="0.00779727092280293" calcext:value-type="percentage">
            <text:p>0,78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256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39]/[.Q39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39]=0;0;[.R39]*[.U39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39]^2/[.$V$46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761" table:formula="of:=[Incerteza.$K$119]*[$Planilha.$B$74]" office:value-type="float" office:value="0.03" calcext:value-type="float">
            <text:p>0,03000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C40]/[.D40]" office:value-type="float" office:value="0.015" calcext:value-type="float">
            <text:p>0,015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40]=0;0;[.E40]*[.H40])" office:value-type="float" office:value="0.015" calcext:value-type="float">
            <text:p>0,015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I40]^2/[.$I$46]^2" office:value-type="percentage" office:value="0.210526314915679" calcext:value-type="percentage">
            <text:p>21,05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256" table:formula="of:=[Incerteza.$K$119]*[$Planilha.$B$81]" office:value-type="string" office:string-value="" calcext:value-type="error">
            <text:p>#VALOR!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P40]/[.Q40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40]=0;0;[.R40]*[.U40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V40]^2/[.$V$46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40" office:value-type="string" calcext:value-type="string">
            <text:p>Incerteza da curva de calibração</text:p>
          </table:table-cell>
          <table:table-cell table:style-name="ce761" table:formula="of:=[.$R$119]^2+[.$S$119]^2*([$Planilha.$E$74])^2+2*([$Planilha.$E$74])*[.$R$119]*[.$S$119]*[.$T$119]" office:value-type="float" office:value="0.00000210615129453618" calcext:value-type="float">
            <text:p>0,00000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C41]/[.D41]" office:value-type="float" office:value="0.00000210615129453618" calcext:value-type="float">
            <text:p>0,000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G40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41]=0;0;[.E41]*[.H41])" office:value-type="float" office:value="0.00000210615129453618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I41]^2/[.$I$46]^2" office:value-type="percentage" office:value="0.00000000415052468497331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40" office:value-type="string" calcext:value-type="string">
            <text:p>Incerteza da curva de calibração</text:p>
          </table:table-cell>
          <table:table-cell table:style-name="ce256" table:formula="of:=[.$R$119]^2+[.$S$119]^2*([$Planilha.$E$81])^2+2*([$Planilha.$E$81])*[.$R$119]*[.$S$119]*[.$T$119]" office:value-type="string" office:string-value="" calcext:value-type="error">
            <text:p>#VALOR!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P41]/[.Q41]" office:value-type="string" office:string-value="" calcext:value-type="error">
            <text:p>#VALOR!</text:p>
          </table:table-cell>
          <table:table-cell table:style-name="ce241" office:value-type="string" calcext:value-type="string">
            <text:p>Normal</text:p>
          </table:table-cell>
          <table:table-cell table:style-name="ce242" table:formula="of:=[.T40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41]=0;0;[.R41]*[.U41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2" office:value-type="float" office:value="100000" calcext:value-type="float">
            <text:p>100000</text:p>
          </table:table-cell>
          <table:table-cell table:style-name="ce820" table:formula="of:=[.V41]^2/[.$V$46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762" table:formula="of:=[Planilha.$D$74]/SQRT(4)" office:value-type="float" office:value="0" calcext:value-type="float">
            <text:p>0,00000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42]/[.D42]" office:value-type="float" office:value="0" calcext:value-type="float">
            <text:p>0,00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42]=0;0;[.E42]*[.H42])" office:value-type="float" office:value="0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42]^2/[.$I$14]^2" office:value-type="percentage" office:value="0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264" table:formula="of:=[Planilha.$D$81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42]/[.Q42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42]=0;0;[.R42]*[.U42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42]^2/[.$I$14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/>
          <table:table-cell table:style-name="ce277"/>
          <table:table-cell table:style-name="ce761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3"/>
          <table:table-cell/>
          <table:table-cell table:style-name="ce608" table:content-validation-name="val17"/>
          <table:table-cell table:style-name="ce277"/>
          <table:table-cell table:style-name="ce256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2"/>
          <table:table-cell table:style-name="ce240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768" table:content-validation-name="val17"/>
          <table:table-cell table:style-name="ce281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8" table:content-validation-name="val17"/>
          <table:table-cell table:style-name="ce281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769" table:content-validation-name="val17"/>
          <table:table-cell table:style-name="ce282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9" table:content-validation-name="val17"/>
          <table:table-cell table:style-name="ce282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764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I37:.I44]))" office:value-type="float" office:value="0.032691742144399" calcext:value-type="float">
            <text:p>0,0326917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I46]^4)/((([.I37]^4)/[.K37])+([.I38]^4/[.K38]+(([.I39]^4)/[.K39])+(([.I40]^4)/[.K40])+(([.I41]^4)/[.K41])+([.I42]^4)/[.K42])))" office:value-type="float" office:value="84896.1476689229" calcext:value-type="float">
            <text:p>84896,1</text:p>
          </table:table-cell>
          <table:table-cell table:style-name="ce822" table:formula="of:=SUM([.L37:.L45])" office:value-type="percentage" office:value="1" calcext:value-type="percentage">
            <text:p>100,00%</text:p>
          </table:table-cell>
          <table:table-cell/>
          <table:table-cell table:style-name="ce347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283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V37:.V44]))" office:value-type="string" office:string-value="" calcext:value-type="error">
            <text:p>#VALOR!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V46]^4)/((([.V37]^4)/[.X37])+([.V38]^4/[.X38]+(([.V39]^4)/[.X39])+(([.V40]^4)/[.X40])+(([.V41]^4)/[.X41])+([.V42]^4)/[.X42])))" office:value-type="string" office:string-value="" calcext:value-type="error">
            <text:p>#VALOR!</text:p>
          </table:table-cell>
          <table:table-cell table:style-name="ce822" table:formula="of:=SUM([.Y37:.Y45])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765" table:formula="of:=TRUNC([.I47];[.C46])" office:value-type="float" office:value="0.06" calcext:value-type="float">
            <text:p>0,060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I46]*[.I48]" office:value-type="float" office:value="0.0653845269009026" calcext:value-type="float">
            <text:p>0,0653845</text:p>
          </table:table-cell>
          <table:table-cell table:style-name="ce282" table:number-columns-repeated="3"/>
          <table:table-cell/>
          <table:table-cell table:style-name="ce347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267" table:formula="of:=TRUNC([.V47];[.P46])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V46]*[.V48]" office:value-type="string" office:string-value="" calcext:value-type="error">
            <text:p>#VALOR!</text:p>
          </table:table-cell>
          <table:table-cell table:style-name="ce282" table:number-columns-repeated="3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Diferença</text:p>
          </table:table-cell>
          <table:covered-table-cell/>
          <table:table-cell table:style-name="ce763" table:formula="of:=[.I47]-[.C47]" office:value-type="float" office:value="0.00538452690090256" calcext:value-type="float">
            <text:p>0,00538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K46]&gt;100000;2;TINV(0.0455;[.K46]))" office:value-type="float" office:value="2.00003189221608" calcext:value-type="float">
            <text:p>2,00</text:p>
          </table:table-cell>
          <table:table-cell table:style-name="ce286" table:number-columns-repeated="3"/>
          <table:table-cell/>
          <table:table-cell table:style-name="ce347" office:value-type="string" calcext:value-type="string" table:number-columns-spanned="2" table:number-rows-spanned="1">
            <text:p>Diferença</text:p>
          </table:table-cell>
          <table:covered-table-cell/>
          <table:table-cell table:style-name="ce269" table:formula="of:=[.V47]-[.P47]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X46]&gt;100000;2;TINV(0.0455;[.X46]))" office:value-type="string" office:string-value="" calcext:value-type="error">
            <text:p>#VALOR!</text:p>
          </table:table-cell>
          <table:table-cell table:style-name="ce286" table:number-columns-repeated="3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Percentual</text:p>
          </table:table-cell>
          <table:covered-table-cell/>
          <table:table-cell table:style-name="ce763" table:formula="of:=([.C48]/[.I47])*100" office:value-type="float" office:value="8.23516993410904" calcext:value-type="float">
            <text:p>8,23517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C49]&lt;=5;ROUND([.I47];[.C46]);ROUNDUP([.I47];[.C46]))" office:value-type="float" office:value="0.07" calcext:value-type="float">
            <text:p>0,070</text:p>
          </table:table-cell>
          <table:table-cell table:style-name="ce288" table:formula="of:=[.J37]" office:value-type="string" office:string-value="kgf/cm2" calcext:value-type="string">
            <text:p>kgf/cm2</text:p>
          </table:table-cell>
          <table:table-cell table:style-name="ce282" table:number-columns-repeated="2"/>
          <table:table-cell/>
          <table:table-cell table:style-name="ce347" office:value-type="string" calcext:value-type="string" table:number-columns-spanned="2" table:number-rows-spanned="1">
            <text:p>Percentual</text:p>
          </table:table-cell>
          <table:covered-table-cell/>
          <table:table-cell table:style-name="ce269" table:formula="of:=([.P48]/[.V47])*100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P49]&lt;=5;ROUND([.V47];[.P46]);ROUNDUP([.V47];[.P46]))" office:value-type="string" office:string-value="" calcext:value-type="error">
            <text:p>#VALOR!</text:p>
          </table:table-cell>
          <table:table-cell table:style-name="ce288" table:formula="of:=[.W37]" office:value-type="string" office:string-value="kgf/cm2" calcext:value-type="string">
            <text:p>kgf/cm2</text:p>
          </table:table-cell>
          <table:table-cell table:style-name="ce282" table:number-columns-repeated="2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107" table:number-columns-spanned="12" table:number-rows-spanned="1"/>
          <table:covered-table-cell table:number-columns-repeated="11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49" table:formula="of:=CONCATENATE(&quot;INCERTEZA DE MEDIÇÃO - MANÔMETRO – Calibração – Ponto 4:&quot;;&quot;   &quot;;[$Planilha.$S51];&quot;  &quot;;[$Planilha.$K$25])" office:value-type="string" office:string-value="INCERTEZA DE MEDIÇÃO - MANÔMETRO – Calibração – Ponto 4:     kgf/cm2" calcext:value-type="string" table:number-columns-spanned="12" table:number-rows-spanned="1">
            <text:p>INCERTEZA DE MEDIÇÃO - MANÔMETRO – Calibração – Ponto 4: <text:s text:c="4"/>kgf/cm2</text:p>
          </table:table-cell>
          <table:covered-table-cell table:number-columns-repeated="11"/>
          <table:table-cell/>
          <table:table-cell table:style-name="ce350" table:formula="of:=CONCATENATE(&quot;INCERTEZA DE MEDIÇÃO - MANÔMETRO – Calibração – Ponto 11:&quot;;&quot;   &quot;;[$Planilha.$S58];&quot;  &quot;;[$Planilha.$K$25])" office:value-type="string" office:string-value="INCERTEZA DE MEDIÇÃO - MANÔMETRO – Calibração – Ponto 11:     kgf/cm2" calcext:value-type="string" table:number-columns-spanned="12" table:number-rows-spanned="1">
            <text:p>INCERTEZA DE MEDIÇÃO - MANÔMETRO – Calibração – Ponto 11: <text:s text:c="4"/>kgf/cm2</text:p>
          </table:table-cell>
          <table:covered-table-cell table:number-columns-repeated="11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289" office:value-type="string" calcext:value-type="string">
            <text:p>Tipo</text:p>
          </table:table-cell>
          <table:table-cell table:style-name="ce290" office:value-type="string" calcext:value-type="string">
            <text:p>Componente da incerteza</text:p>
          </table:table-cell>
          <table:table-cell table:style-name="ce766" office:value-type="string" calcext:value-type="string">
            <text:p>Valor</text:p>
          </table:table-cell>
          <table:table-cell table:style-name="ce289" office:value-type="string" calcext:value-type="string">
            <text:p>Divisor</text:p>
          </table:table-cell>
          <table:table-cell table:style-name="ce289" office:value-type="string" calcext:value-type="string">
            <text:p>µ(xi)</text:p>
          </table:table-cell>
          <table:table-cell table:style-name="ce289" office:value-type="string" calcext:value-type="string">
            <text:p>Distribuição</text:p>
          </table:table-cell>
          <table:table-cell table:style-name="ce289" office:value-type="string" calcext:value-type="string">
            <text:p>unid. ent.</text:p>
          </table:table-cell>
          <table:table-cell table:style-name="ce289" office:value-type="string" calcext:value-type="string">
            <text:p>Ci</text:p>
          </table:table-cell>
          <table:table-cell table:style-name="ce291" office:value-type="string" calcext:value-type="string">
            <text:p>µi(y)</text:p>
          </table:table-cell>
          <table:table-cell table:style-name="ce289" office:value-type="string" calcext:value-type="string">
            <text:p>unid. Saida</text:p>
          </table:table-cell>
          <table:table-cell table:style-name="ce289" office:value-type="string" calcext:value-type="string">
            <text:p>vi/veff</text:p>
          </table:table-cell>
          <table:table-cell table:style-name="ce289" office:value-type="string" calcext:value-type="string">
            <text:p>%</text:p>
          </table:table-cell>
          <table:table-cell/>
          <table:table-cell table:style-name="ce289" office:value-type="string" calcext:value-type="string">
            <text:p>Tipo</text:p>
          </table:table-cell>
          <table:table-cell table:style-name="ce290" office:value-type="string" calcext:value-type="string">
            <text:p>Componente da incerteza</text:p>
          </table:table-cell>
          <table:table-cell table:style-name="ce289" office:value-type="string" calcext:value-type="string">
            <text:p>Valor</text:p>
          </table:table-cell>
          <table:table-cell table:style-name="ce289" office:value-type="string" calcext:value-type="string">
            <text:p>Divisor</text:p>
          </table:table-cell>
          <table:table-cell table:style-name="ce289" office:value-type="string" calcext:value-type="string">
            <text:p>µ(xi)</text:p>
          </table:table-cell>
          <table:table-cell table:style-name="ce289" office:value-type="string" calcext:value-type="string">
            <text:p>Distribuição</text:p>
          </table:table-cell>
          <table:table-cell table:style-name="ce289" office:value-type="string" calcext:value-type="string">
            <text:p>unid. ent.</text:p>
          </table:table-cell>
          <table:table-cell table:style-name="ce289" office:value-type="string" calcext:value-type="string">
            <text:p>Ci</text:p>
          </table:table-cell>
          <table:table-cell table:style-name="ce291" office:value-type="string" calcext:value-type="string">
            <text:p>µi(y)</text:p>
          </table:table-cell>
          <table:table-cell table:style-name="ce289" office:value-type="string" calcext:value-type="string">
            <text:p>unid. Saida</text:p>
          </table:table-cell>
          <table:table-cell table:style-name="ce289" office:value-type="string" calcext:value-type="string">
            <text:p>vi/veff</text:p>
          </table:table-cell>
          <table:table-cell table:style-name="ce289" office:value-type="string" calcext:value-type="string">
            <text:p>%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761" table:formula="of:=[Planilha.$I$25]" office:value-type="float" office:value="0.1" calcext:value-type="float">
            <text:p>0,10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53]/[.D53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53]=0;0;[.E53]*[.H53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53]^2/[.$I$62]^2" office:value-type="percentage" office:value="0.670016748833002" calcext:value-type="percentage">
            <text:p>67,00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258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53]/[.Q53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53]=0;0;[.R53]*[.U53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53]^2/[.$V$62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761" table:formula="of:=[Planilha.$G$75]/SQRT(4)" office:value-type="float" office:value="0.00144337567297403" calcext:value-type="float">
            <text:p>0,00144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54]/[.D54]" office:value-type="float" office:value="0.00144337567297403" calcext:value-type="float">
            <text:p>0,001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54]=0;0;[.E54]*[.H54])" office:value-type="float" office:value="0.00144337567297403" calcext:value-type="float">
            <text:p>0,001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54]^2/[.$I$62]^2" office:value-type="percentage" office:value="0.00167504187208242" calcext:value-type="percentage">
            <text:p>0,17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256" table:formula="of:=[Planilha.$G$82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54]/[.Q54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54]=0;0;[.R54]*[.U54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54]^2/[.$V$62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761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55]/[.D55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55]=0;0;[.E55]*[.H55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55]^2/[.$I$62]^2" office:value-type="percentage" office:value="0.00670016748833002" calcext:value-type="percentage">
            <text:p>0,67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256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55]/[.Q55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55]=0;0;[.R55]*[.U55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55]^2/[.$V$62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761" table:formula="of:=[Incerteza.$K$119]*[$Planilha.$B$75]" office:value-type="float" office:value="0.04" calcext:value-type="float">
            <text:p>0,04000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C56]/[.D56]" office:value-type="float" office:value="0.02" calcext:value-type="float">
            <text:p>0,02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56]=0;0;[.E56]*[.H56])" office:value-type="float" office:value="0.02" calcext:value-type="float">
            <text:p>0,02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I56]^2/[.$I$62]^2" office:value-type="percentage" office:value="0.321608039439841" calcext:value-type="percentage">
            <text:p>32,16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256" table:formula="of:=[Incerteza.$K$119]*[$Planilha.$B$82]" office:value-type="string" office:string-value="" calcext:value-type="error">
            <text:p>#VALOR!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P56]/[.Q56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56]=0;0;[.R56]*[.U56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V56]^2/[.$V$62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office:value-type="string" calcext:value-type="string">
            <text:p>Incerteza da curva de calibração</text:p>
          </table:table-cell>
          <table:table-cell table:style-name="ce761" table:formula="of:=[.$R$119]^2+[.$S$119]^2*([$Planilha.$E$75])^2+2*([$Planilha.$E$75])*[.$R$119]*[.$S$119]*[.$T$119]" office:value-type="float" office:value="0.0000017157035975665" calcext:value-type="float">
            <text:p>0,00000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C57]/[.D57]" office:value-type="float" office:value="0.0000017157035975665" calcext:value-type="float">
            <text:p>0,000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G56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57]=0;0;[.E57]*[.H57])" office:value-type="float" office:value="0.0000017157035975665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I57]^2/[.$I$62]^2" office:value-type="percentage" office:value="0.00000000236674478611923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office:value-type="string" calcext:value-type="string">
            <text:p>Incerteza da curva de calibração</text:p>
          </table:table-cell>
          <table:table-cell table:style-name="ce256" table:formula="of:=[.$R$119]^2+[.$S$119]^2*([$Planilha.$E$83])^2+2*([$Planilha.$E$83])*[.$R$119]*[.$S$119]*[.$T$119]" office:value-type="string" office:string-value="" calcext:value-type="error">
            <text:p>#VALOR!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P57]/[.Q57]" office:value-type="string" office:string-value="" calcext:value-type="error">
            <text:p>#VALOR!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T56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57]=0;0;[.R57]*[.U57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2" office:value-type="float" office:value="100000" calcext:value-type="float">
            <text:p>100000</text:p>
          </table:table-cell>
          <table:table-cell table:style-name="ce820" table:formula="of:=[.V57]^2/[.$V$62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762" table:formula="of:=[Planilha.$D$75]/SQRT(4)" office:value-type="float" office:value="0" calcext:value-type="float">
            <text:p>0,00000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58]/[.D58]" office:value-type="float" office:value="0" calcext:value-type="float">
            <text:p>0,00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58]=0;0;[.E58]*[.H58])" office:value-type="float" office:value="0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58]^2/[.$I$14]^2" office:value-type="percentage" office:value="0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264" table:formula="of:=[Planilha.$D$82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58]/[.Q58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58]=0;0;[.R58]*[.U58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58]^2/[.$I$14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/>
          <table:table-cell table:style-name="ce277"/>
          <table:table-cell table:style-name="ce761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3"/>
          <table:table-cell/>
          <table:table-cell table:style-name="ce608" table:content-validation-name="val17"/>
          <table:table-cell table:style-name="ce277"/>
          <table:table-cell table:style-name="ce256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2"/>
          <table:table-cell table:style-name="ce240"/>
          <table:table-cell table:number-columns-repeated="4"/>
          <table:table-cell table:style-name="ce301"/>
          <table:table-cell table:style-name="ce302" table:number-columns-repeated="4"/>
          <table:table-cell table:style-name="ce307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768" table:content-validation-name="val17"/>
          <table:table-cell table:style-name="ce281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8" table:content-validation-name="val17"/>
          <table:table-cell table:style-name="ce281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769" table:content-validation-name="val17"/>
          <table:table-cell table:style-name="ce282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9" table:content-validation-name="val17"/>
          <table:table-cell table:style-name="ce282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764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I53:.I60]))" office:value-type="float" office:value="0.0352668399908985" calcext:value-type="float">
            <text:p>0,0352668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I62]^4)/((([.I53]^4)/[.K53])+([.I54]^4/[.K54]+(([.I55]^4)/[.K55])+(([.I56]^4)/[.K56])+(([.I57]^4)/[.K57])+([.I58]^4)/[.K58])))" office:value-type="float" office:value="63419.1755158569" calcext:value-type="float">
            <text:p>63419,2</text:p>
          </table:table-cell>
          <table:table-cell table:style-name="ce822" table:formula="of:=SUM([.L53:.L61])" office:value-type="percentage" office:value="1" calcext:value-type="percentage">
            <text:p>100,00%</text:p>
          </table:table-cell>
          <table:table-cell/>
          <table:table-cell table:style-name="ce352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283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V53:.V60]))" office:value-type="string" office:string-value="" calcext:value-type="error">
            <text:p>#VALOR!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V62]^4)/((([.V53]^4)/[.X53])+([.V54]^4/[.X54]+(([.V55]^4)/[.X55])+(([.V56]^4)/[.X56])+(([.V57]^4)/[.X57])+([.V58]^4)/[.X58])))" office:value-type="string" office:string-value="" calcext:value-type="error">
            <text:p>#VALOR!</text:p>
          </table:table-cell>
          <table:table-cell table:style-name="ce822" table:formula="of:=SUM([.Y53:.Y61])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765" table:formula="of:=TRUNC([.I63];[.C62])" office:value-type="float" office:value="0.07" calcext:value-type="float">
            <text:p>0,070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I62]*[.I64]" office:value-type="float" office:value="0.0705351564332792" calcext:value-type="float">
            <text:p>0,0705352</text:p>
          </table:table-cell>
          <table:table-cell table:style-name="ce282" table:number-columns-repeated="3"/>
          <table:table-cell/>
          <table:table-cell table:style-name="ce352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267" table:formula="of:=TRUNC([.V63];[.P62])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V62]*[.V64]" office:value-type="string" office:string-value="" calcext:value-type="error">
            <text:p>#VALOR!</text:p>
          </table:table-cell>
          <table:table-cell table:style-name="ce282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Diferença</text:p>
          </table:table-cell>
          <table:covered-table-cell/>
          <table:table-cell table:style-name="ce763" table:formula="of:=[.I63]-[.C63]" office:value-type="float" office:value="0.000535156433279158" calcext:value-type="float">
            <text:p>0,00054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K62]&gt;100000;2;TINV(0.0455;[.K62]))" office:value-type="float" office:value="2.00004186514818" calcext:value-type="float">
            <text:p>2,00</text:p>
          </table:table-cell>
          <table:table-cell table:style-name="ce286" table:number-columns-repeated="3"/>
          <table:table-cell/>
          <table:table-cell table:style-name="ce352" office:value-type="string" calcext:value-type="string" table:number-columns-spanned="2" table:number-rows-spanned="1">
            <text:p>Diferença</text:p>
          </table:table-cell>
          <table:covered-table-cell/>
          <table:table-cell table:style-name="ce269" table:formula="of:=[.V63]-[.P63]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X62]&gt;100000;2;TINV(0.0455;[.X62]))" office:value-type="string" office:string-value="" calcext:value-type="error">
            <text:p>#VALOR!</text:p>
          </table:table-cell>
          <table:table-cell table:style-name="ce286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Percentual</text:p>
          </table:table-cell>
          <table:covered-table-cell/>
          <table:table-cell table:style-name="ce763" table:formula="of:=([.C64]/[.I63])*100" office:value-type="float" office:value="0.75870879195593" calcext:value-type="float">
            <text:p>0,75871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C65]&lt;=5;ROUND([.I63];[.C62]);ROUNDUP([.I63];[.C62]))" office:value-type="float" office:value="0.07" calcext:value-type="float">
            <text:p>0,070</text:p>
          </table:table-cell>
          <table:table-cell table:style-name="ce288" table:formula="of:=[.J53]" office:value-type="string" office:string-value="kgf/cm2" calcext:value-type="string">
            <text:p>kgf/cm2</text:p>
          </table:table-cell>
          <table:table-cell table:style-name="ce282" table:number-columns-repeated="2"/>
          <table:table-cell/>
          <table:table-cell table:style-name="ce352" office:value-type="string" calcext:value-type="string" table:number-columns-spanned="2" table:number-rows-spanned="1">
            <text:p>Percentual</text:p>
          </table:table-cell>
          <table:covered-table-cell/>
          <table:table-cell table:style-name="ce269" table:formula="of:=([.P64]/[.V63])*100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P65]&lt;=5;ROUND([.V63];[.P62]);ROUNDUP([.V63];[.P62]))" office:value-type="string" office:string-value="" calcext:value-type="error">
            <text:p>#VALOR!</text:p>
          </table:table-cell>
          <table:table-cell table:style-name="ce288" table:formula="of:=[.W53]" office:value-type="string" office:string-value="kgf/cm2" calcext:value-type="string">
            <text:p>kgf/cm2</text:p>
          </table:table-cell>
          <table:table-cell table:style-name="ce282" table:number-columns-repeated="2"/>
          <table:table-cell table:number-columns-repeated="13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107" table:number-columns-spanned="12" table:number-rows-spanned="1"/>
          <table:covered-table-cell table:number-columns-repeated="11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43" table:formula="of:=CONCATENATE(&quot;INCERTEZA DE MEDIÇÃO - MANÔMETRO – Calibração – Ponto 5:&quot;;&quot;   &quot;;[$Planilha.$S52];&quot;  &quot;;[$Planilha.$K$25])" office:value-type="string" office:string-value="INCERTEZA DE MEDIÇÃO - MANÔMETRO – Calibração – Ponto 5:     kgf/cm2" calcext:value-type="string" table:number-columns-spanned="12" table:number-rows-spanned="1">
            <text:p>INCERTEZA DE MEDIÇÃO - MANÔMETRO – Calibração – Ponto 5: <text:s text:c="4"/>kgf/cm2</text:p>
          </table:table-cell>
          <table:covered-table-cell table:number-columns-repeated="11"/>
          <table:table-cell/>
          <table:table-cell table:style-name="ce344" table:formula="of:=CONCATENATE(&quot;INCERTEZA DE MEDIÇÃO - MANÔMETRO – Calibração – Ponto 12:&quot;;&quot;   &quot;;[$Planilha.$S59];&quot;  &quot;;[$Planilha.$K$25])" office:value-type="string" office:string-value="INCERTEZA DE MEDIÇÃO - MANÔMETRO – Calibração – Ponto 12:     kgf/cm2" calcext:value-type="string" table:number-columns-spanned="12" table:number-rows-spanned="1">
            <text:p>INCERTEZA DE MEDIÇÃO - MANÔMETRO – Calibração – Ponto 12: <text:s text:c="4"/>kgf/cm2</text:p>
          </table:table-cell>
          <table:covered-table-cell table:number-columns-repeated="11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246" office:value-type="string" calcext:value-type="string">
            <text:p>Tipo</text:p>
          </table:table-cell>
          <table:table-cell table:style-name="ce247" office:value-type="string" calcext:value-type="string">
            <text:p>Componente da incerteza</text:p>
          </table:table-cell>
          <table:table-cell table:style-name="ce760" office:value-type="string" calcext:value-type="string">
            <text:p>Valor</text:p>
          </table:table-cell>
          <table:table-cell table:style-name="ce246" office:value-type="string" calcext:value-type="string">
            <text:p>Divisor</text:p>
          </table:table-cell>
          <table:table-cell table:style-name="ce246" office:value-type="string" calcext:value-type="string">
            <text:p>µ(xi)</text:p>
          </table:table-cell>
          <table:table-cell table:style-name="ce246" office:value-type="string" calcext:value-type="string">
            <text:p>Distribuição</text:p>
          </table:table-cell>
          <table:table-cell table:style-name="ce246" office:value-type="string" calcext:value-type="string">
            <text:p>unid. ent.</text:p>
          </table:table-cell>
          <table:table-cell table:style-name="ce246" office:value-type="string" calcext:value-type="string">
            <text:p>Ci</text:p>
          </table:table-cell>
          <table:table-cell table:style-name="ce248" office:value-type="string" calcext:value-type="string">
            <text:p>µi(y)</text:p>
          </table:table-cell>
          <table:table-cell table:style-name="ce246" office:value-type="string" calcext:value-type="string">
            <text:p>unid. Saida</text:p>
          </table:table-cell>
          <table:table-cell table:style-name="ce246" office:value-type="string" calcext:value-type="string">
            <text:p>vi/veff</text:p>
          </table:table-cell>
          <table:table-cell table:style-name="ce246" office:value-type="string" calcext:value-type="string">
            <text:p>%</text:p>
          </table:table-cell>
          <table:table-cell/>
          <table:table-cell table:style-name="ce246" office:value-type="string" calcext:value-type="string">
            <text:p>Tipo</text:p>
          </table:table-cell>
          <table:table-cell table:style-name="ce247" office:value-type="string" calcext:value-type="string">
            <text:p>Componente da incerteza</text:p>
          </table:table-cell>
          <table:table-cell table:style-name="ce246" office:value-type="string" calcext:value-type="string">
            <text:p>Valor</text:p>
          </table:table-cell>
          <table:table-cell table:style-name="ce246" office:value-type="string" calcext:value-type="string">
            <text:p>Divisor</text:p>
          </table:table-cell>
          <table:table-cell table:style-name="ce246" office:value-type="string" calcext:value-type="string">
            <text:p>µ(xi)</text:p>
          </table:table-cell>
          <table:table-cell table:style-name="ce246" office:value-type="string" calcext:value-type="string">
            <text:p>Distribuição</text:p>
          </table:table-cell>
          <table:table-cell table:style-name="ce246" office:value-type="string" calcext:value-type="string">
            <text:p>unid. ent.</text:p>
          </table:table-cell>
          <table:table-cell table:style-name="ce246" office:value-type="string" calcext:value-type="string">
            <text:p>Ci</text:p>
          </table:table-cell>
          <table:table-cell table:style-name="ce248" office:value-type="string" calcext:value-type="string">
            <text:p>µi(y)</text:p>
          </table:table-cell>
          <table:table-cell table:style-name="ce246" office:value-type="string" calcext:value-type="string">
            <text:p>unid. Saida</text:p>
          </table:table-cell>
          <table:table-cell table:style-name="ce246" office:value-type="string" calcext:value-type="string">
            <text:p>vi/veff</text:p>
          </table:table-cell>
          <table:table-cell table:style-name="ce246" office:value-type="string" calcext:value-type="string">
            <text:p>%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767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69]/[.D69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69]=0;0;[.E69]*[.H69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69]^2/[.$I$78]^2" office:value-type="percentage" office:value="0.567375885746261" calcext:value-type="percentage">
            <text:p>56,74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258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69]/[.Q69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69]=0;0;[.R69]*[.U69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69]^2/[.$V$78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761" table:formula="of:=[Planilha.$G$76]/SQRT(4)" office:value-type="float" office:value="0.00144337567297403" calcext:value-type="float">
            <text:p>0,00144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70]/[.D70]" office:value-type="float" office:value="0.00144337567297403" calcext:value-type="float">
            <text:p>0,001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70]=0;0;[.E70]*[.H70])" office:value-type="float" office:value="0.00144337567297403" calcext:value-type="float">
            <text:p>0,001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70]^2/[.$I$78]^2" office:value-type="percentage" office:value="0.00141843971436558" calcext:value-type="percentage">
            <text:p>0,14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256" table:formula="of:=[Planilha.$G$83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70]/[.Q70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70]=0;0;[.R70]*[.U70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70]^2/[.$V$78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761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71]/[.D71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71]=0;0;[.E71]*[.H71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71]^2/[.$I$78]^2" office:value-type="percentage" office:value="0.0056737588574626" calcext:value-type="percentage">
            <text:p>0,57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256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71]/[.Q71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71]=0;0;[.R71]*[.U71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71]^2/[.$V$78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761" table:formula="of:=[Incerteza.$K$119]*[$Planilha.$B$76]" office:value-type="float" office:value="0.05" calcext:value-type="float">
            <text:p>0,05000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C72]/[.D72]" office:value-type="float" office:value="0.025" calcext:value-type="float">
            <text:p>0,025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72]=0;0;[.E72]*[.H72])" office:value-type="float" office:value="0.025" calcext:value-type="float">
            <text:p>0,025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I72]^2/[.$I$78]^2" office:value-type="percentage" office:value="0.425531914309695" calcext:value-type="percentage">
            <text:p>42,55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256" table:formula="of:=[Incerteza.$K$119]*[$Planilha.$B$83]" office:value-type="string" office:string-value="" calcext:value-type="error">
            <text:p>#VALOR!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P72]/[.Q72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72]=0;0;[.R72]*[.U72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V72]^2/[.$V$78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office:value-type="string" calcext:value-type="string">
            <text:p>Incerteza da curva de calibração</text:p>
          </table:table-cell>
          <table:table-cell table:style-name="ce761" table:formula="of:=[.$R$119]^2+[.$S$119]^2*([$Planilha.$E$76])^2+2*([$Planilha.$E$76])*[.$R$119]*[.$S$119]*[.$T$119]" office:value-type="float" office:value="0.00000141966277520145" calcext:value-type="float">
            <text:p>0,00000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C73]/[.D73]" office:value-type="float" office:value="0.00000141966277520145" calcext:value-type="float">
            <text:p>0,000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G72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73]=0;0;[.E73]*[.H73])" office:value-type="float" office:value="0.00000141966277520145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I73]^2/[.$I$78]^2" office:value-type="percentage" office:value="0.0000000013722160970397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office:value-type="string" calcext:value-type="string">
            <text:p>Incerteza da curva de calibração</text:p>
          </table:table-cell>
          <table:table-cell table:style-name="ce256" table:formula="of:=[.$R$119]^2+[.$S$119]^2*([$Planilha.$E$84])^2+2*([$Planilha.$E$84])*[.$R$119]*[.$S$119]*[.$T$119]" office:value-type="string" office:string-value="" calcext:value-type="error">
            <text:p>#VALOR!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P73]/[.Q73]" office:value-type="string" office:string-value="" calcext:value-type="error">
            <text:p>#VALOR!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T72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73]=0;0;[.R73]*[.U73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V73]^2/[.$V$78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762" table:formula="of:=[Planilha.$D$76]/SQRT(4)" office:value-type="float" office:value="0" calcext:value-type="float">
            <text:p>0,00000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74]/[.D74]" office:value-type="float" office:value="0" calcext:value-type="float">
            <text:p>0,00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74]=0;0;[.E74]*[.H74])" office:value-type="float" office:value="0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74]^2/[.$I$14]^2" office:value-type="percentage" office:value="0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264" table:formula="of:=[Planilha.$D$83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74]/[.Q74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74]=0;0;[.R74]*[.U74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74]^2/[.$I$14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/>
          <table:table-cell table:style-name="ce277"/>
          <table:table-cell table:style-name="ce761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3"/>
          <table:table-cell/>
          <table:table-cell table:style-name="ce608" table:content-validation-name="val17"/>
          <table:table-cell table:style-name="ce277"/>
          <table:table-cell table:style-name="ce256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2"/>
          <table:table-cell table:style-name="ce240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768" table:content-validation-name="val17"/>
          <table:table-cell table:style-name="ce281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8" table:content-validation-name="val17"/>
          <table:table-cell table:style-name="ce281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769" table:content-validation-name="val17"/>
          <table:table-cell table:style-name="ce282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9" table:content-validation-name="val17"/>
          <table:table-cell table:style-name="ce282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764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I69:.I76]))" office:value-type="float" office:value="0.0383242743181843" calcext:value-type="float">
            <text:p>0,0383243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I78]^4)/((([.I69]^4)/[.K69])+([.I70]^4/[.K70]+(([.I71]^4)/[.K71])+(([.I72]^4)/[.K72])+(([.I73]^4)/[.K73])+([.I74]^4)/[.K74])))" office:value-type="float" office:value="45458.9385305386" calcext:value-type="float">
            <text:p>45458,9</text:p>
          </table:table-cell>
          <table:table-cell table:style-name="ce822" table:formula="of:=SUM([.L69:.L77])" office:value-type="percentage" office:value="1" calcext:value-type="percentage">
            <text:p>100,00%</text:p>
          </table:table-cell>
          <table:table-cell/>
          <table:table-cell table:style-name="ce347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283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V69:.V76]))" office:value-type="string" office:string-value="" calcext:value-type="error">
            <text:p>#VALOR!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V78]^4)/((([.V69]^4)/[.X69])+([.V70]^4/[.X70]+(([.V71]^4)/[.X71])+(([.V72]^4)/[.X72])+(([.V73]^4)/[.X73])+([.V74]^4)/[.X74])))" office:value-type="string" office:string-value="" calcext:value-type="error">
            <text:p>#VALOR!</text:p>
          </table:table-cell>
          <table:table-cell table:style-name="ce822" table:formula="of:=SUM([.Y69:.Y77])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765" table:formula="of:=TRUNC([.I79];[.C78])" office:value-type="float" office:value="0.07" calcext:value-type="float">
            <text:p>0,070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I78]*[.I80]" office:value-type="float" office:value="0.0766507500354619" calcext:value-type="float">
            <text:p>0,0766508</text:p>
          </table:table-cell>
          <table:table-cell table:style-name="ce282" table:number-columns-repeated="3"/>
          <table:table-cell/>
          <table:table-cell table:style-name="ce347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267" table:formula="of:=TRUNC([.V79];[.P78])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V78]*[.V80]" office:value-type="string" office:string-value="" calcext:value-type="error">
            <text:p>#VALOR!</text:p>
          </table:table-cell>
          <table:table-cell table:style-name="ce282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Diferença</text:p>
          </table:table-cell>
          <table:covered-table-cell/>
          <table:table-cell table:style-name="ce763" table:formula="of:=[.I79]-[.C79]" office:value-type="float" office:value="0.00665075003546188" calcext:value-type="float">
            <text:p>0,00665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K78]&gt;100000;2;TINV(0.0455;[.K78]))" office:value-type="float" office:value="2.0000574413771" calcext:value-type="float">
            <text:p>2,00</text:p>
          </table:table-cell>
          <table:table-cell table:style-name="ce286" table:number-columns-repeated="3"/>
          <table:table-cell/>
          <table:table-cell table:style-name="ce347" office:value-type="string" calcext:value-type="string" table:number-columns-spanned="2" table:number-rows-spanned="1">
            <text:p>Diferença</text:p>
          </table:table-cell>
          <table:covered-table-cell/>
          <table:table-cell table:style-name="ce269" table:formula="of:=[.V79]-[.P79]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X78]&gt;100000;2;TINV(0.0455;[.X78]))" office:value-type="string" office:string-value="" calcext:value-type="error">
            <text:p>#VALOR!</text:p>
          </table:table-cell>
          <table:table-cell table:style-name="ce286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Percentual</text:p>
          </table:table-cell>
          <table:covered-table-cell/>
          <table:table-cell table:style-name="ce763" table:formula="of:=([.C80]/[.I79])*100" office:value-type="float" office:value="8.67669270344382" calcext:value-type="float">
            <text:p>8,67669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C81]&lt;=5;ROUND([.I79];[.C78]);ROUNDUP([.I79];[.C78]))" office:value-type="float" office:value="0.08" calcext:value-type="float">
            <text:p>0,080</text:p>
          </table:table-cell>
          <table:table-cell table:style-name="ce288" table:formula="of:=[.J69]" office:value-type="string" office:string-value="kgf/cm2" calcext:value-type="string">
            <text:p>kgf/cm2</text:p>
          </table:table-cell>
          <table:table-cell table:style-name="ce282" table:number-columns-repeated="2"/>
          <table:table-cell/>
          <table:table-cell table:style-name="ce347" office:value-type="string" calcext:value-type="string" table:number-columns-spanned="2" table:number-rows-spanned="1">
            <text:p>Percentual</text:p>
          </table:table-cell>
          <table:covered-table-cell/>
          <table:table-cell table:style-name="ce269" table:formula="of:=([.P80]/[.V79])*100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P81]&lt;=5;ROUND([.V79];[.P78]);ROUNDUP([.V79];[.P78]))" office:value-type="string" office:string-value="" calcext:value-type="error">
            <text:p>#VALOR!</text:p>
          </table:table-cell>
          <table:table-cell table:style-name="ce288" table:formula="of:=[.W69]" office:value-type="string" office:string-value="kgf/cm2" calcext:value-type="string">
            <text:p>kgf/cm2</text:p>
          </table:table-cell>
          <table:table-cell table:style-name="ce282" table:number-columns-repeated="2"/>
          <table:table-cell table:number-columns-repeated="13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107" table:number-columns-spanned="12" table:number-rows-spanned="1"/>
          <table:covered-table-cell table:number-columns-repeated="11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49" table:formula="of:=CONCATENATE(&quot;INCERTEZA DE MEDIÇÃO - MANÔMETRO – Calibração – Ponto 6:&quot;;&quot;   &quot;;[$Planilha.$S53];&quot;  &quot;;[$Planilha.$K$25])" office:value-type="string" office:string-value="INCERTEZA DE MEDIÇÃO - MANÔMETRO – Calibração – Ponto 6:     kgf/cm2" calcext:value-type="string" table:number-columns-spanned="12" table:number-rows-spanned="1">
            <text:p>INCERTEZA DE MEDIÇÃO - MANÔMETRO – Calibração – Ponto 6: <text:s text:c="4"/>kgf/cm2</text:p>
          </table:table-cell>
          <table:covered-table-cell table:number-columns-repeated="11"/>
          <table:table-cell/>
          <table:table-cell table:style-name="ce350" table:formula="of:=CONCATENATE(&quot;INCERTEZA DE MEDIÇÃO - MANÔMETRO – Calibração – Ponto 13:&quot;;&quot;   &quot;;[$Planilha.$S60];&quot;  &quot;;[$Planilha.$K$25])" office:value-type="string" office:string-value="INCERTEZA DE MEDIÇÃO - MANÔMETRO – Calibração – Ponto 13:     kgf/cm2" calcext:value-type="string" table:number-columns-spanned="12" table:number-rows-spanned="1">
            <text:p>INCERTEZA DE MEDIÇÃO - MANÔMETRO – Calibração – Ponto 13: <text:s text:c="4"/>kgf/cm2</text:p>
          </table:table-cell>
          <table:covered-table-cell table:number-columns-repeated="11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289" office:value-type="string" calcext:value-type="string">
            <text:p>Tipo</text:p>
          </table:table-cell>
          <table:table-cell table:style-name="ce290" office:value-type="string" calcext:value-type="string">
            <text:p>Componente da incerteza</text:p>
          </table:table-cell>
          <table:table-cell table:style-name="ce766" office:value-type="string" calcext:value-type="string">
            <text:p>Valor</text:p>
          </table:table-cell>
          <table:table-cell table:style-name="ce289" office:value-type="string" calcext:value-type="string">
            <text:p>Divisor</text:p>
          </table:table-cell>
          <table:table-cell table:style-name="ce289" office:value-type="string" calcext:value-type="string">
            <text:p>µ(xi)</text:p>
          </table:table-cell>
          <table:table-cell table:style-name="ce289" office:value-type="string" calcext:value-type="string">
            <text:p>Distribuição</text:p>
          </table:table-cell>
          <table:table-cell table:style-name="ce289" office:value-type="string" calcext:value-type="string">
            <text:p>unid. ent.</text:p>
          </table:table-cell>
          <table:table-cell table:style-name="ce289" office:value-type="string" calcext:value-type="string">
            <text:p>Ci</text:p>
          </table:table-cell>
          <table:table-cell table:style-name="ce291" office:value-type="string" calcext:value-type="string">
            <text:p>µi(y)</text:p>
          </table:table-cell>
          <table:table-cell table:style-name="ce289" office:value-type="string" calcext:value-type="string">
            <text:p>unid. Saida</text:p>
          </table:table-cell>
          <table:table-cell table:style-name="ce289" office:value-type="string" calcext:value-type="string">
            <text:p>vi/veff</text:p>
          </table:table-cell>
          <table:table-cell table:style-name="ce289" office:value-type="string" calcext:value-type="string">
            <text:p>%</text:p>
          </table:table-cell>
          <table:table-cell/>
          <table:table-cell table:style-name="ce289" office:value-type="string" calcext:value-type="string">
            <text:p>Tipo</text:p>
          </table:table-cell>
          <table:table-cell table:style-name="ce290" office:value-type="string" calcext:value-type="string">
            <text:p>Componente da incerteza</text:p>
          </table:table-cell>
          <table:table-cell table:style-name="ce289" office:value-type="string" calcext:value-type="string">
            <text:p>Valor</text:p>
          </table:table-cell>
          <table:table-cell table:style-name="ce289" office:value-type="string" calcext:value-type="string">
            <text:p>Divisor</text:p>
          </table:table-cell>
          <table:table-cell table:style-name="ce289" office:value-type="string" calcext:value-type="string">
            <text:p>µ(xi)</text:p>
          </table:table-cell>
          <table:table-cell table:style-name="ce289" office:value-type="string" calcext:value-type="string">
            <text:p>Distribuição</text:p>
          </table:table-cell>
          <table:table-cell table:style-name="ce289" office:value-type="string" calcext:value-type="string">
            <text:p>unid. ent.</text:p>
          </table:table-cell>
          <table:table-cell table:style-name="ce289" office:value-type="string" calcext:value-type="string">
            <text:p>Ci</text:p>
          </table:table-cell>
          <table:table-cell table:style-name="ce291" office:value-type="string" calcext:value-type="string">
            <text:p>µi(y)</text:p>
          </table:table-cell>
          <table:table-cell table:style-name="ce289" office:value-type="string" calcext:value-type="string">
            <text:p>unid. Saida</text:p>
          </table:table-cell>
          <table:table-cell table:style-name="ce289" office:value-type="string" calcext:value-type="string">
            <text:p>vi/veff</text:p>
          </table:table-cell>
          <table:table-cell table:style-name="ce289" office:value-type="string" calcext:value-type="string">
            <text:p>%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767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85]/[.D85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85]=0;0;[.E85]*[.H85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85]^2/[.$I$94]^2" office:value-type="percentage" office:value="0.403225806205173" calcext:value-type="percentage">
            <text:p>40,32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258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85]/[.Q85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85]=0;0;[.R85]*[.U85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85]^2/[.$V$94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761" table:formula="of:=[Planilha.$G$77]/SQRT(4)" office:value-type="float" office:value="0" calcext:value-type="float">
            <text:p>0,00000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86]/[.D86]" office:value-type="float" office:value="0" calcext:value-type="float">
            <text:p>0,00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86]=0;0;[.E86]*[.H86])" office:value-type="float" office:value="0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86]^2/[.$I$94]^2" office:value-type="percentage" office:value="0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256" table:formula="of:=[Planilha.$G$84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86]/[.Q86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86]=0;0;[.R86]*[.U86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86]^2/[.$V$94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761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87]/[.D87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87]=0;0;[.E87]*[.H87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87]^2/[.$I$94]^2" office:value-type="percentage" office:value="0.00403225806205172" calcext:value-type="percentage">
            <text:p>0,40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256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87]/[.Q87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87]=0;0;[.R87]*[.U87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87]^2/[.$V$94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761" table:formula="of:=[Incerteza.$K$119]*[$Planilha.$B$77]" office:value-type="float" office:value="0.07" calcext:value-type="float">
            <text:p>0,07000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C88]/[.D88]" office:value-type="float" office:value="0.035" calcext:value-type="float">
            <text:p>0,035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88]=0;0;[.E88]*[.H88])" office:value-type="float" office:value="0.035" calcext:value-type="float">
            <text:p>0,035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I88]^2/[.$I$94]^2" office:value-type="percentage" office:value="0.592741935121603" calcext:value-type="percentage">
            <text:p>59,27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256" table:formula="of:=[Incerteza.$K$119]*[$Planilha.$B$84]" office:value-type="string" office:string-value="" calcext:value-type="error">
            <text:p>#VALOR!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P88]/[.Q88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88]=0;0;[.R88]*[.U88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V88]^2/[.$V$94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office:value-type="string" calcext:value-type="string">
            <text:p>Incerteza da curva de calibração</text:p>
          </table:table-cell>
          <table:table-cell table:style-name="ce761" table:formula="of:=[.$R$119]^2+[.$S$119]^2*([$Planilha.$E$77])^2+2*([$Planilha.$E$77])*[.$R$119]*[.$S$119]*[.$T$119]" office:value-type="float" office:value="0.00000112387277206403" calcext:value-type="float">
            <text:p>0,00000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C89]/[.D89]" office:value-type="float" office:value="0.00000112387277206403" calcext:value-type="float">
            <text:p>0,000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G88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89]=0;0;[.E89]*[.H89])" office:value-type="float" office:value="0.00000112387277206403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I89]^2/[.$I$94]^2" office:value-type="percentage" office:value="0.000000000611172584039478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office:value-type="string" calcext:value-type="string">
            <text:p>Incerteza da curva de calibração</text:p>
          </table:table-cell>
          <table:table-cell table:style-name="ce256" table:formula="of:=[.$R$119]^2+[.$S$119]^2*([$Planilha.$C$61])^2+2*([$Planilha.$C$61])*[.$R$119]*[.$S$119]*[.$T$119]" office:value-type="float" office:value="0.00000389202249770415" calcext:value-type="float">
            <text:p>0,00000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P89]/[.Q89]" office:value-type="float" office:value="0.00000389202249770415" calcext:value-type="float">
            <text:p>0,000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T88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89]=0;0;[.R89]*[.U89])" office:value-type="float" office:value="0.00000389202249770415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V89]^2/[.$V$94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762" table:formula="of:=[Planilha.$D$77]/SQRT(4)" office:value-type="float" office:value="0" calcext:value-type="float">
            <text:p>0,00000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90]/[.D90]" office:value-type="float" office:value="0" calcext:value-type="float">
            <text:p>0,00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90]=0;0;[.E90]*[.H90])" office:value-type="float" office:value="0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90]^2/[.$I$14]^2" office:value-type="percentage" office:value="0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264" table:formula="of:=[Planilha.$D$84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90]/[.Q90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90]=0;0;[.R90]*[.U90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90]^2/[.$I$14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/>
          <table:table-cell table:style-name="ce277"/>
          <table:table-cell table:style-name="ce761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3"/>
          <table:table-cell/>
          <table:table-cell table:style-name="ce608" table:content-validation-name="val17"/>
          <table:table-cell table:style-name="ce277"/>
          <table:table-cell table:style-name="ce256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2"/>
          <table:table-cell table:style-name="ce240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768" table:content-validation-name="val17"/>
          <table:table-cell table:style-name="ce281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8" table:content-validation-name="val17"/>
          <table:table-cell table:style-name="ce281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769" table:content-validation-name="val17"/>
          <table:table-cell table:style-name="ce282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9" table:content-validation-name="val17"/>
          <table:table-cell table:style-name="ce282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764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I85:.I92]))" office:value-type="float" office:value="0.0454606056705117" calcext:value-type="float">
            <text:p>0,0454606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I94]^4)/((([.I85]^4)/[.K85])+([.I86]^4/[.K86]+(([.I87]^4)/[.K87])+(([.I88]^4)/[.K88])+(([.I89]^4)/[.K89])+([.I90]^4)/[.K90])))" office:value-type="float" office:value="27203.2058220713" calcext:value-type="float">
            <text:p>27203,2</text:p>
          </table:table-cell>
          <table:table-cell table:style-name="ce822" table:formula="of:=SUM([.L85:.L93])" office:value-type="percentage" office:value="1" calcext:value-type="percentage">
            <text:p>100,00%</text:p>
          </table:table-cell>
          <table:table-cell/>
          <table:table-cell table:style-name="ce352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283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V85:.V92]))" office:value-type="string" office:string-value="" calcext:value-type="error">
            <text:p>#VALOR!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V94]^4)/((([.V85]^4)/[.X85])+([.V86]^4/[.X86]+(([.V87]^4)/[.X87])+(([.V88]^4)/[.X88])+(([.V89]^4)/[.X89])+([.V90]^4)/[.X90])))" office:value-type="string" office:string-value="" calcext:value-type="error">
            <text:p>#VALOR!</text:p>
          </table:table-cell>
          <table:table-cell table:style-name="ce822" table:formula="of:=SUM([.Y85:.Y93])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765" table:formula="of:=TRUNC([.I95];[.C94])" office:value-type="float" office:value="0.09" calcext:value-type="float">
            <text:p>0,090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I94]*[.I96]" office:value-type="float" office:value="0.0909255005473276" calcext:value-type="float">
            <text:p>0,0909255</text:p>
          </table:table-cell>
          <table:table-cell table:style-name="ce282" table:number-columns-repeated="3"/>
          <table:table-cell/>
          <table:table-cell table:style-name="ce352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267" table:formula="of:=TRUNC([.V95];[.P94])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V94]*[.V96]" office:value-type="string" office:string-value="" calcext:value-type="error">
            <text:p>#VALOR!</text:p>
          </table:table-cell>
          <table:table-cell table:style-name="ce282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Diferença</text:p>
          </table:table-cell>
          <table:covered-table-cell/>
          <table:table-cell table:style-name="ce763" table:formula="of:=[.I95]-[.C95]" office:value-type="float" office:value="0.000925500547327596" calcext:value-type="float">
            <text:p>0,00093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K94]&gt;100000;2;TINV(0.0455;[.K94]))" office:value-type="float" office:value="2.00009434995951" calcext:value-type="float">
            <text:p>2,00</text:p>
          </table:table-cell>
          <table:table-cell table:style-name="ce286" table:number-columns-repeated="3"/>
          <table:table-cell/>
          <table:table-cell table:style-name="ce352" office:value-type="string" calcext:value-type="string" table:number-columns-spanned="2" table:number-rows-spanned="1">
            <text:p>Diferença</text:p>
          </table:table-cell>
          <table:covered-table-cell/>
          <table:table-cell table:style-name="ce269" table:formula="of:=[.V95]-[.P95]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X94]&gt;100000;2;TINV(0.0455;[.X94]))" office:value-type="string" office:string-value="" calcext:value-type="error">
            <text:p>#VALOR!</text:p>
          </table:table-cell>
          <table:table-cell table:style-name="ce286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Percentual</text:p>
          </table:table-cell>
          <table:covered-table-cell/>
          <table:table-cell table:style-name="ce763" table:formula="of:=([.C96]/[.I95])*100" office:value-type="float" office:value="1.01786687096197" calcext:value-type="float">
            <text:p>1,01787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C97]&lt;=5;ROUND([.I95];[.C94]);ROUNDUP([.I95];[.C94]))" office:value-type="float" office:value="0.09" calcext:value-type="float">
            <text:p>0,090</text:p>
          </table:table-cell>
          <table:table-cell table:style-name="ce288" table:formula="of:=[.J85]" office:value-type="string" office:string-value="kgf/cm2" calcext:value-type="string">
            <text:p>kgf/cm2</text:p>
          </table:table-cell>
          <table:table-cell table:style-name="ce282" table:number-columns-repeated="2"/>
          <table:table-cell/>
          <table:table-cell table:style-name="ce352" office:value-type="string" calcext:value-type="string" table:number-columns-spanned="2" table:number-rows-spanned="1">
            <text:p>Percentual</text:p>
          </table:table-cell>
          <table:covered-table-cell/>
          <table:table-cell table:style-name="ce269" table:formula="of:=([.P96]/[.V95])*100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P97]&lt;=5;ROUND([.V95];[.P94]);ROUNDUP([.V95];[.P94]))" office:value-type="string" office:string-value="" calcext:value-type="error">
            <text:p>#VALOR!</text:p>
          </table:table-cell>
          <table:table-cell table:style-name="ce288" table:formula="of:=[.W85]" office:value-type="string" office:string-value="kgf/cm2" calcext:value-type="string">
            <text:p>kgf/cm2</text:p>
          </table:table-cell>
          <table:table-cell table:style-name="ce282" table:number-columns-repeated="2"/>
          <table:table-cell table:number-columns-repeated="13"/>
          <table:table-cell table:style-name="ce1" table:number-columns-repeated="16346"/>
        </table:table-row>
        <table:table-row table:style-name="ro9">
          <table:table-cell table:number-columns-repeated="38"/>
          <table:table-cell table:style-name="ce1" table:number-columns-repeated="16346"/>
        </table:table-row>
        <table:table-row table:style-name="ro9">
          <table:table-cell table:style-name="ce343" table:formula="of:=CONCATENATE(&quot;INCERTEZA DE MEDIÇÃO - MANÔMETRO – Calibração – Ponto 7:&quot;;&quot;   &quot;;[$Planilha.$S54];&quot;  &quot;;[$Planilha.$K$25])" office:value-type="string" office:string-value="INCERTEZA DE MEDIÇÃO - MANÔMETRO – Calibração – Ponto 7:     kgf/cm2" calcext:value-type="string" table:number-columns-spanned="12" table:number-rows-spanned="1">
            <text:p>INCERTEZA DE MEDIÇÃO - MANÔMETRO – Calibração – Ponto 7: <text:s text:c="4"/>kgf/cm2</text:p>
          </table:table-cell>
          <table:covered-table-cell table:number-columns-repeated="11"/>
          <table:table-cell/>
          <table:table-cell table:style-name="ce86" table:number-columns-spanned="11" table:number-rows-spanned="1"/>
          <table:covered-table-cell table:number-columns-repeated="10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246" office:value-type="string" calcext:value-type="string">
            <text:p>Tipo</text:p>
          </table:table-cell>
          <table:table-cell table:style-name="ce247" office:value-type="string" calcext:value-type="string">
            <text:p>Componente da incerteza</text:p>
          </table:table-cell>
          <table:table-cell table:style-name="ce760" office:value-type="string" calcext:value-type="string">
            <text:p>Valor</text:p>
          </table:table-cell>
          <table:table-cell table:style-name="ce246" office:value-type="string" calcext:value-type="string">
            <text:p>Divisor</text:p>
          </table:table-cell>
          <table:table-cell table:style-name="ce246" office:value-type="string" calcext:value-type="string">
            <text:p>µ(xi)</text:p>
          </table:table-cell>
          <table:table-cell table:style-name="ce246" office:value-type="string" calcext:value-type="string">
            <text:p>Distribuição</text:p>
          </table:table-cell>
          <table:table-cell table:style-name="ce246" office:value-type="string" calcext:value-type="string">
            <text:p>unid. ent.</text:p>
          </table:table-cell>
          <table:table-cell table:style-name="ce246" office:value-type="string" calcext:value-type="string">
            <text:p>Ci</text:p>
          </table:table-cell>
          <table:table-cell table:style-name="ce248" office:value-type="string" calcext:value-type="string">
            <text:p>µi(y)</text:p>
          </table:table-cell>
          <table:table-cell table:style-name="ce246" office:value-type="string" calcext:value-type="string">
            <text:p>unid. Saida</text:p>
          </table:table-cell>
          <table:table-cell table:style-name="ce246" office:value-type="string" calcext:value-type="string">
            <text:p>vi/veff</text:p>
          </table:table-cell>
          <table:table-cell table:style-name="ce246" office:value-type="string" calcext:value-type="string">
            <text:p>%</text:p>
          </table:table-cell>
          <table:table-cell/>
          <table:table-cell table:style-name="ce682"/>
          <table:table-cell table:style-name="ce309"/>
          <table:table-cell table:style-name="ce682" table:number-columns-repeated="6"/>
          <table:table-cell table:style-name="ce310"/>
          <table:table-cell table:style-name="ce682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761" table:formula="of:=[$Planilha.$I$25]" office:value-type="float" office:value="0.1" calcext:value-type="float">
            <text:p>0,10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101]/[.D101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101]=0;0;[.E101]*[.H101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101]^2/[.$I$110]^2" office:value-type="string" office:string-value="" calcext:value-type="error">
            <text:p>#VALOR!</text:p>
          </table:table-cell>
          <table:table-cell/>
          <table:table-cell table:style-name="ce682" table:content-validation-name="val17"/>
          <table:table-cell table:style-name="ce311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761" table:formula="of:=[Planilha.$G$78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102]/[.D102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102]=0;0;[.E102]*[.H102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102]^2/[.$I$110]^2" office:value-type="string" office:string-value="" calcext:value-type="error">
            <text:p>#VALOR!</text:p>
          </table:table-cell>
          <table:table-cell/>
          <table:table-cell table:style-name="ce682" table:content-validation-name="val17"/>
          <table:table-cell table:style-name="ce311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761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103]/[.D103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103]=0;0;[.E103]*[.H103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103]^2/[.$I$110]^2" office:value-type="string" office:string-value="" calcext:value-type="error">
            <text:p>#VALOR!</text:p>
          </table:table-cell>
          <table:table-cell/>
          <table:table-cell table:style-name="ce682" table:content-validation-name="val17"/>
          <table:table-cell table:style-name="ce311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761" table:formula="of:=[Incerteza.$K$119]*[$Planilha.$B$78]" office:value-type="string" office:string-value="" calcext:value-type="error">
            <text:p>#VALOR!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C104]/[.D104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104]=0;0;[.E104]*[.H104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I104]^2/[.$I$110]^2" office:value-type="string" office:string-value="" calcext:value-type="error">
            <text:p>#VALOR!</text:p>
          </table:table-cell>
          <table:table-cell/>
          <table:table-cell table:style-name="ce682" table:content-validation-name="val17"/>
          <table:table-cell table:style-name="ce311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office:value-type="string" calcext:value-type="string">
            <text:p>Incerteza da curva de calibração</text:p>
          </table:table-cell>
          <table:table-cell table:style-name="ce761" table:formula="of:=[.$R$119]^2+[.$S$119]^2*([$Planilha.$E$78])^2+2*([$Planilha.$E$78])*[.$R$119]*[.$S$119]*[.$T$119]" office:value-type="string" office:string-value="" calcext:value-type="error">
            <text:p>#VALOR!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C105]/[.D105]" office:value-type="string" office:string-value="" calcext:value-type="error">
            <text:p>#VALOR!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G104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105]=0;0;[.E105]*[.H105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I105]^2/[.$I$110]^2" office:value-type="string" office:string-value="" calcext:value-type="error">
            <text:p>#VALOR!</text:p>
          </table:table-cell>
          <table:table-cell/>
          <table:table-cell table:style-name="ce682" table:content-validation-name="val17"/>
          <table:table-cell table:style-name="ce314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762" table:formula="of:=[Planilha.$D$78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106]/[.D106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106]=0;0;[.E106]*[.H106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106]^2/[.$I$14]^2" office:value-type="string" office:string-value="" calcext:value-type="error">
            <text:p>#VALOR!</text:p>
          </table:table-cell>
          <table:table-cell/>
          <table:table-cell table:style-name="ce682" table:content-validation-name="val17"/>
          <table:table-cell table:style-name="ce315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608" table:content-validation-name="val17"/>
          <table:table-cell table:style-name="ce277"/>
          <table:table-cell table:style-name="ce761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3"/>
          <table:table-cell/>
          <table:table-cell table:style-name="ce682" table:content-validation-name="val17"/>
          <table:table-cell table:style-name="ce315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768" table:content-validation-name="val17"/>
          <table:table-cell table:style-name="ce281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683" table:content-validation-name="val17"/>
          <table:table-cell table:style-name="ce316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769" table:content-validation-name="val17"/>
          <table:table-cell table:style-name="ce282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683" table:content-validation-name="val17"/>
          <table:table-cell table:style-name="ce317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764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I101:.I108]))" office:value-type="string" office:string-value="" calcext:value-type="error">
            <text:p>#VALOR!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I110]^4)/((([.I101]^4)/[.K101])+([.I102]^4/[.K102]+(([.I103]^4)/[.K103])+(([.I104]^4)/[.K104])+(([.I105]^4)/[.K105])+([.I106]^4)/[.K106])))" office:value-type="string" office:string-value="" calcext:value-type="error">
            <text:p>#VALOR!</text:p>
          </table:table-cell>
          <table:table-cell table:style-name="ce822" table:formula="of:=SUM([.L101:.L109])" office:value-type="string" office:string-value="" calcext:value-type="error">
            <text:p>#VALOR!</text:p>
          </table:table-cell>
          <table:table-cell/>
          <table:table-cell table:style-name="ce86" table:number-columns-spanned="2" table:number-rows-spanned="1"/>
          <table:covered-table-cell/>
          <table:table-cell table:style-name="ce318"/>
          <table:table-cell table:style-name="ce317" table:number-columns-repeated="4"/>
          <table:table-cell table:style-name="ce319"/>
          <table:table-cell table:style-name="ce320"/>
          <table:table-cell table:style-name="ce682"/>
          <table:table-cell table:style-name="ce321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765" table:formula="of:=TRUNC([.I111];[.C110])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I110]*[.I112]" office:value-type="string" office:string-value="" calcext:value-type="error">
            <text:p>#VALOR!</text:p>
          </table:table-cell>
          <table:table-cell table:style-name="ce282" table:number-columns-repeated="3"/>
          <table:table-cell/>
          <table:table-cell table:style-name="ce86" table:number-columns-spanned="2" table:number-rows-spanned="1"/>
          <table:covered-table-cell/>
          <table:table-cell table:style-name="ce322"/>
          <table:table-cell table:style-name="ce317" table:number-columns-repeated="4"/>
          <table:table-cell table:style-name="ce319"/>
          <table:table-cell table:style-name="ce320"/>
          <table:table-cell table:style-name="ce317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Diferença</text:p>
          </table:table-cell>
          <table:covered-table-cell/>
          <table:table-cell table:style-name="ce763" table:formula="of:=[.I111]-[.C111]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K110]&gt;100000;2;TINV(0.0455;[.K110]))" office:value-type="string" office:string-value="" calcext:value-type="error">
            <text:p>#VALOR!</text:p>
          </table:table-cell>
          <table:table-cell table:style-name="ce286" table:number-columns-repeated="3"/>
          <table:table-cell/>
          <table:table-cell table:style-name="ce86" table:number-columns-spanned="2" table:number-rows-spanned="1"/>
          <table:covered-table-cell/>
          <table:table-cell table:style-name="ce683"/>
          <table:table-cell table:style-name="ce317" table:number-columns-repeated="3"/>
          <table:table-cell table:style-name="ce86" table:number-columns-spanned="2" table:number-rows-spanned="1"/>
          <table:covered-table-cell/>
          <table:table-cell table:style-name="ce323"/>
          <table:table-cell table:style-name="ce324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Percentual</text:p>
          </table:table-cell>
          <table:covered-table-cell/>
          <table:table-cell table:style-name="ce763" table:formula="of:=([.C112]/[.I111])*100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C113]&lt;=5;ROUND([.I111];[.C110]);ROUNDUP([.I111];[.C110]))" office:value-type="string" office:string-value="" calcext:value-type="error">
            <text:p>#VALOR!</text:p>
          </table:table-cell>
          <table:table-cell table:style-name="ce288" table:formula="of:=[.J101]" office:value-type="string" office:string-value="kgf/cm2" calcext:value-type="string">
            <text:p>kgf/cm2</text:p>
          </table:table-cell>
          <table:table-cell table:style-name="ce282" table:number-columns-repeated="2"/>
          <table:table-cell/>
          <table:table-cell table:style-name="ce86" table:number-columns-spanned="2" table:number-rows-spanned="1"/>
          <table:covered-table-cell/>
          <table:table-cell table:style-name="ce683"/>
          <table:table-cell table:style-name="ce317" table:number-columns-repeated="3"/>
          <table:table-cell table:style-name="ce86" table:number-columns-spanned="2" table:number-rows-spanned="1"/>
          <table:covered-table-cell/>
          <table:table-cell table:style-name="ce325"/>
          <table:table-cell table:style-name="ce326"/>
          <table:table-cell table:style-name="ce317"/>
          <table:table-cell table:number-columns-repeated="14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25" table:number-columns-repeated="2"/>
          <table:table-cell table:style-name="ce318"/>
          <table:table-cell table:style-name="ce25" table:number-columns-repeated="8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354" office:value-type="string" calcext:value-type="string" table:number-columns-spanned="29" table:number-rows-spanned="2">
            <text:p>INFORMAÇÕES DOS PADRÕES</text:p>
          </table:table-cell>
          <table:covered-table-cell table:number-columns-repeated="28"/>
          <table:table-cell table:number-columns-repeated="9"/>
          <table:table-cell table:style-name="ce1" table:number-columns-repeated="16346"/>
        </table:table-row>
        <table:table-row table:style-name="ro9">
          <table:covered-table-cell table:number-columns-repeated="29"/>
          <table:table-cell table:number-columns-repeated="9"/>
          <table:table-cell table:style-name="ce1" table:number-columns-repeated="16346"/>
        </table:table-row>
        <table:table-row table:style-name="ro9">
          <table:table-cell table:style-name="ce355" table:number-columns-spanned="1" table:number-rows-spanned="2"/>
          <table:table-cell table:style-name="ce355" table:number-columns-spanned="1" table:number-rows-spanned="2"/>
          <table:table-cell table:style-name="ce770" office:value-type="string" calcext:value-type="string">
            <text:p>Código</text:p>
          </table:table-cell>
          <table:table-cell table:style-name="ce532" office:value-type="string" calcext:value-type="string" table:number-columns-spanned="1" table:number-rows-spanned="2">
            <text:p>Tipo</text:p>
          </table:table-cell>
          <table:table-cell table:style-name="ce136" office:value-type="string" calcext:value-type="string">
            <text:p>Data da</text:p>
          </table:table-cell>
          <table:table-cell table:style-name="ce137" office:value-type="string" calcext:value-type="string">
            <text:p>Número do</text:p>
          </table:table-cell>
          <table:table-cell table:style-name="ce138" office:value-type="string" calcext:value-type="string">
            <text:p>Laboratório</text:p>
          </table:table-cell>
          <table:table-cell table:style-name="ce136" office:value-type="string" calcext:value-type="string">
            <text:p>Validade</text:p>
          </table:table-cell>
          <table:table-cell table:style-name="ce236" office:value-type="string" calcext:value-type="string" table:number-columns-spanned="1" table:number-rows-spanned="2">
            <text:p>Resolução</text:p>
          </table:table-cell>
          <table:table-cell table:style-name="ce138" office:value-type="string" calcext:value-type="string">
            <text:p>Rastreabilidade</text:p>
          </table:table-cell>
          <table:table-cell table:style-name="ce532" office:value-type="string" calcext:value-type="string" table:number-columns-spanned="1" table:number-rows-spanned="2">
            <text:p>IM padrão</text:p>
          </table:table-cell>
          <table:table-cell table:style-name="ce236" office:value-type="string" calcext:value-type="string" table:number-columns-spanned="1" table:number-rows-spanned="2">
            <text:p>k</text:p>
          </table:table-cell>
          <table:table-cell table:style-name="ce137" office:value-type="string" calcext:value-type="string">
            <text:p>Veff</text:p>
          </table:table-cell>
          <table:table-cell table:style-name="ce532" office:value-type="string" calcext:value-type="string" table:number-columns-spanned="2" table:number-rows-spanned="1">
            <text:p>Faixa</text:p>
          </table:table-cell>
          <table:covered-table-cell/>
          <table:table-cell table:style-name="ce532" office:value-type="string" calcext:value-type="string" table:number-columns-spanned="2" table:number-rows-spanned="1">
            <text:p>Equação</text:p>
          </table:table-cell>
          <table:covered-table-cell/>
          <table:table-cell table:style-name="ce532" office:value-type="string" calcext:value-type="string" table:number-columns-spanned="3" table:number-rows-spanned="1">
            <text:p>Incerteza da Curva</text:p>
          </table:table-cell>
          <table:covered-table-cell table:number-columns-repeated="2"/>
          <table:table-cell table:style-name="ce532" office:value-type="string" calcext:value-type="string" table:number-columns-spanned="1" table:number-rows-spanned="2">
            <text:p>Tipo</text:p>
          </table:table-cell>
          <table:table-cell table:style-name="ce139" table:number-columns-repeated="2"/>
          <table:table-cell table:style-name="ce138" office:value-type="string" calcext:value-type="string">
            <text:p>Unidade de</text:p>
          </table:table-cell>
          <table:table-cell table:style-name="ce236" office:value-type="string" calcext:value-type="string" table:number-columns-spanned="1" table:number-rows-spanned="2">
            <text:p>capacidade</text:p>
          </table:table-cell>
          <table:table-cell table:style-name="ce532" office:value-type="string" calcext:value-type="string" table:number-columns-spanned="1" table:number-rows-spanned="2">
            <text:p>deriva</text:p>
          </table:table-cell>
          <table:table-cell table:style-name="ce140" office:value-type="string" calcext:value-type="string">
            <text:p>Valor</text:p>
          </table:table-cell>
          <table:table-cell table:style-name="ce116" office:value-type="string" calcext:value-type="string" table:number-columns-spanned="1" table:number-rows-spanned="2">
            <text:p>Validade</text:p>
          </table:table-cell>
          <table:table-cell table:style-name="ce116" office:value-type="string" calcext:value-type="string" table:number-columns-spanned="1" table:number-rows-spanned="2">
            <text:p>Status</text:p>
          </table:table-cell>
          <table:table-cell table:number-columns-repeated="9"/>
          <table:table-cell table:style-name="ce1" table:number-columns-repeated="16346"/>
        </table:table-row>
        <table:table-row table:style-name="ro16">
          <table:covered-table-cell table:number-columns-repeated="2"/>
          <table:table-cell table:style-name="ce771" office:value-type="string" calcext:value-type="string">
            <text:p>padrão</text:p>
          </table:table-cell>
          <table:covered-table-cell/>
          <table:table-cell table:style-name="ce143" office:value-type="string" calcext:value-type="string">
            <text:p>Calibração</text:p>
          </table:table-cell>
          <table:table-cell table:style-name="ce144" office:value-type="string" calcext:value-type="string">
            <text:p>Certificado</text:p>
          </table:table-cell>
          <table:table-cell table:style-name="ce145" office:value-type="string" calcext:value-type="string">
            <text:p>Emitente</text:p>
          </table:table-cell>
          <table:table-cell table:style-name="ce143" office:value-type="string" calcext:value-type="string">
            <text:p>Calibração</text:p>
          </table:table-cell>
          <table:covered-table-cell/>
          <table:table-cell table:style-name="ce145" office:value-type="string" calcext:value-type="string">
            <text:p>dos Padrões</text:p>
          </table:table-cell>
          <table:covered-table-cell table:number-columns-repeated="2"/>
          <table:table-cell table:style-name="ce144" office:value-type="string" calcext:value-type="string">
            <text:p>(IM)</text:p>
          </table:table-cell>
          <table:table-cell table:style-name="ce139" office:value-type="string" calcext:value-type="string">
            <text:p>Inicial</text:p>
          </table:table-cell>
          <table:table-cell table:style-name="ce139" office:value-type="string" calcext:value-type="string">
            <text:p>Final</text:p>
          </table:table-cell>
          <table:table-cell table:style-name="ce139" office:value-type="string" calcext:value-type="string">
            <text:p>a</text:p>
          </table:table-cell>
          <table:table-cell table:style-name="ce139" office:value-type="string" calcext:value-type="string">
            <text:p>b</text:p>
          </table:table-cell>
          <table:table-cell table:style-name="ce139" office:value-type="string" calcext:value-type="string">
            <text:p>u<text:span text:style-name="T1">a</text:span></text:p>
          </table:table-cell>
          <table:table-cell table:style-name="ce139" office:value-type="string" calcext:value-type="string">
            <text:p>u<text:span text:style-name="T1">b</text:span></text:p>
          </table:table-cell>
          <table:table-cell table:style-name="ce139" office:value-type="string" calcext:value-type="string">
            <text:p>r<text:span text:style-name="T1">(a,b)</text:span></text:p>
          </table:table-cell>
          <table:covered-table-cell/>
          <table:table-cell table:style-name="ce139" office:value-type="string" calcext:value-type="string">
            <text:p>X1</text:p>
          </table:table-cell>
          <table:table-cell table:style-name="ce139" office:value-type="string" calcext:value-type="string">
            <text:p>X0</text:p>
          </table:table-cell>
          <table:table-cell table:style-name="ce145" office:value-type="string" calcext:value-type="string">
            <text:p>medida</text:p>
          </table:table-cell>
          <table:covered-table-cell table:number-columns-repeated="2"/>
          <table:table-cell table:style-name="ce146" office:value-type="string" calcext:value-type="string">
            <text:p>nominal</text:p>
          </table:table-cell>
          <table:covered-table-cell table:number-columns-repeated="2"/>
          <table:table-cell table:number-columns-repeated="9"/>
          <table:table-cell table:style-name="ce1" table:number-columns-repeated="16346"/>
        </table:table-row>
        <table:table-row table:style-name="ro11">
          <table:table-cell table:style-name="ce327" office:value-type="string" calcext:value-type="string">
            <text:p>PADRÃO DE PRESSÃO:</text:p>
          </table:table-cell>
          <table:table-cell table:style-name="ce13" table:formula="of:=MAX([Padrões.A4:.A13])" office:value-type="float" office:value="1" calcext:value-type="float">
            <text:p>1</text:p>
          </table:table-cell>
          <table:table-cell table:style-name="ce772" table:formula="of:=IF([.$B119]=&quot;&quot;;&quot;&quot;;LOOKUP(1;[Padrões.$A$4:.$A$24];[Padrões.O$4:.O$24]))" office:value-type="string" office:string-value="DSP-010" calcext:value-type="string">
            <text:p>DSP-010</text:p>
          </table:table-cell>
          <table:table-cell table:style-name="ce328" table:formula="of:=IF([.$B119]=&quot;&quot;;&quot;&quot;;LOOKUP(1;[Padrões.$A$4:.$A$24];[Padrões.P$4:.P$24]))" office:value-type="string" office:string-value="PADRÃO DE PRESSÃO" calcext:value-type="string">
            <text:p>PADRÃO DE PRESSÃO</text:p>
          </table:table-cell>
          <table:table-cell table:style-name="ce329" table:formula="of:=IF([.$B119]=&quot;&quot;;&quot;&quot;;LOOKUP(1;[Padrões.$A$4:.$A$24];[Padrões.Q$4:.Q$24]))" office:value-type="date" office:date-value="2026-03-02" calcext:value-type="date">
            <text:p>2/3/26</text:p>
          </table:table-cell>
          <table:table-cell table:style-name="ce328" table:formula="of:=IF([.$B119]=&quot;&quot;;&quot;&quot;;LOOKUP(1;[Padrões.$A$4:.$A$24];[Padrões.R$4:.R$24]))" office:value-type="string" office:string-value="455883/26 " calcext:value-type="string">
            <text:p>455883/26 </text:p>
          </table:table-cell>
          <table:table-cell table:style-name="ce328" table:formula="of:=IF([.$B119]=&quot;&quot;;&quot;&quot;;LOOKUP(1;[Padrões.$A$4:.$A$24];[Padrões.S$4:.S$24]))" office:value-type="string" office:string-value="CAL 0056" calcext:value-type="string">
            <text:p>CAL 0056</text:p>
          </table:table-cell>
          <table:table-cell table:style-name="ce329" table:formula="of:=IF([.$B119]=&quot;&quot;;&quot;&quot;;LOOKUP(1;[Padrões.$A$4:.$A$24];[Padrões.T$4:.T$24]))" office:value-type="date" office:date-value="2027-03-02" calcext:value-type="date">
            <text:p>2/3/27</text:p>
          </table:table-cell>
          <table:table-cell table:style-name="ce330" table:formula="of:=IF([.$B119]=&quot;&quot;;&quot;&quot;;LOOKUP(1;[Padrões.$A$4:.$A$24];[Padrões.U$4:.U$24]))" office:value-type="float" office:value="0.01" calcext:value-type="float">
            <text:p>0,010</text:p>
          </table:table-cell>
          <table:table-cell table:style-name="ce328" table:formula="of:=IF([.$B119]=&quot;&quot;;&quot;&quot;;LOOKUP(1;[Padrões.$A$4:.$A$24];[Padrões.V$4:.V$24]))" office:value-type="string" office:string-value="SI" calcext:value-type="string">
            <text:p>SI</text:p>
          </table:table-cell>
          <table:table-cell table:style-name="ce331" table:formula="of:=IF([.$B119]=&quot;&quot;;&quot;&quot;;LOOKUP(1;[Padrões.$A$4:.$A$24];[Padrões.W$4:.W$24]))" office:value-type="float" office:value="0.01" calcext:value-type="float">
            <text:p>0,0100</text:p>
          </table:table-cell>
          <table:table-cell table:style-name="ce328" table:formula="of:=IF([.$B119]=&quot;&quot;;&quot;&quot;;LOOKUP(1;[Padrões.$A$4:.$A$24];[Padrões.X$4:.X$24]))" office:value-type="float" office:value="2" calcext:value-type="float">
            <text:p>2</text:p>
          </table:table-cell>
          <table:table-cell table:style-name="ce332" table:formula="of:=IF([.$B119]=&quot;&quot;;&quot;&quot;;LOOKUP(1;[Padrões.$A$4:.$A$24];[Padrões.Y$4:.Y$24]))" office:value-type="float" office:value="10000" calcext:value-type="float">
            <text:p>10000,0</text:p>
          </table:table-cell>
          <table:table-cell table:style-name="ce328" table:formula="of:=IF([.$B119]=&quot;&quot;;&quot;&quot;;LOOKUP(1;[Padrões.$A$4:.$A$24];[Padrões.Z$4:.Z$24]))" office:value-type="float" office:value="0" calcext:value-type="float">
            <text:p>0</text:p>
          </table:table-cell>
          <table:table-cell table:style-name="ce328" table:formula="of:=IF([.$B119]=&quot;&quot;;&quot;&quot;;LOOKUP(1;[Padrões.$A$4:.$A$24];[Padrões.AA$4:.AA$24]))" office:value-type="float" office:value="40" calcext:value-type="float">
            <text:p>40</text:p>
          </table:table-cell>
          <table:table-cell table:style-name="ce333" table:formula="of:=IF([.$B119]=&quot;&quot;;&quot;&quot;;LOOKUP(1;[Padrões.$A$4:.$A$24];[Padrões.AB$4:.AB$24]))" office:value-type="float" office:value="0.00584090909090929" calcext:value-type="float">
            <text:p>5,84E-03</text:p>
          </table:table-cell>
          <table:table-cell table:style-name="ce333" table:formula="of:=IF([.$B119]=&quot;&quot;;&quot;&quot;;LOOKUP(1;[Padrões.$A$4:.$A$24];[Padrões.AC$4:.AC$24]))" office:value-type="float" office:value="1.00048787878788" calcext:value-type="float">
            <text:p>1,00E+00</text:p>
          </table:table-cell>
          <table:table-cell table:style-name="ce333" table:formula="of:=IF([.$B119]=&quot;&quot;;&quot;&quot;;LOOKUP(1;[Padrões.$A$4:.$A$24];[Padrões.AD$4:.AD$24]))" office:value-type="float" office:value="0.00197282094922579" calcext:value-type="float">
            <text:p>1,97E-03</text:p>
          </table:table-cell>
          <table:table-cell table:style-name="ce333" table:formula="of:=IF([.$B119]=&quot;&quot;;&quot;&quot;;LOOKUP(1;[Padrões.$A$4:.$A$24];[Padrões.AE$4:.AE$24]))" office:value-type="float" office:value="0.000222311735874097" calcext:value-type="float">
            <text:p>2,22E-04</text:p>
          </table:table-cell>
          <table:table-cell table:style-name="ce333" table:formula="of:=IF([.$B119]=&quot;&quot;;&quot;&quot;;LOOKUP(1;[Padrões.$A$4:.$A$24];[Padrões.AF$4:.AF$24]))" office:value-type="float" office:value="-0.845154254728516" calcext:value-type="float">
            <text:p>-8,45E-01</text:p>
          </table:table-cell>
          <table:table-cell table:style-name="ce328" table:formula="of:=IF([.$B119]=&quot;&quot;;&quot;&quot;;LOOKUP(1;[Padrões.$A$4:.$A$24];[Padrões.AG$4:.AG$24]))" office:value-type="string" office:string-value="Digital" calcext:value-type="string">
            <text:p>Digital</text:p>
          </table:table-cell>
          <table:table-cell table:style-name="ce328" table:formula="of:=IF([.$B119]=&quot;&quot;;&quot;&quot;;LOOKUP(1;[Padrões.$A$4:.$A$24];[Padrões.AH$4:.AH$24]))" office:value-type="float" office:value="0" calcext:value-type="float">
            <text:p/>
          </table:table-cell>
          <table:table-cell table:style-name="ce328" table:formula="of:=IF([.$B119]=&quot;&quot;;&quot;&quot;;LOOKUP(1;[Padrões.$A$4:.$A$24];[Padrões.AI$4:.AI$24]))" office:value-type="float" office:value="0" calcext:value-type="float">
            <text:p/>
          </table:table-cell>
          <table:table-cell table:style-name="ce328" table:formula="of:=IF([.$B119]=&quot;&quot;;&quot;&quot;;LOOKUP(1;[Padrões.$A$4:.$A$24];[Padrões.AJ$4:.AJ$24]))" office:value-type="string" office:string-value="kgf/cm2" calcext:value-type="string">
            <text:p>kgf/cm2</text:p>
          </table:table-cell>
          <table:table-cell table:style-name="ce328" table:formula="of:=IF([.$B119]=&quot;&quot;;&quot;&quot;;LOOKUP(1;[Padrões.$A$4:.$A$24];[Padrões.AK$4:.AK$24]))" office:value-type="float" office:value="0" calcext:value-type="float">
            <text:p/>
          </table:table-cell>
          <table:table-cell table:style-name="ce328" table:formula="of:=IF([.$B119]=&quot;&quot;;&quot;&quot;;LOOKUP(1;[Padrões.$A$4:.$A$24];[Padrões.AL$4:.AL$24]))" office:value-type="float" office:value="0" calcext:value-type="float">
            <text:p/>
          </table:table-cell>
          <table:table-cell table:style-name="ce328" table:formula="of:=IF([.$B119]=&quot;&quot;;&quot;&quot;;LOOKUP(1;[Padrões.$A$4:.$A$24];[Padrões.AM$4:.AM$24]))" office:value-type="float" office:value="0" calcext:value-type="float">
            <text:p/>
          </table:table-cell>
          <table:table-cell table:style-name="ce241" table:formula="of:=[.H119]-NOW()" office:value-type="float" office:value="301.451164782586" calcext:value-type="float">
            <text:p>301,451164782586</text:p>
          </table:table-cell>
          <table:table-cell table:style-name="ce856" table:formula="of:=IF([.AB119]&gt;0;&quot;Em Dia&quot;;&quot;Vencido&quot;)" office:value-type="string" office:string-value="Em Dia" calcext:value-type="string">
            <text:p>Em Dia</text:p>
          </table:table-cell>
          <table:table-cell table:number-columns-repeated="9"/>
          <table:table-cell table:style-name="ce1" table:number-columns-repeated="16346"/>
        </table:table-row>
        <table:table-row table:style-name="ro11">
          <table:table-cell table:style-name="ce327" office:value-type="string" calcext:value-type="string">
            <text:p>TERMÔMETRO AMBIENTE:</text:p>
          </table:table-cell>
          <table:table-cell table:style-name="ce13" table:formula="of:=MAX([Padrões.A15:.A19])" office:value-type="float" office:value="6" calcext:value-type="float">
            <text:p>6</text:p>
          </table:table-cell>
          <table:table-cell table:style-name="ce772" table:formula="of:=IF([.$B120]=&quot;&quot;;&quot;&quot;;LOOKUP(6;[Padrões.$A$15:.$A$19];[Padrões.O$15:.O$19]))" office:value-type="string" office:string-value="DSP-022" calcext:value-type="string">
            <text:p>DSP-022</text:p>
          </table:table-cell>
          <table:table-cell table:style-name="ce328" table:formula="of:=IF([.$B120]=&quot;&quot;;&quot;&quot;;LOOKUP(6;[Padrões.$A$15:.$A$19];[Padrões.P$15:.P$19]))" office:value-type="string" office:string-value="TERMÔMETRO AMBIENTE" calcext:value-type="string">
            <text:p>TERMÔMETRO AMBIENTE</text:p>
          </table:table-cell>
          <table:table-cell table:style-name="ce329" table:formula="of:=IF([.$B120]=&quot;&quot;;&quot;&quot;;LOOKUP(6;[Padrões.$A$15:.$A$19];[Padrões.Q$15:.Q$19]))" office:value-type="date" office:date-value="2026-03-10" calcext:value-type="date">
            <text:p>10/3/26</text:p>
          </table:table-cell>
          <table:table-cell table:style-name="ce328" table:formula="of:=IF([.$B120]=&quot;&quot;;&quot;&quot;;LOOKUP(6;[Padrões.$A$15:.$A$19];[Padrões.R$15:.R$19]))" office:value-type="string" office:string-value="LV01043-32754-26-R0" calcext:value-type="string">
            <text:p>LV01043-32754-26-R0</text:p>
          </table:table-cell>
          <table:table-cell table:style-name="ce328" table:formula="of:=IF([.$B120]=&quot;&quot;;&quot;&quot;;LOOKUP(6;[Padrões.$A$15:.$A$19];[Padrões.S$15:.S$19]))" office:value-type="string" office:string-value="CAL 0127" calcext:value-type="string">
            <text:p>CAL 0127</text:p>
          </table:table-cell>
          <table:table-cell table:style-name="ce329" table:formula="of:=IF([.$B120]=&quot;&quot;;&quot;&quot;;LOOKUP(6;[Padrões.$A$15:.$A$19];[Padrões.T$15:.T$19]))" office:value-type="date" office:date-value="2028-03-09" calcext:value-type="date">
            <text:p>9/3/28</text:p>
          </table:table-cell>
          <table:table-cell table:style-name="ce328" table:formula="of:=IF([.$B120]=&quot;&quot;;&quot;&quot;;LOOKUP(6;[Padrões.$A$15:.$A$19];[Padrões.U$15:.U$19]))" office:value-type="string" office:string-value="-" calcext:value-type="string">
            <text:p>-</text:p>
          </table:table-cell>
          <table:table-cell table:style-name="ce328" table:formula="of:=IF([.$B120]=&quot;&quot;;&quot;&quot;;LOOKUP(6;[Padrões.$A$15:.$A$19];[Padrões.V$15:.V$19]))" office:value-type="string" office:string-value="SI" calcext:value-type="string">
            <text:p>SI</text:p>
          </table:table-cell>
          <table:table-cell table:style-name="ce328" table:formula="of:=IF([.$B120]=&quot;&quot;;&quot;&quot;;LOOKUP(6;[Padrões.$A$15:.$A$19];[Padrões.W$15:.W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X$15:.X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Y$15:.Y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Z$15:.Z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A$15:.AA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B$15:.AB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C$15:.AC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D$15:.AD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E$15:.AE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F$15:.AF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G$15:.AG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H$15:.AH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I$15:.AI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J$15:.AJ$19]))" office:value-type="string" office:string-value="ºC" calcext:value-type="string">
            <text:p>ºC</text:p>
          </table:table-cell>
          <table:table-cell table:style-name="ce328" table:formula="of:=IF([.$B120]=&quot;&quot;;&quot;&quot;;LOOKUP(6;[Padrões.$A$15:.$A$19];[Padrões.AK$15:.AK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L$15:.AL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M$15:.AM$19]))" office:value-type="float" office:value="0" calcext:value-type="float">
            <text:p/>
          </table:table-cell>
          <table:table-cell table:style-name="ce241" table:formula="of:=[.H120]-NOW()" office:value-type="float" office:value="674.451164782084" calcext:value-type="float">
            <text:p>674,451164782084</text:p>
          </table:table-cell>
          <table:table-cell table:style-name="ce856" table:formula="of:=IF([.AB120]&gt;0;&quot;Em Dia&quot;;&quot;Vencido&quot;)" office:value-type="string" office:string-value="Em Dia" calcext:value-type="string">
            <text:p>Em Dia</text:p>
          </table:table-cell>
          <table:table-cell table:number-columns-repeated="9"/>
          <table:table-cell table:style-name="ce1" table:number-columns-repeated="16346"/>
        </table:table-row>
        <table:table-row table:style-name="ro11">
          <table:table-cell table:style-name="ce334" office:value-type="string" calcext:value-type="string">
            <text:p>HIGRÔMETRO AMBIENTE:</text:p>
          </table:table-cell>
          <table:table-cell table:style-name="ce13" table:formula="of:=MAX([Padrões.D21:.D24])" office:value-type="float" office:value="8" calcext:value-type="float">
            <text:p>8</text:p>
          </table:table-cell>
          <table:table-cell table:style-name="ce772" table:formula="of:=IF([.$B121]=&quot;&quot;;&quot;&quot;;LOOKUP(8;[Padrões.$D$21:.$D$24];[Padrões.O$21:.O$24]))" office:value-type="string" office:string-value="DSP-022" calcext:value-type="string">
            <text:p>DSP-022</text:p>
          </table:table-cell>
          <table:table-cell table:style-name="ce328" table:formula="of:=IF([.$B121]=&quot;&quot;;&quot;&quot;;LOOKUP(8;[Padrões.$D$21:.$D$24];[Padrões.P$21:.P$24]))" office:value-type="string" office:string-value="HIGRÔMETRO AMBIENTE" calcext:value-type="string">
            <text:p>HIGRÔMETRO AMBIENTE</text:p>
          </table:table-cell>
          <table:table-cell table:style-name="ce335" table:formula="of:=IF([.$B121]=&quot;&quot;;&quot;&quot;;LOOKUP(8;[Padrões.$D$21:.$D$24];[Padrões.Q$21:.Q$24]))" office:value-type="date" office:date-value="2026-03-10" calcext:value-type="date">
            <text:p>10/3/26</text:p>
          </table:table-cell>
          <table:table-cell table:style-name="ce328" table:formula="of:=IF([.$B121]=&quot;&quot;;&quot;&quot;;LOOKUP(8;[Padrões.$D$21:.$D$24];[Padrões.R$21:.R$24]))" office:value-type="string" office:string-value="LV01043-32754-26-R0" calcext:value-type="string">
            <text:p>LV01043-32754-26-R0</text:p>
          </table:table-cell>
          <table:table-cell table:style-name="ce328" table:formula="of:=IF([.$B121]=&quot;&quot;;&quot;&quot;;LOOKUP(8;[Padrões.$D$21:.$D$24];[Padrões.S$21:.S$24]))" office:value-type="string" office:string-value="CAL 0127" calcext:value-type="string">
            <text:p>CAL 0127</text:p>
          </table:table-cell>
          <table:table-cell table:style-name="ce335" table:formula="of:=IF([.$B121]=&quot;&quot;;&quot;&quot;;LOOKUP(8;[Padrões.$D$21:.$D$24];[Padrões.T$21:.T$24]))" office:value-type="date" office:date-value="2028-03-09" calcext:value-type="date">
            <text:p>9/3/28</text:p>
          </table:table-cell>
          <table:table-cell table:style-name="ce328" table:formula="of:=IF([.$B121]=&quot;&quot;;&quot;&quot;;LOOKUP(8;[Padrões.$D$21:.$D$24];[Padrões.U$21:.U$24]))" office:value-type="string" office:string-value="-" calcext:value-type="string">
            <text:p>-</text:p>
          </table:table-cell>
          <table:table-cell table:style-name="ce328" table:formula="of:=IF([.$B121]=&quot;&quot;;&quot;&quot;;LOOKUP(8;[Padrões.$D$21:.$D$24];[Padrões.V$21:.V$24]))" office:value-type="string" office:string-value="SI" calcext:value-type="string">
            <text:p>SI</text:p>
          </table:table-cell>
          <table:table-cell table:style-name="ce328" table:formula="of:=IF([.$B121]=&quot;&quot;;&quot;&quot;;LOOKUP(8;[Padrões.$D$21:.$D$24];[Padrões.W$21:.W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X$21:.X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Y$21:.Y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Z$21:.Z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A$21:.AA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B$21:.AB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C$21:.AC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D$21:.AD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E$21:.AE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F$21:.AF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G$21:.AG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H$21:.AH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I$21:.AI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J$21:.AJ$24]))" office:value-type="string" office:string-value="%" calcext:value-type="string">
            <text:p>%</text:p>
          </table:table-cell>
          <table:table-cell table:style-name="ce328" table:formula="of:=IF([.$B121]=&quot;&quot;;&quot;&quot;;LOOKUP(8;[Padrões.$D$21:.$D$24];[Padrões.AK$21:.AK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L$21:.AL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M$21:.AM$24]))" office:value-type="float" office:value="0" calcext:value-type="float">
            <text:p/>
          </table:table-cell>
          <table:table-cell table:style-name="ce241" table:formula="of:=[.H121]-NOW()" office:value-type="float" office:value="674.451164781778" calcext:value-type="float">
            <text:p>674,451164781778</text:p>
          </table:table-cell>
          <table:table-cell table:style-name="ce856" table:formula="of:=IF([.AB121]&gt;0;&quot;Em Dia&quot;;&quot;Vencido&quot;)" office:value-type="string" office:string-value="Em Dia" calcext:value-type="string">
            <text:p>Em Dia</text:p>
          </table:table-cell>
          <table:table-cell table:number-columns-repeated="9"/>
          <table:table-cell table:style-name="ce1" table:number-columns-repeated="16346"/>
        </table:table-row>
        <table:table-row table:style-name="ro17">
          <table:table-cell table:number-columns-repeated="2"/>
          <table:table-cell table:style-name="ce773"/>
          <table:table-cell table:style-name="ce226" table:number-columns-repeated="4"/>
          <table:table-cell table:number-columns-repeated="6"/>
          <table:table-cell table:style-name="ce682" table:content-validation-name="val17"/>
          <table:table-cell table:style-name="ce314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3"/>
          <table:table-cell table:style-name="ce356" table:formula="of:=LOOKUP(&quot;Vencido&quot;;[.AC119:.AC121];[.AB119:.AB121])" office:value-type="float" office:value="674.451164781778" calcext:value-type="float" table:number-columns-spanned="2" table:number-rows-spanned="2">
            <text:p>674,451164781778</text:p>
          </table:table-cell>
          <table:covered-table-cell/>
          <table:table-cell table:number-columns-repeated="9"/>
          <table:table-cell table:style-name="ce1" table:number-columns-repeated="16346"/>
        </table:table-row>
        <table:table-row table:style-name="ro17">
          <table:table-cell table:number-columns-repeated="2"/>
          <table:table-cell table:style-name="ce773"/>
          <table:table-cell table:style-name="ce226" table:number-columns-repeated="4"/>
          <table:table-cell table:number-columns-repeated="6"/>
          <table:table-cell table:style-name="ce682" table:content-validation-name="val17"/>
          <table:table-cell table:style-name="ce315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3"/>
          <table:covered-table-cell table:number-columns-repeated="2"/>
          <table:table-cell table:number-columns-repeated="9"/>
          <table:table-cell table:style-name="ce1" table:number-columns-repeated="16346"/>
        </table:table-row>
        <table:table-row table:style-name="ro17">
          <table:table-cell table:number-columns-repeated="2"/>
          <table:table-cell table:style-name="ce773"/>
          <table:table-cell table:style-name="ce226" table:number-columns-repeated="4"/>
          <table:table-cell table:number-columns-repeated="6"/>
          <table:table-cell table:style-name="ce682" table:content-validation-name="val17"/>
          <table:table-cell table:style-name="ce315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17">
          <table:table-cell table:number-columns-repeated="13"/>
          <table:table-cell table:style-name="ce683" table:content-validation-name="val17"/>
          <table:table-cell table:style-name="ce316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17">
          <table:table-cell table:number-columns-repeated="13"/>
          <table:table-cell table:style-name="ce683" table:content-validation-name="val17"/>
          <table:table-cell table:style-name="ce317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86" table:number-columns-spanned="2" table:number-rows-spanned="1"/>
          <table:covered-table-cell/>
          <table:table-cell table:style-name="ce318"/>
          <table:table-cell table:style-name="ce317" table:number-columns-repeated="4"/>
          <table:table-cell table:style-name="ce319"/>
          <table:table-cell table:style-name="ce320"/>
          <table:table-cell table:style-name="ce682"/>
          <table:table-cell table:style-name="ce321"/>
          <table:table-cell table:number-columns-repeated="14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86" table:number-columns-spanned="2" table:number-rows-spanned="1"/>
          <table:covered-table-cell/>
          <table:table-cell table:style-name="ce322"/>
          <table:table-cell table:style-name="ce317" table:number-columns-repeated="4"/>
          <table:table-cell table:style-name="ce319"/>
          <table:table-cell table:style-name="ce320"/>
          <table:table-cell table:style-name="ce317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86" table:number-columns-spanned="2" table:number-rows-spanned="1"/>
          <table:covered-table-cell/>
          <table:table-cell table:style-name="ce683"/>
          <table:table-cell table:style-name="ce317" table:number-columns-repeated="3"/>
          <table:table-cell table:style-name="ce86" table:number-columns-spanned="2" table:number-rows-spanned="1"/>
          <table:covered-table-cell/>
          <table:table-cell table:style-name="ce323"/>
          <table:table-cell table:style-name="ce324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86" table:number-columns-spanned="2" table:number-rows-spanned="1"/>
          <table:covered-table-cell/>
          <table:table-cell table:style-name="ce683"/>
          <table:table-cell table:style-name="ce317" table:number-columns-repeated="3"/>
          <table:table-cell table:style-name="ce86" table:number-columns-spanned="2" table:number-rows-spanned="1"/>
          <table:covered-table-cell/>
          <table:table-cell table:style-name="ce325"/>
          <table:table-cell table:style-name="ce326"/>
          <table:table-cell table:style-name="ce317"/>
          <table:table-cell table:number-columns-repeated="14"/>
          <table:table-cell table:style-name="ce1" table:number-columns-repeated="16346"/>
        </table:table-row>
        <table:table-row table:style-name="ro9" table:number-rows-repeated="72">
          <table:table-cell table:number-columns-repeated="38"/>
          <table:table-cell table:style-name="ce1" table:number-columns-repeated="16346"/>
        </table:table-row>
        <table:table-row table:style-name="ro9">
          <table:table-cell table:style-name="ce357" office:value-type="string" calcext:value-type="string" table:number-columns-spanned="2" table:number-rows-spanned="1">
            <text:p>Percentual</text:p>
          </table:table-cell>
          <table:covered-table-cell/>
          <table:table-cell table:style-name="ce774" table:formula="of:=(#REF!/#REF!)*100" office:value-type="string" office:string-value="" calcext:value-type="error">
            <text:p>#REF!</text:p>
          </table:table-cell>
          <table:table-cell table:style-name="ce282" table:number-columns-repeated="3"/>
          <table:table-cell table:style-name="ce358" office:value-type="string" calcext:value-type="string" table:number-columns-spanned="2" table:number-rows-spanned="1">
            <text:p>U arredondado</text:p>
          </table:table-cell>
          <table:covered-table-cell/>
          <table:table-cell table:style-name="ce336" table:formula="of:=IF([.C203]&lt;=5;ROUND(#REF!;#REF!);ROUNDUP(#REF!;#REF!))" office:value-type="string" office:string-value="" calcext:value-type="error">
            <text:p>#REF!</text:p>
          </table:table-cell>
          <table:table-cell table:style-name="ce337" table:formula="of:=#REF!" office:value-type="string" office:string-value="" calcext:value-type="error">
            <text:p>#REF!</text:p>
          </table:table-cell>
          <table:table-cell table:style-name="ce338" table:number-columns-repeated="2"/>
          <table:table-cell table:number-columns-repeated="26"/>
          <table:table-cell table:style-name="ce1" table:number-columns-repeated="16346"/>
        </table:table-row>
        <table:table-row table:style-name="ro9" table:number-rows-repeated="1048372">
          <table:table-cell table:number-columns-repeated="38"/>
          <table:table-cell table:style-name="ce1" table:number-columns-repeated="16346"/>
        </table:table-row>
        <table:table-row table:style-name="ro9">
          <table:table-cell table:number-columns-repeated="38"/>
          <table:table-cell table:style-name="ce1" table:number-columns-repeated="16346"/>
        </table:table-row>
        <calcext:conditional-formats>
          <calcext:conditional-format calcext:target-range-address="Incerteza.L5:Incerteza.L10 Incerteza.Y5:Incerteza.Y10 Incerteza.L21:Incerteza.L26 Incerteza.Y21:Incerteza.Y26 Incerteza.L37:Incerteza.L42 Incerteza.Y37:Incerteza.Y42 Incerteza.L53:Incerteza.L58 Incerteza.Y53:Incerteza.Y58 Incerteza.L69:Incerteza.L74 Incerteza.Y69:Incerteza.Y74 Incerteza.L85:Incerteza.L90 Incerteza.Y85:Incerteza.Y90 Incerteza.L101:Incerteza.L106">
            <calcext:condition calcext:apply-style-name="cf16" calcext:value="&gt;0.1" calcext:base-cell-address="Incerteza.L5"/>
          </calcext:conditional-format>
          <calcext:conditional-format calcext:target-range-address="Incerteza.L14:Incerteza.L14 Incerteza.Y14:Incerteza.Y14 Incerteza.Y30:Incerteza.Y30 Incerteza.L46:Incerteza.L46 Incerteza.Y46:Incerteza.Y46 Incerteza.L62:Incerteza.L62 Incerteza.Y62:Incerteza.Y62 Incerteza.L78:Incerteza.L78 Incerteza.Y78:Incerteza.Y78 Incerteza.L94:Incerteza.L94 Incerteza.Y94:Incerteza.Y94 Incerteza.L110:Incerteza.L110">
            <calcext:condition calcext:apply-style-name="cf13" calcext:value="=100%" calcext:base-cell-address="Incerteza.L14"/>
            <calcext:condition calcext:apply-style-name="cf16" calcext:value="&lt;100%" calcext:base-cell-address="Incerteza.L14"/>
          </calcext:conditional-format>
          <calcext:conditional-format calcext:target-range-address="Incerteza.AC119:Incerteza.AC121">
            <calcext:condition calcext:apply-style-name="cf13" calcext:value="=&quot;Em Dia&quot;" calcext:base-cell-address="Incerteza.AC119"/>
            <calcext:condition calcext:apply-style-name="cf16" calcext:value="=&quot;Vencido&quot;" calcext:base-cell-address="Incerteza.AC119"/>
          </calcext:conditional-format>
        </calcext:conditional-formats>
      </table:table>
      <table:table table:name="Conversão" table:style-name="ta2">
        <table:table-column table:style-name="co56" table:default-cell-style-name="ce885"/>
        <table:table-column table:style-name="co57" table:default-cell-style-name="ce885"/>
        <table:table-column table:style-name="co58" table:default-cell-style-name="ce885"/>
        <table:table-column table:style-name="co56" table:number-columns-repeated="11" table:default-cell-style-name="ce885"/>
        <table:table-column table:style-name="co41" table:number-columns-repeated="5" table:default-cell-style-name="ce885"/>
        <table:table-column table:style-name="co41" table:number-columns-repeated="16365"/>
        <table:table-row table:style-name="ro18">
          <table:table-cell table:number-columns-repeated="19"/>
          <table:table-cell table:style-name="ce885" table:number-columns-repeated="16365"/>
        </table:table-row>
        <table:table-row table:style-name="ro18">
          <table:table-cell table:style-name="ce886" office:value-type="string" calcext:value-type="string" table:number-columns-spanned="14" table:number-rows-spanned="2">
            <text:p>TABELA DE CONVERSÃO DE UNIDADES DE PRESSÃO</text:p>
          </table:table-cell>
          <table:covered-table-cell table:number-columns-repeated="13"/>
          <table:table-cell table:number-columns-repeated="5"/>
          <table:table-cell table:style-name="ce885" table:number-columns-repeated="16365"/>
        </table:table-row>
        <table:table-row table:style-name="ro18">
          <table:covered-table-cell table:number-columns-repeated="14"/>
          <table:table-cell table:number-columns-repeated="5"/>
          <table:table-cell table:style-name="ce885" table:number-columns-repeated="16365"/>
        </table:table-row>
        <table:table-row table:style-name="ro18">
          <table:table-cell table:style-name="ce887" office:value-type="string" calcext:value-type="string">
            <text:p>Fator</text:p>
          </table:table-cell>
          <table:table-cell table:style-name="ce892" office:value-type="string" calcext:value-type="string">
            <text:p>Coluna</text:p>
          </table:table-cell>
          <table:table-cell table:style-name="ce892" office:value-type="string" calcext:value-type="string">
            <text:p>LINHA</text:p>
          </table:table-cell>
          <table:table-cell table:style-name="ce895" table:formula="of:=IF([.D5]=1;&quot;D&quot;;&quot;&quot;)">
            <text:p/>
          </table:table-cell>
          <table:table-cell table:style-name="ce895" table:formula="of:=IF([.E5]=1;&quot;E&quot;;&quot;&quot;)">
            <text:p/>
          </table:table-cell>
          <table:table-cell table:style-name="ce895" table:formula="of:=IF([.F5]=1;&quot;F&quot;;&quot;&quot;)">
            <text:p/>
          </table:table-cell>
          <table:table-cell table:style-name="ce895" table:formula="of:=IF([.G5]=1;&quot;G&quot;;&quot;&quot;)">
            <text:p/>
          </table:table-cell>
          <table:table-cell table:style-name="ce895" table:formula="of:=IF([.H5]=1;&quot;H&quot;;&quot;&quot;)">
            <text:p/>
          </table:table-cell>
          <table:table-cell table:style-name="ce895" table:formula="of:=IF([.I5]=1;&quot;I&quot;;&quot;&quot;)">
            <text:p/>
          </table:table-cell>
          <table:table-cell table:style-name="ce895" table:formula="of:=IF([.J5]=1;&quot;J&quot;;&quot;&quot;)" office:value-type="string" office:string-value="J" calcext:value-type="string">
            <text:p>J</text:p>
          </table:table-cell>
          <table:table-cell table:style-name="ce895" table:formula="of:=IF([.K5]=1;&quot;K&quot;;&quot;&quot;)">
            <text:p/>
          </table:table-cell>
          <table:table-cell table:style-name="ce895" table:formula="of:=IF([.L5]=1;&quot;L&quot;;&quot;&quot;)">
            <text:p/>
          </table:table-cell>
          <table:table-cell table:style-name="ce895" table:formula="of:=IF([.M5]=1;&quot;M&quot;;&quot;&quot;)">
            <text:p/>
          </table:table-cell>
          <table:table-cell table:style-name="ce895" table:formula="of:=IF([.N5]=1;&quot;N&quot;;&quot;&quot;)">
            <text:p/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style-name="ce888" table:formula="of:=[.B5]&amp;[.C5]" office:value-type="string" office:string-value="J13" calcext:value-type="string">
            <text:p>J13</text:p>
          </table:table-cell>
          <table:table-cell table:style-name="ce888" table:formula="of:=LOOKUP(1;[.D5:.N5];[.D4:.N4])" office:value-type="string" office:string-value="J" calcext:value-type="string">
            <text:p>J</text:p>
          </table:table-cell>
          <table:table-cell table:style-name="ce888" table:formula="of:=VLOOKUP(1;[.A7:.B17];2;0)" office:value-type="float" office:value="13" calcext:value-type="float">
            <text:p>13</text:p>
          </table:table-cell>
          <table:table-cell table:formula="of:=IF([$Planilha.$C$46]=[.D6];1;&quot;&quot;)">
            <text:p/>
          </table:table-cell>
          <table:table-cell table:formula="of:=IF([$Planilha.$C$46]=[.E6];1;&quot;&quot;)">
            <text:p/>
          </table:table-cell>
          <table:table-cell table:formula="of:=IF([$Planilha.$C$46]=[.F6];1;&quot;&quot;)">
            <text:p/>
          </table:table-cell>
          <table:table-cell table:formula="of:=IF([$Planilha.$C$46]=[.G6];1;&quot;&quot;)">
            <text:p/>
          </table:table-cell>
          <table:table-cell table:formula="of:=IF([$Planilha.$C$46]=[.H6];1;&quot;&quot;)">
            <text:p/>
          </table:table-cell>
          <table:table-cell table:formula="of:=IF([$Planilha.$C$46]=[.I6];1;&quot;&quot;)">
            <text:p/>
          </table:table-cell>
          <table:table-cell table:style-name="ce896" table:formula="of:=IF([$Planilha.C46]=[.J6];1;&quot;&quot;)" office:value-type="float" office:value="1" calcext:value-type="float">
            <text:p>1</text:p>
          </table:table-cell>
          <table:table-cell table:style-name="ce896" table:formula="of:=IF([$Planilha.D46]=[.K6];1;&quot;&quot;)">
            <text:p/>
          </table:table-cell>
          <table:table-cell table:style-name="ce896" table:formula="of:=IF([$Planilha.E46]=[.L6];1;&quot;&quot;)">
            <text:p/>
          </table:table-cell>
          <table:table-cell table:style-name="ce896" table:formula="of:=IF([$Planilha.F46]=[.M6];1;&quot;&quot;)">
            <text:p/>
          </table:table-cell>
          <table:table-cell table:style-name="ce896" table:formula="of:=IF([$Planilha.G46]=[.N6];1;&quot;&quot;)">
            <text:p/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style-name="ce889" table:formula="of:=INDEX([.$D$7:.$N$17];[.C5]-6;COLUMN(INDIRECT([.B5]&amp;&quot;1&quot;))-3)" office:value-type="float" office:value="1" calcext:value-type="float">
            <text:p>1,00E+00</text:p>
          </table:table-cell>
          <table:table-cell table:style-name="ce893" office:value-type="string" calcext:value-type="string">
            <text:p>Unidade</text:p>
          </table:table-cell>
          <table:table-cell table:style-name="ce893"/>
          <table:table-cell table:style-name="ce894" office:value-type="string" calcext:value-type="string">
            <text:p>Pa</text:p>
          </table:table-cell>
          <table:table-cell table:style-name="ce894" office:value-type="string" calcext:value-type="string">
            <text:p>hPa</text:p>
          </table:table-cell>
          <table:table-cell table:style-name="ce894" office:value-type="string" calcext:value-type="string">
            <text:p>kPa</text:p>
          </table:table-cell>
          <table:table-cell table:style-name="ce894" office:value-type="string" calcext:value-type="string">
            <text:p>bar</text:p>
          </table:table-cell>
          <table:table-cell table:style-name="ce894" office:value-type="string" calcext:value-type="string">
            <text:p>mbar</text:p>
          </table:table-cell>
          <table:table-cell table:style-name="ce894" office:value-type="string" calcext:value-type="string">
            <text:p>psi</text:p>
          </table:table-cell>
          <table:table-cell table:style-name="ce894" office:value-type="string" calcext:value-type="string">
            <text:p>kgf/cm2</text:p>
          </table:table-cell>
          <table:table-cell table:style-name="ce894" office:value-type="string" calcext:value-type="string">
            <text:p>mm Hg</text:p>
          </table:table-cell>
          <table:table-cell table:style-name="ce894" office:value-type="string" calcext:value-type="string">
            <text:p>in Hg</text:p>
          </table:table-cell>
          <table:table-cell table:style-name="ce894" office:value-type="string" calcext:value-type="string">
            <text:p>m H2O</text:p>
          </table:table-cell>
          <table:table-cell table:style-name="ce894" office:value-type="string" calcext:value-type="string">
            <text:p>in H2O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7];1;&quot;&quot;)">
            <text:p/>
          </table:table-cell>
          <table:table-cell table:style-name="ce888" table:formula="of:=IF([.A7]=1;7;&quot;&quot;)">
            <text:p/>
          </table:table-cell>
          <table:table-cell table:style-name="ce894" office:value-type="string" calcext:value-type="string">
            <text:p>Pa</text:p>
          </table:table-cell>
          <table:table-cell table:style-name="ce896" office:value-type="float" office:value="1" calcext:value-type="float">
            <text:p>1</text:p>
          </table:table-cell>
          <table:table-cell table:style-name="ce897" office:value-type="float" office:value="0.01" calcext:value-type="float">
            <text:p>1,00E-02</text:p>
          </table:table-cell>
          <table:table-cell table:style-name="ce897" office:value-type="float" office:value="0.001" calcext:value-type="float">
            <text:p>1,00E-03</text:p>
          </table:table-cell>
          <table:table-cell table:style-name="ce897" office:value-type="float" office:value="0.00001" calcext:value-type="float">
            <text:p>1,00E-05</text:p>
          </table:table-cell>
          <table:table-cell table:style-name="ce897" office:value-type="float" office:value="0.01" calcext:value-type="float">
            <text:p>1,00E-02</text:p>
          </table:table-cell>
          <table:table-cell table:style-name="ce897" office:value-type="float" office:value="0.0001450377" calcext:value-type="float">
            <text:p>1,45E-04</text:p>
          </table:table-cell>
          <table:table-cell table:style-name="ce897" office:value-type="float" office:value="0.00001019716" calcext:value-type="float">
            <text:p>1,02E-05</text:p>
          </table:table-cell>
          <table:table-cell table:style-name="ce897" office:value-type="float" office:value="0.007500617" calcext:value-type="float">
            <text:p>7,50E-03</text:p>
          </table:table-cell>
          <table:table-cell table:style-name="ce897" office:value-type="float" office:value="0.0002953003" calcext:value-type="float">
            <text:p>2,95E-04</text:p>
          </table:table-cell>
          <table:table-cell table:style-name="ce897" office:value-type="float" office:value="0.0001019716" calcext:value-type="float">
            <text:p>1,02E-04</text:p>
          </table:table-cell>
          <table:table-cell table:style-name="ce897" office:value-type="float" office:value="0.004014531" calcext:value-type="float">
            <text:p>4,01E-03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8];1;&quot;&quot;)">
            <text:p/>
          </table:table-cell>
          <table:table-cell table:style-name="ce888" table:formula="of:=IF([.A8]=&quot;&quot;;&quot;&quot;;8)">
            <text:p/>
          </table:table-cell>
          <table:table-cell table:style-name="ce894" office:value-type="string" calcext:value-type="string">
            <text:p>hPa</text:p>
          </table:table-cell>
          <table:table-cell table:style-name="ce897" office:value-type="float" office:value="100" calcext:value-type="float">
            <text:p>1,00E+02</text:p>
          </table:table-cell>
          <table:table-cell table:style-name="ce896" office:value-type="float" office:value="1" calcext:value-type="float">
            <text:p>1</text:p>
          </table:table-cell>
          <table:table-cell table:style-name="ce897" office:value-type="float" office:value="10" calcext:value-type="float">
            <text:p>1,00E+01</text:p>
          </table:table-cell>
          <table:table-cell table:style-name="ce897" table:formula="of:=[.G7]*100" office:value-type="float" office:value="0.001" calcext:value-type="float">
            <text:p>1,00E-03</text:p>
          </table:table-cell>
          <table:table-cell table:style-name="ce897" table:formula="of:=[.H7]*100" office:value-type="float" office:value="1" calcext:value-type="float">
            <text:p>1,00E+00</text:p>
          </table:table-cell>
          <table:table-cell table:style-name="ce897" table:formula="of:=[.I7]*100" office:value-type="float" office:value="0.01450377" calcext:value-type="float">
            <text:p>1,45E-02</text:p>
          </table:table-cell>
          <table:table-cell table:style-name="ce897" table:formula="of:=[.J7]*100" office:value-type="float" office:value="0.001019716" calcext:value-type="float">
            <text:p>1,02E-03</text:p>
          </table:table-cell>
          <table:table-cell table:style-name="ce897" table:formula="of:=[.K7]*100" office:value-type="float" office:value="0.7500617" calcext:value-type="float">
            <text:p>7,50E-01</text:p>
          </table:table-cell>
          <table:table-cell table:style-name="ce897" table:formula="of:=[.L7]*100" office:value-type="float" office:value="0.02953003" calcext:value-type="float">
            <text:p>2,95E-02</text:p>
          </table:table-cell>
          <table:table-cell table:style-name="ce897" table:formula="of:=[.M7]*100" office:value-type="float" office:value="0.01019716" calcext:value-type="float">
            <text:p>1,02E-02</text:p>
          </table:table-cell>
          <table:table-cell table:style-name="ce897" table:formula="of:=[.N7]*100" office:value-type="float" office:value="0.4014531" calcext:value-type="float">
            <text:p>4,01E-01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9];1;&quot;&quot;)">
            <text:p/>
          </table:table-cell>
          <table:table-cell table:style-name="ce888" table:formula="of:=IF([.A9]=1;9;&quot;&quot;)">
            <text:p/>
          </table:table-cell>
          <table:table-cell table:style-name="ce894" office:value-type="string" calcext:value-type="string">
            <text:p>kPa</text:p>
          </table:table-cell>
          <table:table-cell table:style-name="ce897" office:value-type="float" office:value="1000" calcext:value-type="float">
            <text:p>1,00E+03</text:p>
          </table:table-cell>
          <table:table-cell table:style-name="ce897" office:value-type="float" office:value="10" calcext:value-type="float">
            <text:p>1,00E+01</text:p>
          </table:table-cell>
          <table:table-cell table:style-name="ce896" office:value-type="float" office:value="1" calcext:value-type="float">
            <text:p>1</text:p>
          </table:table-cell>
          <table:table-cell table:style-name="ce897" table:formula="of:=[.G7]*1000" office:value-type="float" office:value="0.01" calcext:value-type="float">
            <text:p>1,00E-02</text:p>
          </table:table-cell>
          <table:table-cell table:style-name="ce897" table:formula="of:=[.H7]*1000" office:value-type="float" office:value="10" calcext:value-type="float">
            <text:p>1,00E+01</text:p>
          </table:table-cell>
          <table:table-cell table:style-name="ce897" table:formula="of:=[.I7]*1000" office:value-type="float" office:value="0.1450377" calcext:value-type="float">
            <text:p>1,45E-01</text:p>
          </table:table-cell>
          <table:table-cell table:style-name="ce897" table:formula="of:=[.J7]*1000" office:value-type="float" office:value="0.01019716" calcext:value-type="float">
            <text:p>1,02E-02</text:p>
          </table:table-cell>
          <table:table-cell table:style-name="ce897" table:formula="of:=[.K7]*1000" office:value-type="float" office:value="7.500617" calcext:value-type="float">
            <text:p>7,50E+00</text:p>
          </table:table-cell>
          <table:table-cell table:style-name="ce897" table:formula="of:=[.L7]*1000" office:value-type="float" office:value="0.2953003" calcext:value-type="float">
            <text:p>2,95E-01</text:p>
          </table:table-cell>
          <table:table-cell table:style-name="ce897" table:formula="of:=[.M7]*1000" office:value-type="float" office:value="0.1019716" calcext:value-type="float">
            <text:p>1,02E-01</text:p>
          </table:table-cell>
          <table:table-cell table:style-name="ce897" table:formula="of:=[.N7]*1000" office:value-type="float" office:value="4.014531" calcext:value-type="float">
            <text:p>4,01E+00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10];1;&quot;&quot;)">
            <text:p/>
          </table:table-cell>
          <table:table-cell table:style-name="ce888" table:formula="of:=IF([.A10]=1;10;&quot;&quot;)">
            <text:p/>
          </table:table-cell>
          <table:table-cell table:style-name="ce894" office:value-type="string" calcext:value-type="string">
            <text:p>bar</text:p>
          </table:table-cell>
          <table:table-cell table:style-name="ce897" office:value-type="float" office:value="100000" calcext:value-type="float">
            <text:p>1,00E+05</text:p>
          </table:table-cell>
          <table:table-cell table:style-name="ce897" office:value-type="float" office:value="1000" calcext:value-type="float">
            <text:p>1,00E+03</text:p>
          </table:table-cell>
          <table:table-cell table:style-name="ce897" office:value-type="float" office:value="100" calcext:value-type="float">
            <text:p>1,00E+02</text:p>
          </table:table-cell>
          <table:table-cell table:style-name="ce896" office:value-type="float" office:value="1" calcext:value-type="float">
            <text:p>1</text:p>
          </table:table-cell>
          <table:table-cell table:style-name="ce897" office:value-type="float" office:value="0.001" calcext:value-type="float">
            <text:p>1,00E-03</text:p>
          </table:table-cell>
          <table:table-cell table:style-name="ce897" office:value-type="float" office:value="14.50377" calcext:value-type="float">
            <text:p>1,45E+01</text:p>
          </table:table-cell>
          <table:table-cell table:style-name="ce897" office:value-type="float" office:value="1.019716" calcext:value-type="float">
            <text:p>1,02E+00</text:p>
          </table:table-cell>
          <table:table-cell table:style-name="ce897" office:value-type="float" office:value="750.0627" calcext:value-type="float">
            <text:p>7,50E+02</text:p>
          </table:table-cell>
          <table:table-cell table:style-name="ce897" office:value-type="float" office:value="0.0002953003" calcext:value-type="float">
            <text:p>2,95E-04</text:p>
          </table:table-cell>
          <table:table-cell table:style-name="ce897" office:value-type="float" office:value="0.0001019716" calcext:value-type="float">
            <text:p>1,02E-04</text:p>
          </table:table-cell>
          <table:table-cell table:style-name="ce897" office:value-type="float" office:value="0.004014531" calcext:value-type="float">
            <text:p>4,01E-03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11];1;&quot;&quot;)">
            <text:p/>
          </table:table-cell>
          <table:table-cell table:style-name="ce888" table:formula="of:=IF([.A11]=1;11;&quot;&quot;)">
            <text:p/>
          </table:table-cell>
          <table:table-cell table:style-name="ce894" office:value-type="string" calcext:value-type="string">
            <text:p>mbar</text:p>
          </table:table-cell>
          <table:table-cell table:style-name="ce897" table:formula="of:=1/[.H7]" office:value-type="float" office:value="100" calcext:value-type="float">
            <text:p>1,00E+02</text:p>
          </table:table-cell>
          <table:table-cell table:style-name="ce897" table:formula="of:=[.D11]*100" office:value-type="float" office:value="10000" calcext:value-type="float">
            <text:p>1,00E+04</text:p>
          </table:table-cell>
          <table:table-cell table:style-name="ce897" table:formula="of:=[.D11]*1000" office:value-type="float" office:value="100000" calcext:value-type="float">
            <text:p>1,00E+05</text:p>
          </table:table-cell>
          <table:table-cell table:style-name="ce897" table:formula="of:=1/1000" office:value-type="float" office:value="0.001" calcext:value-type="float">
            <text:p>1,00E-03</text:p>
          </table:table-cell>
          <table:table-cell table:style-name="ce896" office:value-type="float" office:value="1" calcext:value-type="float">
            <text:p>1</text:p>
          </table:table-cell>
          <table:table-cell table:style-name="ce897" table:formula="of:=[.I10]/1000" office:value-type="float" office:value="0.01450377" calcext:value-type="float">
            <text:p>1,45E-02</text:p>
          </table:table-cell>
          <table:table-cell table:style-name="ce897" table:formula="of:=[.J10]/1000" office:value-type="float" office:value="0.001019716" calcext:value-type="float">
            <text:p>1,02E-03</text:p>
          </table:table-cell>
          <table:table-cell table:style-name="ce897" table:formula="of:=[.K10]/1000" office:value-type="float" office:value="0.7500627" calcext:value-type="float">
            <text:p>7,50E-01</text:p>
          </table:table-cell>
          <table:table-cell table:style-name="ce897" table:formula="of:=[.L10]/1000" office:value-type="float" office:value="0.0000002953003" calcext:value-type="float">
            <text:p>2,95E-07</text:p>
          </table:table-cell>
          <table:table-cell table:style-name="ce897" table:formula="of:=[.M10]/1000" office:value-type="float" office:value="0.0000001019716" calcext:value-type="float">
            <text:p>1,02E-07</text:p>
          </table:table-cell>
          <table:table-cell table:style-name="ce897" table:formula="of:=[.N10]/1000" office:value-type="float" office:value="0.000004014531" calcext:value-type="float">
            <text:p>4,01E-06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12];1;&quot;&quot;)">
            <text:p/>
          </table:table-cell>
          <table:table-cell table:style-name="ce888" table:formula="of:=IF([.A12]=1;12;&quot;&quot;)">
            <text:p/>
          </table:table-cell>
          <table:table-cell table:style-name="ce894" office:value-type="string" calcext:value-type="string">
            <text:p>psi</text:p>
          </table:table-cell>
          <table:table-cell table:style-name="ce897" table:formula="of:=1/[.I7]" office:value-type="float" office:value="6894.75908677537" calcext:value-type="float">
            <text:p>6,89E+03</text:p>
          </table:table-cell>
          <table:table-cell table:style-name="ce897" table:formula="of:=[.D12]*100" office:value-type="float" office:value="689475.908677537" calcext:value-type="float">
            <text:p>6,89E+05</text:p>
          </table:table-cell>
          <table:table-cell table:style-name="ce897" table:formula="of:=[.D12]*1000" office:value-type="float" office:value="6894759.08677537" calcext:value-type="float">
            <text:p>6,89E+06</text:p>
          </table:table-cell>
          <table:table-cell table:style-name="ce897" table:formula="of:=1/[.I10]" office:value-type="float" office:value="0.0689475908677537" calcext:value-type="float">
            <text:p>6,89E-02</text:p>
          </table:table-cell>
          <table:table-cell table:style-name="ce897" table:formula="of:=1/[.I11]" office:value-type="float" office:value="68.9475908677537" calcext:value-type="float">
            <text:p>6,89E+01</text:p>
          </table:table-cell>
          <table:table-cell table:style-name="ce896" office:value-type="float" office:value="1" calcext:value-type="float">
            <text:p>1</text:p>
          </table:table-cell>
          <table:table-cell table:style-name="ce897" office:value-type="float" office:value="0.07030696" calcext:value-type="float">
            <text:p>7,03E-02</text:p>
          </table:table-cell>
          <table:table-cell table:style-name="ce897" office:value-type="float" office:value="51.715" calcext:value-type="float">
            <text:p>5,17E+01</text:p>
          </table:table-cell>
          <table:table-cell table:style-name="ce897" office:value-type="float" office:value="2.036024" calcext:value-type="float">
            <text:p>2,04E+00</text:p>
          </table:table-cell>
          <table:table-cell table:style-name="ce897" office:value-type="float" office:value="0.7030696" calcext:value-type="float">
            <text:p>7,03E-01</text:p>
          </table:table-cell>
          <table:table-cell table:style-name="ce897" office:value-type="float" office:value="27.6799" calcext:value-type="float">
            <text:p>2,77E+01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13];1;&quot;&quot;)" office:value-type="float" office:value="1" calcext:value-type="float">
            <text:p>1</text:p>
          </table:table-cell>
          <table:table-cell table:style-name="ce888" table:formula="of:=IF([.A13]=1;13;&quot;&quot;)" office:value-type="float" office:value="13" calcext:value-type="float">
            <text:p>13</text:p>
          </table:table-cell>
          <table:table-cell table:style-name="ce894" office:value-type="string" calcext:value-type="string">
            <text:p>kgf/cm2</text:p>
          </table:table-cell>
          <table:table-cell table:style-name="ce897" table:formula="of:=1/[.J7]" office:value-type="float" office:value="98066.5204821735" calcext:value-type="float">
            <text:p>9,81E+04</text:p>
          </table:table-cell>
          <table:table-cell table:style-name="ce897" table:formula="of:=[.D13]/100" office:value-type="float" office:value="980.665204821735" calcext:value-type="float">
            <text:p>9,81E+02</text:p>
          </table:table-cell>
          <table:table-cell table:style-name="ce897" table:formula="of:=[.D13]/1000" office:value-type="float" office:value="98.0665204821735" calcext:value-type="float">
            <text:p>9,81E+01</text:p>
          </table:table-cell>
          <table:table-cell table:style-name="ce897" table:formula="of:=1/[.J10]" office:value-type="float" office:value="0.980665204821735" calcext:value-type="float">
            <text:p>9,81E-01</text:p>
          </table:table-cell>
          <table:table-cell table:style-name="ce897" table:formula="of:=[.G13]*1000" office:value-type="float" office:value="980.665204821735" calcext:value-type="float">
            <text:p>9,81E+02</text:p>
          </table:table-cell>
          <table:table-cell table:style-name="ce897" table:formula="of:=1/[.J12]" office:value-type="float" office:value="14.2233428952127" calcext:value-type="float">
            <text:p>1,42E+01</text:p>
          </table:table-cell>
          <table:table-cell table:style-name="ce896" office:value-type="float" office:value="1" calcext:value-type="float">
            <text:p>1</text:p>
          </table:table-cell>
          <table:table-cell table:style-name="ce897" office:value-type="float" office:value="735.5602" calcext:value-type="float">
            <text:p>7,36E+02</text:p>
          </table:table-cell>
          <table:table-cell table:style-name="ce897" office:value-type="float" office:value="28.95906" calcext:value-type="float">
            <text:p>2,90E+01</text:p>
          </table:table-cell>
          <table:table-cell table:style-name="ce897" office:value-type="float" office:value="10" calcext:value-type="float">
            <text:p>1,00E+01</text:p>
          </table:table-cell>
          <table:table-cell table:style-name="ce897" office:value-type="float" office:value="393.7008" calcext:value-type="float">
            <text:p>3,94E+02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14];1;&quot;&quot;)">
            <text:p/>
          </table:table-cell>
          <table:table-cell table:style-name="ce888" table:formula="of:=IF([.A14]=1;14;&quot;&quot;)">
            <text:p/>
          </table:table-cell>
          <table:table-cell table:style-name="ce894" office:value-type="string" calcext:value-type="string">
            <text:p>mm Hg</text:p>
          </table:table-cell>
          <table:table-cell table:style-name="ce897" table:formula="of:=1/[.K7]" office:value-type="float" office:value="133.322365346744" calcext:value-type="float">
            <text:p>1,33E+02</text:p>
          </table:table-cell>
          <table:table-cell table:style-name="ce897" table:formula="of:=1/[.K8]" office:value-type="float" office:value="1.33322365346744" calcext:value-type="float">
            <text:p>1,33E+00</text:p>
          </table:table-cell>
          <table:table-cell table:style-name="ce897" table:formula="of:=1/[.K9]" office:value-type="float" office:value="0.133322365346744" calcext:value-type="float">
            <text:p>1,33E-01</text:p>
          </table:table-cell>
          <table:table-cell table:style-name="ce897" table:formula="of:=1/[.K10]" office:value-type="float" office:value="0.0013332218759845" calcext:value-type="float">
            <text:p>1,33E-03</text:p>
          </table:table-cell>
          <table:table-cell table:style-name="ce897" table:formula="of:=[.K11]" office:value-type="float" office:value="0.7500627" calcext:value-type="float">
            <text:p>7,50E-01</text:p>
          </table:table-cell>
          <table:table-cell table:style-name="ce897" table:formula="of:=1/[.K12]" office:value-type="float" office:value="0.0193367494924103" calcext:value-type="float">
            <text:p>1,93E-02</text:p>
          </table:table-cell>
          <table:table-cell table:style-name="ce897" table:formula="of:=1/[.K13]" office:value-type="float" office:value="0.0013595080321094" calcext:value-type="float">
            <text:p>1,36E-03</text:p>
          </table:table-cell>
          <table:table-cell table:style-name="ce896" office:value-type="float" office:value="1" calcext:value-type="float">
            <text:p>1</text:p>
          </table:table-cell>
          <table:table-cell table:style-name="ce897" office:value-type="float" office:value="393.7008" calcext:value-type="float">
            <text:p>3,94E+02</text:p>
          </table:table-cell>
          <table:table-cell table:style-name="ce897" office:value-type="float" office:value="0.01359508" calcext:value-type="float">
            <text:p>1,36E-02</text:p>
          </table:table-cell>
          <table:table-cell table:style-name="ce897" office:value-type="float" office:value="0.5352394" calcext:value-type="float">
            <text:p>5,35E-01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15];1;&quot;&quot;)">
            <text:p/>
          </table:table-cell>
          <table:table-cell table:style-name="ce888" table:formula="of:=IF([.A15]=1;15;&quot;&quot;)">
            <text:p/>
          </table:table-cell>
          <table:table-cell table:style-name="ce894" office:value-type="string" calcext:value-type="string">
            <text:p>in Hg</text:p>
          </table:table-cell>
          <table:table-cell table:style-name="ce897" table:formula="of:=1/[.L7]" office:value-type="float" office:value="3386.38328508302" calcext:value-type="float">
            <text:p>3,39E+03</text:p>
          </table:table-cell>
          <table:table-cell table:style-name="ce897" table:formula="of:=1/[.L8]" office:value-type="float" office:value="33.8638328508302" calcext:value-type="float">
            <text:p>3,39E+01</text:p>
          </table:table-cell>
          <table:table-cell table:style-name="ce897" table:formula="of:=1/[.L9]" office:value-type="float" office:value="3.38638328508302" calcext:value-type="float">
            <text:p>3,39E+00</text:p>
          </table:table-cell>
          <table:table-cell table:style-name="ce897" table:formula="of:=1/[.L10]" office:value-type="float" office:value="3386.38328508302" calcext:value-type="float">
            <text:p>3,39E+03</text:p>
          </table:table-cell>
          <table:table-cell table:style-name="ce897" table:formula="of:=[.L11]" office:value-type="float" office:value="0.0000002953003" calcext:value-type="float">
            <text:p>2,95E-07</text:p>
          </table:table-cell>
          <table:table-cell table:style-name="ce897" table:formula="of:=1/[.L12]" office:value-type="float" office:value="0.491153345933054" calcext:value-type="float">
            <text:p>4,91E-01</text:p>
          </table:table-cell>
          <table:table-cell table:style-name="ce897" table:formula="of:=1/[.L13]" office:value-type="float" office:value="0.0345315075834644" calcext:value-type="float">
            <text:p>3,45E-02</text:p>
          </table:table-cell>
          <table:table-cell table:style-name="ce897" table:formula="of:=1/[.L14]" office:value-type="float" office:value="0.00253999991872" calcext:value-type="float">
            <text:p>2,54E-03</text:p>
          </table:table-cell>
          <table:table-cell table:style-name="ce896" office:value-type="float" office:value="1" calcext:value-type="float">
            <text:p>1</text:p>
          </table:table-cell>
          <table:table-cell table:style-name="ce897" office:value-type="float" office:value="0.345315" calcext:value-type="float">
            <text:p>3,45E-01</text:p>
          </table:table-cell>
          <table:table-cell table:style-name="ce897" office:value-type="float" office:value="13.59508" calcext:value-type="float">
            <text:p>1,36E+01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16];1;&quot;&quot;)">
            <text:p/>
          </table:table-cell>
          <table:table-cell table:style-name="ce888" table:formula="of:=IF([.A16]=1;16;&quot;&quot;)">
            <text:p/>
          </table:table-cell>
          <table:table-cell table:style-name="ce894" office:value-type="string" calcext:value-type="string">
            <text:p>m H2O</text:p>
          </table:table-cell>
          <table:table-cell table:style-name="ce897" table:formula="of:=1/[.M7]" office:value-type="float" office:value="9806.65204821735" calcext:value-type="float">
            <text:p>9,81E+03</text:p>
          </table:table-cell>
          <table:table-cell table:style-name="ce897" table:formula="of:=1/[.M8]" office:value-type="float" office:value="98.0665204821735" calcext:value-type="float">
            <text:p>9,81E+01</text:p>
          </table:table-cell>
          <table:table-cell table:style-name="ce897" table:formula="of:=1/[.M9]" office:value-type="float" office:value="9.80665204821735" calcext:value-type="float">
            <text:p>9,81E+00</text:p>
          </table:table-cell>
          <table:table-cell table:style-name="ce897" table:formula="of:=1/[.M10]" office:value-type="float" office:value="9806.65204821735" calcext:value-type="float">
            <text:p>9,81E+03</text:p>
          </table:table-cell>
          <table:table-cell table:style-name="ce897" table:formula="of:=[.M11]" office:value-type="float" office:value="0.0000001019716" calcext:value-type="float">
            <text:p>1,02E-07</text:p>
          </table:table-cell>
          <table:table-cell table:style-name="ce897" table:formula="of:=1/[.M12]" office:value-type="float" office:value="1.42233428952127" calcext:value-type="float">
            <text:p>1,42E+00</text:p>
          </table:table-cell>
          <table:table-cell table:style-name="ce897" table:formula="of:=1/[.M13]" office:value-type="float" office:value="0.1" calcext:value-type="float">
            <text:p>1,00E-01</text:p>
          </table:table-cell>
          <table:table-cell table:style-name="ce897" table:formula="of:=1/[.M14]" office:value-type="float" office:value="73.5560217372755" calcext:value-type="float">
            <text:p>7,36E+01</text:p>
          </table:table-cell>
          <table:table-cell table:style-name="ce897" table:formula="of:=1/[.L15]/[.M15]" office:value-type="float" office:value="2.89590663597006" calcext:value-type="float">
            <text:p>2,90E+00</text:p>
          </table:table-cell>
          <table:table-cell table:style-name="ce896" office:value-type="float" office:value="1" calcext:value-type="float">
            <text:p>1</text:p>
          </table:table-cell>
          <table:table-cell table:style-name="ce897" office:value-type="float" office:value="39.37008" calcext:value-type="float">
            <text:p>3,94E+01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17];1;&quot;&quot;)">
            <text:p/>
          </table:table-cell>
          <table:table-cell table:style-name="ce888" table:formula="of:=IF([.A17]=1;17;&quot;&quot;)">
            <text:p/>
          </table:table-cell>
          <table:table-cell table:style-name="ce894" office:value-type="string" calcext:value-type="string">
            <text:p>in H2O</text:p>
          </table:table-cell>
          <table:table-cell table:style-name="ce897" table:formula="of:=1/[.N7]" office:value-type="float" office:value="249.095099776288" calcext:value-type="float">
            <text:p>2,49E+02</text:p>
          </table:table-cell>
          <table:table-cell table:style-name="ce897" table:formula="of:=1/[.N8]" office:value-type="float" office:value="2.49095099776288" calcext:value-type="float">
            <text:p>2,49E+00</text:p>
          </table:table-cell>
          <table:table-cell table:style-name="ce897" table:formula="of:=1/[.N9]" office:value-type="float" office:value="0.249095099776288" calcext:value-type="float">
            <text:p>2,49E-01</text:p>
          </table:table-cell>
          <table:table-cell table:style-name="ce897" table:formula="of:=1/[.N10]" office:value-type="float" office:value="249.095099776288" calcext:value-type="float">
            <text:p>2,49E+02</text:p>
          </table:table-cell>
          <table:table-cell table:style-name="ce897" table:formula="of:=1/[.N11]" office:value-type="float" office:value="249095.099776288" calcext:value-type="float">
            <text:p>2,49E+05</text:p>
          </table:table-cell>
          <table:table-cell table:style-name="ce897" table:formula="of:=1/[.N12]" office:value-type="float" office:value="0.0361272981477534" calcext:value-type="float">
            <text:p>3,61E-02</text:p>
          </table:table-cell>
          <table:table-cell table:style-name="ce897" table:formula="of:=1/[.N13]" office:value-type="float" office:value="0.00253999991872" calcext:value-type="float">
            <text:p>2,54E-03</text:p>
          </table:table-cell>
          <table:table-cell table:style-name="ce897" table:formula="of:=1/[.N14]" office:value-type="float" office:value="1.86832284768274" calcext:value-type="float">
            <text:p>1,87E+00</text:p>
          </table:table-cell>
          <table:table-cell table:style-name="ce897" table:formula="of:=1/[.N15]" office:value-type="float" office:value="0.0735560217372756" calcext:value-type="float">
            <text:p>7,36E-02</text:p>
          </table:table-cell>
          <table:table-cell table:style-name="ce897" table:formula="of:=1/[.N16]" office:value-type="float" office:value="0.0253999991872" calcext:value-type="float">
            <text:p>2,54E-02</text:p>
          </table:table-cell>
          <table:table-cell table:style-name="ce896" office:value-type="float" office:value="1" calcext:value-type="float">
            <text:p>1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number-columns-repeated="19"/>
          <table:table-cell table:style-name="ce885" table:number-columns-repeated="16365"/>
        </table:table-row>
        <table:table-row table:style-name="ro18">
          <table:table-cell table:style-name="ce890" table:number-columns-spanned="3" table:number-rows-spanned="1"/>
          <table:covered-table-cell table:number-columns-repeated="2"/>
          <table:table-cell table:style-name="ce898" office:value-type="string" calcext:value-type="string">
            <text:p>Classe</text:p>
          </table:table-cell>
          <table:table-cell table:style-name="ce901" office:value-type="string" calcext:value-type="string">
            <text:p>EMP</text:p>
          </table:table-cell>
          <table:table-cell table:style-name="ce898" office:value-type="string" calcext:value-type="string">
            <text:p>Classe</text:p>
          </table:table-cell>
          <table:table-cell table:style-name="ce890" table:number-columns-spanned="3" table:number-rows-spanned="1"/>
          <table:covered-table-cell table:number-columns-repeated="2"/>
          <table:table-cell table:number-columns-repeated="10"/>
          <table:table-cell table:style-name="ce885" table:number-columns-repeated="16365"/>
        </table:table-row>
        <table:table-row table:style-name="ro18">
          <table:table-cell table:style-name="ce891" office:value-type="string" calcext:value-type="string" table:number-columns-spanned="3" table:number-rows-spanned="6">
            <text:p>Fundo de Escala</text:p>
          </table:table-cell>
          <table:covered-table-cell table:number-columns-repeated="2"/>
          <table:table-cell table:style-name="ce899" office:value-type="string" calcext:value-type="string">
            <text:p>5A</text:p>
          </table:table-cell>
          <table:table-cell table:style-name="ce902" office:value-type="float" office:value="0" calcext:value-type="float">
            <text:p>0,0000</text:p>
          </table:table-cell>
          <table:table-cell table:style-name="ce899" office:value-type="string" calcext:value-type="string">
            <text:p>5AR</text:p>
          </table:table-cell>
          <table:table-cell table:style-name="ce904" office:value-type="string" calcext:value-type="string" table:number-columns-spanned="3" table:number-rows-spanned="6">
            <text:p>Valor de Indicação</text:p>
          </table:table-cell>
          <table:covered-table-cell table:number-columns-repeated="2"/>
          <table:table-cell table:number-columns-repeated="10"/>
          <table:table-cell table:style-name="ce885" table:number-columns-repeated="16365"/>
        </table:table-row>
        <table:table-row table:style-name="ro18">
          <table:covered-table-cell table:number-columns-repeated="3"/>
          <table:table-cell table:style-name="ce899" office:value-type="string" calcext:value-type="string">
            <text:p>5A</text:p>
          </table:table-cell>
          <table:table-cell table:style-name="ce902" office:value-type="float" office:value="0.0001" calcext:value-type="float">
            <text:p>0,0001</text:p>
          </table:table-cell>
          <table:table-cell table:style-name="ce899" office:value-type="string" calcext:value-type="string">
            <text:p>5AR</text:p>
          </table:table-cell>
          <table:covered-table-cell table:number-columns-repeated="3"/>
          <table:table-cell table:number-columns-repeated="10"/>
          <table:table-cell table:style-name="ce885" table:number-columns-repeated="16365"/>
        </table:table-row>
        <table:table-row table:style-name="ro18">
          <table:covered-table-cell table:number-columns-repeated="3"/>
          <table:table-cell table:style-name="ce899" office:value-type="string" calcext:value-type="string">
            <text:p>5A</text:p>
          </table:table-cell>
          <table:table-cell table:style-name="ce902" office:value-type="float" office:value="0.0002" calcext:value-type="float">
            <text:p>0,0002</text:p>
          </table:table-cell>
          <table:table-cell table:style-name="ce899" office:value-type="string" calcext:value-type="string">
            <text:p>5AR</text:p>
          </table:table-cell>
          <table:covered-table-cell table:number-columns-repeated="3"/>
          <table:table-cell table:number-columns-repeated="10"/>
          <table:table-cell table:style-name="ce885" table:number-columns-repeated="16365"/>
        </table:table-row>
        <table:table-row table:style-name="ro18">
          <table:covered-table-cell table:number-columns-repeated="3"/>
          <table:table-cell table:style-name="ce899" office:value-type="string" calcext:value-type="string">
            <text:p>5A</text:p>
          </table:table-cell>
          <table:table-cell table:style-name="ce902" office:value-type="float" office:value="0.0003" calcext:value-type="float">
            <text:p>0,0003</text:p>
          </table:table-cell>
          <table:table-cell table:style-name="ce899" office:value-type="string" calcext:value-type="string">
            <text:p>5AR</text:p>
          </table:table-cell>
          <table:covered-table-cell table:number-columns-repeated="3"/>
          <table:table-cell table:number-columns-repeated="10"/>
          <table:table-cell table:style-name="ce885" table:number-columns-repeated="16365"/>
        </table:table-row>
        <table:table-row table:style-name="ro18">
          <table:covered-table-cell table:number-columns-repeated="3"/>
          <table:table-cell table:style-name="ce899" office:value-type="string" calcext:value-type="string">
            <text:p>5A</text:p>
          </table:table-cell>
          <table:table-cell table:style-name="ce902" office:value-type="float" office:value="0.0004" calcext:value-type="float">
            <text:p>0,0004</text:p>
          </table:table-cell>
          <table:table-cell table:style-name="ce899" office:value-type="string" calcext:value-type="string">
            <text:p>5AR</text:p>
          </table:table-cell>
          <table:covered-table-cell table:number-columns-repeated="3"/>
          <table:table-cell table:number-columns-repeated="10"/>
          <table:table-cell table:style-name="ce885" table:number-columns-repeated="16365"/>
        </table:table-row>
        <table:table-row table:style-name="ro18">
          <table:covered-table-cell table:number-columns-repeated="3"/>
          <table:table-cell table:style-name="ce899" office:value-type="string" calcext:value-type="string">
            <text:p>5A</text:p>
          </table:table-cell>
          <table:table-cell table:style-name="ce902" office:value-type="float" office:value="0.0005" calcext:value-type="float">
            <text:p>0,0005</text:p>
          </table:table-cell>
          <table:table-cell table:style-name="ce899" office:value-type="string" calcext:value-type="string">
            <text:p>5AR</text:p>
          </table:table-cell>
          <table:covered-table-cell table:number-columns-repeated="3"/>
          <table:table-cell table:number-columns-repeated="10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4A</text:p>
          </table:table-cell>
          <table:table-cell table:style-name="ce903" office:value-type="float" office:value="0.0006" calcext:value-type="float">
            <text:p>0,0006</text:p>
          </table:table-cell>
          <table:table-cell table:style-name="ce900" office:value-type="string" calcext:value-type="string">
            <text:p>4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4A</text:p>
          </table:table-cell>
          <table:table-cell table:style-name="ce903" office:value-type="float" office:value="0.0007" calcext:value-type="float">
            <text:p>0,0007</text:p>
          </table:table-cell>
          <table:table-cell table:style-name="ce900" office:value-type="string" calcext:value-type="string">
            <text:p>4AR</text:p>
          </table:table-cell>
          <table:table-cell table:number-columns-repeated="2"/>
          <table:table-cell table:style-name="ce906"/>
          <table:table-cell table:number-columns-repeated="10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4A</text:p>
          </table:table-cell>
          <table:table-cell table:style-name="ce903" office:value-type="float" office:value="0.0008" calcext:value-type="float">
            <text:p>0,0008</text:p>
          </table:table-cell>
          <table:table-cell table:style-name="ce900" office:value-type="string" calcext:value-type="string">
            <text:p>4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4A</text:p>
          </table:table-cell>
          <table:table-cell table:style-name="ce903" office:value-type="float" office:value="0.0009" calcext:value-type="float">
            <text:p>0,0009</text:p>
          </table:table-cell>
          <table:table-cell table:style-name="ce900" office:value-type="string" calcext:value-type="string">
            <text:p>4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4A</text:p>
          </table:table-cell>
          <table:table-cell table:style-name="ce903" office:value-type="float" office:value="0.001" calcext:value-type="float">
            <text:p>0,0010</text:p>
          </table:table-cell>
          <table:table-cell table:style-name="ce900" office:value-type="string" calcext:value-type="string">
            <text:p>4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1" calcext:value-type="float">
            <text:p>0,0011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2" calcext:value-type="float">
            <text:p>0,0012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3" calcext:value-type="float">
            <text:p>0,0013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4" calcext:value-type="float">
            <text:p>0,0014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5" calcext:value-type="float">
            <text:p>0,0015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6" calcext:value-type="float">
            <text:p>0,0016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7" calcext:value-type="float">
            <text:p>0,0017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8" calcext:value-type="float">
            <text:p>0,0018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9" calcext:value-type="float">
            <text:p>0,0019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2" calcext:value-type="float">
            <text:p>0,0020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22" calcext:value-type="float">
            <text:p>0,0022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23" calcext:value-type="float">
            <text:p>0,0023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24" calcext:value-type="float">
            <text:p>0,0024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25" calcext:value-type="float">
            <text:p>0,0025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26" calcext:value-type="float">
            <text:p>0,0026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27" calcext:value-type="float">
            <text:p>0,0027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28" calcext:value-type="float">
            <text:p>0,0028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29" calcext:value-type="float">
            <text:p>0,0029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" calcext:value-type="float">
            <text:p>0,0030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1" calcext:value-type="float">
            <text:p>0,0031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2" calcext:value-type="float">
            <text:p>0,0032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3" calcext:value-type="float">
            <text:p>0,0033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4" calcext:value-type="float">
            <text:p>0,0034</text:p>
          </table:table-cell>
          <table:table-cell table:style-name="ce900" office:value-type="string" calcext:value-type="string">
            <text:p>2AR</text:p>
          </table:table-cell>
          <table:table-cell/>
          <table:table-cell table:style-name="ce905"/>
          <table:table-cell table:style-name="ce907"/>
          <table:table-cell table:number-columns-repeated="10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5" calcext:value-type="float">
            <text:p>0,0035</text:p>
          </table:table-cell>
          <table:table-cell table:style-name="ce900" office:value-type="string" calcext:value-type="string">
            <text:p>2AR</text:p>
          </table:table-cell>
          <table:table-cell/>
          <table:table-cell table:style-name="ce905"/>
          <table:table-cell table:style-name="ce907"/>
          <table:table-cell table:number-columns-repeated="10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6" calcext:value-type="float">
            <text:p>0,0036</text:p>
          </table:table-cell>
          <table:table-cell table:style-name="ce900" office:value-type="string" calcext:value-type="string">
            <text:p>2AR</text:p>
          </table:table-cell>
          <table:table-cell/>
          <table:table-cell table:style-name="ce905"/>
          <table:table-cell table:style-name="ce907"/>
          <table:table-cell table:number-columns-repeated="10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7" calcext:value-type="float">
            <text:p>0,0037</text:p>
          </table:table-cell>
          <table:table-cell table:style-name="ce900" office:value-type="string" calcext:value-type="string">
            <text:p>2AR</text:p>
          </table:table-cell>
          <table:table-cell/>
          <table:table-cell table:style-name="ce905"/>
          <table:table-cell table:style-name="ce907"/>
          <table:table-cell table:number-columns-repeated="10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8" calcext:value-type="float">
            <text:p>0,0038</text:p>
          </table:table-cell>
          <table:table-cell table:style-name="ce900" office:value-type="string" calcext:value-type="string">
            <text:p>2AR</text:p>
          </table:table-cell>
          <table:table-cell/>
          <table:table-cell table:style-name="ce905"/>
          <table:table-cell table:style-name="ce907"/>
          <table:table-cell table:number-columns-repeated="10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9" calcext:value-type="float">
            <text:p>0,0039</text:p>
          </table:table-cell>
          <table:table-cell table:style-name="ce900" office:value-type="string" calcext:value-type="string">
            <text:p>2AR</text:p>
          </table:table-cell>
          <table:table-cell/>
          <table:table-cell table:style-name="ce905"/>
          <table:table-cell table:style-name="ce907"/>
          <table:table-cell table:number-columns-repeated="10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" calcext:value-type="float">
            <text:p>0,0040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1" calcext:value-type="float">
            <text:p>0,0041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2" calcext:value-type="float">
            <text:p>0,0042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3" calcext:value-type="float">
            <text:p>0,0043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4" calcext:value-type="float">
            <text:p>0,0044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5" calcext:value-type="float">
            <text:p>0,0045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6" calcext:value-type="float">
            <text:p>0,0046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7" calcext:value-type="float">
            <text:p>0,0047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8" calcext:value-type="float">
            <text:p>0,0048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9" calcext:value-type="float">
            <text:p>0,0049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5" calcext:value-type="float">
            <text:p>0,0050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A</text:p>
          </table:table-cell>
          <table:table-cell table:style-name="ce902" office:value-type="float" office:value="0.006" calcext:value-type="float">
            <text:p>0,0060</text:p>
          </table:table-cell>
          <table:table-cell table:style-name="ce899" office:value-type="string" calcext:value-type="string">
            <text:p>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A</text:p>
          </table:table-cell>
          <table:table-cell table:style-name="ce902" office:value-type="float" office:value="0.007" calcext:value-type="float">
            <text:p>0,0070</text:p>
          </table:table-cell>
          <table:table-cell table:style-name="ce899" office:value-type="string" calcext:value-type="string">
            <text:p>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A</text:p>
          </table:table-cell>
          <table:table-cell table:style-name="ce902" office:value-type="float" office:value="0.008" calcext:value-type="float">
            <text:p>0,0080</text:p>
          </table:table-cell>
          <table:table-cell table:style-name="ce899" office:value-type="string" calcext:value-type="string">
            <text:p>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A</text:p>
          </table:table-cell>
          <table:table-cell table:style-name="ce902" office:value-type="float" office:value="0.009" calcext:value-type="float">
            <text:p>0,0090</text:p>
          </table:table-cell>
          <table:table-cell table:style-name="ce899" office:value-type="string" calcext:value-type="string">
            <text:p>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A</text:p>
          </table:table-cell>
          <table:table-cell table:style-name="ce902" office:value-type="float" office:value="0.01" calcext:value-type="float">
            <text:p>0,0100</text:p>
          </table:table-cell>
          <table:table-cell table:style-name="ce899" office:value-type="string" calcext:value-type="string">
            <text:p>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1" calcext:value-type="float">
            <text:p>0,011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2" calcext:value-type="float">
            <text:p>0,012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3" calcext:value-type="float">
            <text:p>0,013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4" calcext:value-type="float">
            <text:p>0,014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5" calcext:value-type="float">
            <text:p>0,015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6" calcext:value-type="float">
            <text:p>0,016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7" calcext:value-type="float">
            <text:p>0,017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8" calcext:value-type="float">
            <text:p>0,018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9" calcext:value-type="float">
            <text:p>0,019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2" calcext:value-type="float">
            <text:p>0,020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 table:number-rows-repeated="1048491">
          <table:table-cell table:number-columns-repeated="19"/>
          <table:table-cell table:style-name="ce885" table:number-columns-repeated="16365"/>
        </table:table-row>
        <table:table-row table:style-name="ro18">
          <table:table-cell table:number-columns-repeated="19"/>
          <table:table-cell table:style-name="ce885" table:number-columns-repeated="16365"/>
        </table:table-row>
      </table:table>
      <table:table table:name="Historico" table:style-name="ta2" table:protected="true" table:protection-key="H2YxmH4tDuFt/JOw+Y5A+Ml8E9g=" table:protection-key-digest-algorithm="http://www.w3.org/2000/09/xmldsig#sha1">
        <loext:table-protection loext:select-protected-cells="true" loext:select-unprotected-cells="true" loext:insert-columns="true" loext:insert-rows="true" loext:delete-columns="true" loext:delete-rows="true" loext:use-autofilter="true" loext:use-pivot="true"/>
        <table:table-column table:style-name="co59" table:number-columns-repeated="2" table:default-cell-style-name="ce1"/>
        <table:table-column table:style-name="co60" table:number-columns-repeated="8" table:default-cell-style-name="ce1"/>
        <table:table-column table:style-name="co50" table:number-columns-repeated="54" table:default-cell-style-name="ce1"/>
        <table:table-column table:style-name="co50" table:number-columns-repeated="960"/>
        <table:table-column table:style-name="co15" table:number-columns-repeated="15360"/>
        <table:table-row table:style-name="ro5">
          <table:table-cell table:style-name="ce278" table:number-columns-spanned="2" table:number-rows-spanned="3">
            <draw:frame draw:z-index="0" draw:name="Figura 5" draw:style-name="gr1" draw:text-style-name="P1" svg:width="2.094cm" svg:height="2.094cm" svg:x="1.799cm" svg:y="0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/>
          <table:table-cell table:style-name="ce380" table:formula="of:=[Planilha.F1]" office:value-type="string" office:string-value="TIPO:" calcext:value-type="string">
            <text:p>TIPO:</text:p>
          </table:table-cell>
          <table:table-cell table:style-name="ce390" table:formula="of:=[Planilha.G1]" office:value-type="string" office:string-value="FORMULÁRIO OPERACIONAL" calcext:value-type="string" table:number-columns-spanned="7" table:number-rows-spanned="1">
            <text:p>FORMULÁRIO OPERACIONAL</text:p>
          </table:table-cell>
          <table:covered-table-cell table:number-columns-repeated="6"/>
          <table:table-cell table:style-name="ce381" table:number-columns-repeated="16374"/>
        </table:table-row>
        <table:table-row table:style-name="ro5">
          <table:covered-table-cell table:number-columns-repeated="2"/>
          <table:table-cell table:style-name="ce382" table:formula="of:=[Planilha.F2]" office:value-type="string" office:string-value="REQUISITO:" calcext:value-type="string">
            <text:p>REQUISITO:</text:p>
          </table:table-cell>
          <table:table-cell table:style-name="ce391" table:formula="of:=[Planilha.G2]" office:value-type="string" office:string-value="REQUISITOS DE PROCESSO" calcext:value-type="string" table:number-columns-spanned="7" table:number-rows-spanned="1">
            <text:p>REQUISITOS DE PROCESSO</text:p>
          </table:table-cell>
          <table:covered-table-cell table:number-columns-repeated="6"/>
          <table:table-cell table:style-name="ce381" table:number-columns-repeated="16374"/>
        </table:table-row>
        <table:table-row table:style-name="ro19">
          <table:covered-table-cell table:number-columns-repeated="2"/>
          <table:table-cell table:style-name="ce383" table:formula="of:=[Planilha.F3]" office:value-type="string" office:string-value="ITEM:" calcext:value-type="string">
            <text:p>ITEM:</text:p>
          </table:table-cell>
          <table:table-cell table:style-name="ce390" table:formula="of:=[Planilha.G3]" office:value-type="string" office:string-value="SELEÇÃO, VERIFICAÇÃO E VALIDAÇÃO DE MÉTODOS" calcext:value-type="string" table:number-columns-spanned="7" table:number-rows-spanned="1">
            <text:p>SELEÇÃO, VERIFICAÇÃO E VALIDAÇÃO DE MÉTODOS</text:p>
          </table:table-cell>
          <table:covered-table-cell table:number-columns-repeated="6"/>
          <table:table-cell table:style-name="ce381" table:number-columns-repeated="16374"/>
        </table:table-row>
        <table:table-row table:style-name="ro5">
          <table:table-cell table:style-name="ce392" table:formula="of:=[Planilha.C4]" office:value-type="string" office:string-value="CALIBRAÇÃO DE MEDIDOR DE PRESSÃO ANALÓGICA – DIGITAL" calcext:value-type="string" table:number-columns-spanned="10" table:number-rows-spanned="1">
            <text:p>CALIBRAÇÃO DE MEDIDOR DE PRESSÃO ANALÓGICA – DIGITAL</text:p>
          </table:table-cell>
          <table:covered-table-cell table:number-columns-repeated="9"/>
          <table:table-cell table:style-name="ce381" table:number-columns-repeated="16374"/>
        </table:table-row>
        <table:table-row table:style-name="ro5">
          <table:table-cell table:style-name="ce788" table:formula="of:=[Planilha.C5]" office:value-type="string" office:string-value="DOCUMENTO" calcext:value-type="string" table:number-columns-spanned="2" table:number-rows-spanned="1">
            <text:p>DOCUMENTO</text:p>
          </table:table-cell>
          <table:covered-table-cell/>
          <table:table-cell table:style-name="ce788" table:formula="of:=[Planilha.F5]" office:value-type="string" office:string-value="REVISÃO" calcext:value-type="string" table:number-columns-spanned="3" table:number-rows-spanned="1">
            <text:p>REVISÃO</text:p>
          </table:table-cell>
          <table:covered-table-cell table:number-columns-repeated="2"/>
          <table:table-cell table:style-name="ce788" table:formula="of:=[Planilha.H5]" office:value-type="string" office:string-value="APROVADO EM" calcext:value-type="string" table:number-columns-spanned="3" table:number-rows-spanned="1">
            <text:p>APROVADO EM</text:p>
          </table:table-cell>
          <table:covered-table-cell table:number-columns-repeated="2"/>
          <table:table-cell table:style-name="ce788" table:formula="of:=[Planilha.J5]" office:value-type="string" office:string-value="FOLHA" calcext:value-type="string" table:number-columns-spanned="2" table:number-rows-spanned="1">
            <text:p>FOLHA</text:p>
          </table:table-cell>
          <table:covered-table-cell/>
          <table:table-cell table:style-name="ce381" table:number-columns-repeated="16374"/>
        </table:table-row>
        <table:table-row table:style-name="ro5">
          <table:table-cell table:style-name="ce394" table:formula="of:=[Planilha.C6]" office:value-type="string" office:string-value="CCDS-009" calcext:value-type="string" table:number-columns-spanned="2" table:number-rows-spanned="1">
            <text:p>CCDS-009</text:p>
          </table:table-cell>
          <table:covered-table-cell/>
          <table:table-cell table:style-name="ce395" table:formula="of:=[Planilha.F6]" office:value-type="string" office:string-value="00" calcext:value-type="string" table:number-columns-spanned="3" table:number-rows-spanned="1">
            <text:p>00</text:p>
          </table:table-cell>
          <table:covered-table-cell table:number-columns-repeated="2"/>
          <table:table-cell table:style-name="ce396" table:formula="of:=[Planilha.H6]" office:value-type="date" office:date-value="2023-09-10" calcext:value-type="date" table:number-columns-spanned="3" table:number-rows-spanned="1">
            <text:p>10/9/23</text:p>
          </table:table-cell>
          <table:covered-table-cell table:number-columns-repeated="2"/>
          <table:table-cell table:style-name="ce394" table:formula="of:=[Planilha.J6]" office:value-type="string" office:string-value="01/01" calcext:value-type="string" table:number-columns-spanned="2" table:number-rows-spanned="1">
            <text:p>01/01</text:p>
          </table:table-cell>
          <table:covered-table-cell/>
          <table:table-cell table:style-name="ce381" table:number-columns-repeated="16374"/>
        </table:table-row>
        <table:table-row table:style-name="ro20">
          <table:table-cell table:style-name="ce107" table:number-columns-spanned="10" table:number-rows-spanned="1"/>
          <table:covered-table-cell table:number-columns-repeated="9"/>
          <table:table-cell table:style-name="ce384" table:number-columns-repeated="16374"/>
        </table:table-row>
        <table:table-row table:style-name="ro5">
          <table:table-cell table:style-name="ce385" office:value-type="string" calcext:value-type="string">
            <text:p>Data</text:p>
          </table:table-cell>
          <table:table-cell table:style-name="ce385" office:value-type="string" calcext:value-type="string">
            <text:p>Revisão</text:p>
          </table:table-cell>
          <table:table-cell table:style-name="ce799" office:value-type="string" calcext:value-type="string" table:number-columns-spanned="5" table:number-rows-spanned="1">
            <text:p>Alteração</text:p>
          </table:table-cell>
          <table:covered-table-cell table:number-columns-repeated="4"/>
          <table:table-cell table:style-name="ce799" office:value-type="string" calcext:value-type="string" table:number-columns-spanned="3" table:number-rows-spanned="1">
            <text:p>Motivo</text:p>
          </table:table-cell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6" office:value-type="date" office:date-value="2026-02-24" calcext:value-type="date">
            <text:p>24/2/26</text:p>
          </table:table-cell>
          <table:table-cell table:style-name="ce387" office:value-type="string" calcext:value-type="string">
            <text:p>00</text:p>
          </table:table-cell>
          <table:table-cell table:style-name="ce398" office:value-type="string" calcext:value-type="string" table:number-columns-spanned="5" table:number-rows-spanned="1">
            <text:p>Documento inicial</text:p>
          </table:table-cell>
          <table:covered-table-cell table:number-columns-repeated="4"/>
          <table:table-cell table:style-name="ce399" office:value-type="string" calcext:value-type="string" table:number-columns-spanned="3" table:number-rows-spanned="1">
            <text:p>Certificado para calibração de medidor de pressão</text:p>
          </table:table-cell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6"/>
          <table:table-cell table:style-name="ce387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 table:number-rows-repeated="7">
          <table:table-cell table:number-columns-repeated="64"/>
          <table:table-cell table:style-name="ce1" table:number-columns-repeated="16320"/>
        </table:table-row>
        <table:table-row table:style-name="ro8" table:number-rows-repeated="1048549">
          <table:table-cell table:number-columns-repeated="64"/>
          <table:table-cell table:style-name="ce1" table:number-columns-repeated="16320"/>
        </table:table-row>
        <table:table-row table:style-name="ro8">
          <table:table-cell table:number-columns-repeated="64"/>
          <table:table-cell table:style-name="ce1" table:number-columns-repeated="16320"/>
        </table:table-row>
      </table:table>
      <table:table table:name="Certificado" table:style-name="ta3" table:protected="true" table:protection-key="H2YxmH4tDuFt/JOw+Y5A+Ml8E9g=" table:protection-key-digest-algorithm="http://www.w3.org/2000/09/xmldsig#sha1">
        <loext:table-protection loext:select-protected-cells="true" loext:select-unprotected-cells="true"/>
        <table:shapes>
          <draw:frame draw:z-index="2" draw:name="CaixaDeTexto 1" draw:style-name="gr2" draw:text-style-name="P2" svg:width="2.001cm" svg:height="0.445cm" svg:x="48.02cm" svg:y="21.014cm">
            <draw:text-box>
              <text:p/>
            </draw:text-box>
          </draw:frame>
        </table:shapes>
        <table:table-column table:style-name="co61" table:default-cell-style-name="ce1"/>
        <table:table-column table:style-name="co62" table:visibility="collapse" table:default-cell-style-name="ce1"/>
        <table:table-column table:style-name="co63" table:visibility="collapse" table:default-cell-style-name="ce1"/>
        <table:table-column table:style-name="co64" table:number-columns-repeated="8" table:default-cell-style-name="ce1"/>
        <table:table-column table:style-name="co65" table:default-cell-style-name="ce86"/>
        <table:table-column table:style-name="co66" table:default-cell-style-name="ce86"/>
        <table:table-column table:style-name="co67" table:visibility="collapse" table:default-cell-style-name="ce86"/>
        <table:table-column table:style-name="co68" table:default-cell-style-name="ce86"/>
        <table:table-column table:style-name="co69" table:number-columns-repeated="8" table:default-cell-style-name="ce1"/>
        <table:table-column table:style-name="co69" table:default-cell-style-name="ce86"/>
        <table:table-column table:style-name="co70" table:visibility="collapse" table:default-cell-style-name="ce1"/>
        <table:table-column table:style-name="co61" table:default-cell-style-name="ce1"/>
        <table:table-column table:style-name="co44" table:visibility="collapse" table:number-columns-repeated="4" table:default-cell-style-name="ce1"/>
        <table:table-column table:style-name="co71" table:visibility="collapse" table:default-cell-style-name="ce1"/>
        <table:table-column table:style-name="co44" table:visibility="collapse" table:number-columns-repeated="9" table:default-cell-style-name="ce1"/>
        <table:table-column table:style-name="co72" table:visibility="collapse" table:default-cell-style-name="ce1"/>
        <table:table-column table:style-name="co15" table:number-columns-repeated="16343"/>
        <table:table-row table:style-name="ro21">
          <table:table-cell table:number-columns-repeated="3"/>
          <table:table-cell table:style-name="ce400"/>
          <table:table-cell table:number-columns-repeated="2"/>
          <table:table-cell table:style-name="ce401"/>
          <table:table-cell table:style-name="ce402"/>
          <table:table-cell>
            <draw:frame draw:z-index="3" draw:name="Figura 6" draw:style-name="gr3" draw:text-style-name="P3" svg:width="4.891cm" svg:height="4.891cm" svg:x="2.892cm" svg:y="0.331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table-cell table:style-name="ce402"/>
          <table:table-cell table:style-name="ce936"/>
          <table:table-cell table:style-name="ce961" table:number-columns-repeated="4"/>
          <table:table-cell table:style-name="ce400"/>
          <table:table-cell table:number-columns-repeated="2"/>
          <table:table-cell table:style-name="ce526" table:number-columns-spanned="5" table:number-rows-spanned="1"/>
          <table:covered-table-cell table:number-columns-repeated="3"/>
          <table:covered-table-cell>
            <draw:frame draw:z-index="4" draw:name="Figura 7" draw:style-name="gr3" draw:text-style-name="P3" svg:width="4.891cm" svg:height="4.891cm" svg:x="1.368cm" svg:y="0.311cm">
              <draw:image xlink:href="Pictures/10000001000005DC000005DCABA81CCF.png" xlink:type="simple" xlink:show="embed" xlink:actuate="onLoad" draw:mime-type="image/png">
                <text:p/>
              </draw:image>
            </draw:frame>
          </table:covered-table-cell>
          <table:table-cell table:style-name="ce961"/>
          <table:table-cell/>
          <table:table-cell table:style-name="ce74"/>
          <table:table-cell table:number-columns-repeated="15"/>
          <table:table-cell table:style-name="ce1" table:number-columns-repeated="16343"/>
        </table:table-row>
        <table:table-row table:style-name="ro22">
          <table:table-cell table:number-columns-repeated="3"/>
          <table:table-cell table:style-name="ce826" office:value-type="string" calcext:value-type="string" table:number-columns-spanned="8" table:number-rows-spanned="1">
            <text:p>DS CIENTÍFICA</text:p>
          </table:table-cell>
          <table:covered-table-cell table:number-columns-repeated="6"/>
          <table:covered-table-cell table:style-name="ce936"/>
          <table:table-cell table:style-name="ce961" table:number-columns-repeated="4"/>
          <table:table-cell table:style-name="ce826" office:value-type="string" calcext:value-type="string" table:number-columns-spanned="9" table:number-rows-spanned="1">
            <text:p>DS CIENTÍFICA</text:p>
          </table:table-cell>
          <table:covered-table-cell table:number-columns-repeated="6"/>
          <table:covered-table-cell table:style-name="ce936"/>
          <table:covered-table-cell table:style-name="Default"/>
          <table:table-cell table:number-columns-repeated="17"/>
          <table:table-cell table:style-name="ce1" table:number-columns-repeated="16343"/>
        </table:table-row>
        <table:table-row table:style-name="ro23">
          <table:table-cell table:number-columns-repeated="3"/>
          <table:table-cell table:style-name="ce827" office:value-type="string" calcext:value-type="string" table:number-columns-spanned="8" table:number-rows-spanned="1">
            <text:p>Fones: (11) 98859-9577 <text:s text:c="3"/>contato@dscientifica.com.br <text:s text:c="3"/>www.dscientifica.com.br </text:p>
          </table:table-cell>
          <table:covered-table-cell table:number-columns-repeated="7"/>
          <table:table-cell table:style-name="ce961" table:number-columns-repeated="4"/>
          <table:table-cell table:style-name="ce827" office:value-type="string" calcext:value-type="string" table:number-columns-spanned="9" table:number-rows-spanned="1">
            <text:p>Fones: (11) 98859-9577 <text:s text:c="3"/>contato@dscientifica.com.br <text:s text:c="3"/>www.dscientifica.com.br </text:p>
          </table:table-cell>
          <table:covered-table-cell table:number-columns-repeated="7"/>
          <table:covered-table-cell table:style-name="Default"/>
          <table:table-cell table:number-columns-repeated="17"/>
          <table:table-cell table:style-name="ce1" table:number-columns-repeated="16343"/>
        </table:table-row>
        <table:table-row table:style-name="ro24">
          <table:table-cell table:number-columns-repeated="3"/>
          <table:table-cell table:style-name="ce940"/>
          <table:table-cell table:number-columns-repeated="7"/>
          <table:table-cell table:style-name="ce961" table:number-columns-repeated="4"/>
          <table:table-cell table:style-name="Default" table:number-columns-repeated="9"/>
          <table:table-cell table:number-columns-repeated="17"/>
          <table:table-cell table:style-name="ce1" table:number-columns-repeated="16343"/>
        </table:table-row>
        <table:table-row table:style-name="ro25">
          <table:table-cell table:number-columns-repeated="3"/>
          <table:table-cell table:style-name="ce829" office:value-type="string" calcext:value-type="string" table:number-columns-spanned="8" table:number-rows-spanned="1">
            <text:p>CERTIFICADO DE CALIBRAÇÃO</text:p>
          </table:table-cell>
          <table:covered-table-cell table:number-columns-repeated="6"/>
          <table:covered-table-cell table:style-name="ce936"/>
          <table:table-cell table:style-name="ce961" table:number-columns-repeated="4"/>
          <table:table-cell table:style-name="ce829" office:value-type="string" calcext:value-type="string" table:number-columns-spanned="9" table:number-rows-spanned="1">
            <text:p>CERTIFICADO DE CALIBRAÇÃO</text:p>
          </table:table-cell>
          <table:covered-table-cell table:number-columns-repeated="6"/>
          <table:covered-table-cell table:style-name="ce936"/>
          <table:covered-table-cell table:style-name="ce961"/>
          <table:table-cell table:number-columns-repeated="17"/>
          <table:table-cell table:style-name="ce1" table:number-columns-repeated="16343"/>
        </table:table-row>
        <table:table-row table:style-name="ro26">
          <table:table-cell table:number-columns-repeated="3"/>
          <table:table-cell table:style-name="ce943"/>
          <table:table-cell table:number-columns-repeated="6"/>
          <table:table-cell table:style-name="ce936"/>
          <table:table-cell table:style-name="ce961" table:number-columns-repeated="4"/>
          <table:table-cell table:style-name="ce829"/>
          <table:table-cell table:number-columns-repeated="6"/>
          <table:table-cell table:style-name="ce936"/>
          <table:table-cell table:style-name="ce961"/>
          <table:table-cell table:number-columns-repeated="17"/>
          <table:table-cell table:style-name="ce1" table:number-columns-repeated="16343"/>
        </table:table-row>
        <table:table-row table:style-name="ro27">
          <table:table-cell table:number-columns-repeated="3"/>
          <table:table-cell table:style-name="ce829" table:formula="of:=CONCATENATE([$Planilha.$H$9];[$Planilha.$I$9];[$Planilha.$J$9];&quot; / &quot;;[$Planilha.$K$9];IF([$Planilha.$K$11]=&quot;&quot;;&quot;&quot;;CONCATENATE(&quot;  Rev: &quot;;[$Planilha.$K$11])))" office:value-type="string" office:string-value="DSC -K6U1K4- 02 / 2026" calcext:value-type="string" table:number-columns-spanned="8" table:number-rows-spanned="1">
            <text:p>DSC -K6U1K4- 02 / 2026</text:p>
          </table:table-cell>
          <table:covered-table-cell table:number-columns-repeated="6"/>
          <table:covered-table-cell table:style-name="ce936"/>
          <table:table-cell table:style-name="ce961" table:number-columns-repeated="4"/>
          <table:table-cell table:style-name="ce1045" table:formula="of:=CONCATENATE([$Planilha.$H$9];[$Planilha.$I$9];[$Planilha.$J$9];&quot; / &quot;;[$Planilha.$K$9];IF([$Planilha.$K$11]=&quot;&quot;;&quot;&quot;;CONCATENATE(&quot;  Rev: &quot;;[$Planilha.$K$11])))" office:value-type="string" office:string-value="DSC -K6U1K4- 02 / 2026" calcext:value-type="string" table:number-columns-spanned="9" table:number-rows-spanned="1">
            <text:p>DSC -K6U1K4- 02 / 2026</text:p>
          </table:table-cell>
          <table:covered-table-cell table:number-columns-repeated="6"/>
          <table:covered-table-cell table:style-name="ce936"/>
          <table:covered-table-cell table:style-name="ce961"/>
          <table:table-cell table:number-columns-repeated="17"/>
          <table:table-cell table:style-name="ce1" table:number-columns-repeated="16343"/>
        </table:table-row>
        <table:table-row table:style-name="ro28">
          <table:table-cell table:number-columns-repeated="3"/>
          <table:table-cell table:style-name="ce242"/>
          <table:table-cell table:number-columns-repeated="8"/>
          <table:table-cell table:style-name="ce961"/>
          <table:table-cell table:style-name="ce919" table:number-columns-repeated="2"/>
          <table:table-cell table:style-name="ce242"/>
          <table:table-cell table:number-columns-repeated="7"/>
          <table:table-cell table:style-name="ce407"/>
          <table:table-cell table:number-columns-repeated="17"/>
          <table:table-cell table:style-name="ce1" table:number-columns-repeated="16343"/>
        </table:table-row>
        <table:table-row table:style-name="ro29">
          <table:table-cell/>
          <table:table-cell table:style-name="ce919" table:number-columns-repeated="2"/>
          <table:table-cell table:style-name="ce400"/>
          <table:table-cell table:number-columns-repeated="2"/>
          <table:table-cell table:style-name="ce401"/>
          <table:table-cell table:style-name="ce402"/>
          <table:table-cell/>
          <table:table-cell table:style-name="ce402"/>
          <table:table-cell table:style-name="ce936"/>
          <table:table-cell table:style-name="ce961" table:number-columns-repeated="2"/>
          <table:table-cell table:style-name="ce920"/>
          <table:table-cell table:style-name="ce919"/>
          <table:table-cell table:style-name="ce400"/>
          <table:table-cell table:number-columns-repeated="2"/>
          <table:table-cell table:style-name="ce401"/>
          <table:table-cell table:style-name="ce402"/>
          <table:table-cell/>
          <table:table-cell table:style-name="ce402"/>
          <table:table-cell table:style-name="ce936"/>
          <table:table-cell table:style-name="ce961"/>
          <table:table-cell table:number-columns-repeated="17"/>
          <table:table-cell table:style-name="ce1" table:number-columns-repeated="16343"/>
        </table:table-row>
        <table:table-row table:style-name="ro30">
          <table:table-cell table:style-name="ce807"/>
          <table:table-cell table:style-name="ce910"/>
          <table:table-cell table:style-name="ce912"/>
          <table:table-cell table:style-name="ce944" office:value-type="string" calcext:value-type="string">
            <text:p>DATA DE CALIBRAÇÃO:</text:p>
          </table:table-cell>
          <table:table-cell table:style-name="ce968"/>
          <table:table-cell table:style-name="ce986" table:formula="of:=IF([Planilha.E11]=&quot;&quot;;&quot;ALERTA&quot;;[Planilha.E11])" office:value-type="date" office:date-value="2026-04-17" calcext:value-type="date">
            <text:p>17/04/2026</text:p>
          </table:table-cell>
          <table:table-cell table:style-name="ce986"/>
          <table:table-cell table:style-name="ce1002"/>
          <table:table-cell table:style-name="ce944" office:value-type="string" calcext:value-type="string">
            <text:p>DATA DE EMISSÃO:</text:p>
          </table:table-cell>
          <table:table-cell table:style-name="ce1014"/>
          <table:table-cell table:style-name="ce986" table:formula="of:=IF([Planilha.I11]=&quot;&quot;;&quot;ALERTA&quot;;[Planilha.I11])" office:value-type="date" office:date-value="2026-04-23" calcext:value-type="date">
            <text:p>23/04/2026</text:p>
          </table:table-cell>
          <table:table-cell table:style-name="ce938" table:number-columns-repeated="2"/>
          <table:table-cell table:style-name="ce910"/>
          <table:table-cell table:style-name="ce912"/>
          <table:table-cell table:style-name="ce944" office:value-type="string" calcext:value-type="string">
            <text:p>DATA DE CALIBRAÇÃO:</text:p>
          </table:table-cell>
          <table:table-cell table:style-name="ce968"/>
          <table:table-cell table:style-name="ce986" table:formula="of:=IF([Planilha.E11]=&quot;&quot;;&quot;ALERTA&quot;;[Planilha.E11])" office:value-type="date" office:date-value="2026-04-17" calcext:value-type="date">
            <text:p>17/04/2026</text:p>
          </table:table-cell>
          <table:table-cell table:style-name="ce986"/>
          <table:table-cell table:style-name="ce1002"/>
          <table:table-cell table:style-name="ce1093"/>
          <table:table-cell table:style-name="ce944" office:value-type="string" calcext:value-type="string">
            <text:p>DATA DE EMISSÃO:</text:p>
          </table:table-cell>
          <table:table-cell table:style-name="ce1093"/>
          <table:table-cell table:style-name="ce986" table:formula="of:=IF([Planilha.I11]=&quot;&quot;;&quot;ALERTA&quot;;[Planilha.I11])" office:value-type="date" office:date-value="2026-04-23" calcext:value-type="date">
            <text:p>23/04/2026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2"/>
          <table:table-cell table:style-name="ce945"/>
          <table:table-cell table:style-name="ce807" table:number-columns-repeated="2"/>
          <table:table-cell table:style-name="ce401"/>
          <table:table-cell table:style-name="ce1003"/>
          <table:table-cell table:style-name="ce807"/>
          <table:table-cell table:style-name="ce1003"/>
          <table:table-cell table:style-name="ce1028"/>
          <table:table-cell table:style-name="ce938" table:number-columns-repeated="2"/>
          <table:table-cell table:style-name="ce910"/>
          <table:table-cell table:style-name="ce912"/>
          <table:table-cell table:style-name="ce945"/>
          <table:table-cell table:style-name="ce807" table:number-columns-repeated="2"/>
          <table:table-cell table:style-name="ce401"/>
          <table:table-cell table:style-name="ce1003"/>
          <table:table-cell table:style-name="ce807"/>
          <table:table-cell table:style-name="ce1003"/>
          <table:table-cell table:style-name="ce1028"/>
          <table:table-cell table:style-name="ce938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2"/>
          <table:table-cell table:style-name="ce833" office:value-type="string" calcext:value-type="string" table:number-columns-spanned="8" table:number-rows-spanned="1">
            <text:p>1. INFORMAÇÕES DO CONTRATANTE</text:p>
          </table:table-cell>
          <table:covered-table-cell table:number-columns-repeated="7" table:style-name="ce807"/>
          <table:table-cell table:style-name="ce938" table:number-columns-repeated="2"/>
          <table:table-cell table:style-name="ce910"/>
          <table:table-cell table:style-name="ce912"/>
          <table:table-cell table:style-name="ce833" office:value-type="string" calcext:value-type="string" table:number-columns-spanned="9" table:number-rows-spanned="1">
            <text:p>8. RESULTADOS DA CALIBRAÇÃO</text:p>
          </table:table-cell>
          <table:covered-table-cell table:number-columns-repeated="7" table:style-name="ce807"/>
          <table:covered-table-cell table:style-name="ce938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2"/>
          <table:table-cell table:style-name="ce945"/>
          <table:table-cell table:style-name="ce807" table:number-columns-repeated="2"/>
          <table:table-cell table:style-name="ce401"/>
          <table:table-cell table:style-name="ce1003"/>
          <table:table-cell table:style-name="ce807"/>
          <table:table-cell table:style-name="ce1003"/>
          <table:table-cell table:style-name="ce1028"/>
          <table:table-cell table:style-name="ce938" table:number-columns-repeated="2"/>
          <table:table-cell table:style-name="ce910"/>
          <table:table-cell table:style-name="ce912"/>
          <table:table-cell table:style-name="ce1037"/>
          <table:table-cell table:style-name="ce847" table:number-columns-repeated="2"/>
          <table:table-cell table:style-name="ce416"/>
          <table:table-cell table:style-name="ce1004"/>
          <table:table-cell table:style-name="ce847"/>
          <table:table-cell table:style-name="ce1004"/>
          <table:table-cell table:style-name="ce938" table:number-columns-repeated="2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2"/>
          <table:table-cell table:style-name="ce947" office:value-type="string" calcext:value-type="string">
            <text:p>CONTRATANTE:</text:p>
          </table:table-cell>
          <table:table-cell table:style-name="ce969" table:formula="of:=IF([Planilha.E15]=&quot;&quot;;&quot;ALERTA&quot;;[Planilha.E15])" office:value-type="string" office:string-value="BBOSCH GALVANIZAÇÃO DO BRASIL LTDA." calcext:value-type="string">
            <text:p>BBOSCH GALVANIZAÇÃO DO BRASIL LTDA.</text:p>
          </table:table-cell>
          <table:table-cell table:style-name="ce847"/>
          <table:table-cell table:style-name="ce416"/>
          <table:table-cell table:style-name="ce1004"/>
          <table:table-cell table:style-name="ce847"/>
          <table:table-cell table:style-name="ce1004"/>
          <table:table-cell table:style-name="ce938" table:number-columns-repeated="3"/>
          <table:table-cell table:style-name="ce910"/>
          <table:table-cell table:style-name="ce912"/>
          <table:table-cell table:style-name="ce1038" office:value-type="string" calcext:value-type="string" table:number-columns-spanned="1" table:number-rows-spanned="2">
            <text:p>INSTRUMENTO</text:p>
          </table:table-cell>
          <table:table-cell table:style-name="ce1052" office:value-type="string" calcext:value-type="string" table:number-columns-spanned="4" table:number-rows-spanned="1">
            <text:p>PADRÃO</text:p>
          </table:table-cell>
          <table:covered-table-cell table:number-columns-repeated="3" table:style-name="ce807"/>
          <table:table-cell table:style-name="ce1096" office:value-type="string" calcext:value-type="string" table:number-columns-spanned="1" table:number-rows-spanned="3">
            <text:p>Erro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2"/>
          <table:table-cell table:style-name="ce947" office:value-type="string" calcext:value-type="string">
            <text:p>ENDEREÇO:</text:p>
          </table:table-cell>
          <table:table-cell table:style-name="ce969" table:formula="of:=IF([Planilha.E16]=&quot;&quot;;&quot;ALERTA&quot;;[Planilha.E16])" office:value-type="string" office:string-value="AV. ENG. JOÃO FERNANDES G. MOLINA, 50 – DISTRITO  INDUSTRIAL – JUNDIAÍ-SP" calcext:value-type="string">
            <text:p>AV. ENG. JOÃO FERNANDES G. MOLINA, 50 – DISTRITO <text:s/>INDUSTRIAL – JUNDIAÍ-SP</text:p>
          </table:table-cell>
          <table:table-cell table:style-name="ce847" table:number-columns-repeated="8"/>
          <table:table-cell table:style-name="ce910"/>
          <table:table-cell table:style-name="ce812"/>
          <table:covered-table-cell table:style-name="ce807"/>
          <table:table-cell table:style-name="ce1053" office:value-type="string" calcext:value-type="string" table:number-columns-spanned="2" table:number-rows-spanned="1">
            <text:p>Crescente</text:p>
          </table:table-cell>
          <table:covered-table-cell table:style-name="ce807"/>
          <table:table-cell table:style-name="ce1053" office:value-type="string" calcext:value-type="string" table:number-columns-spanned="2" table:number-rows-spanned="1">
            <text:p>Decrescente</text:p>
          </table:table-cell>
          <table:covered-table-cell table:number-columns-repeated="2" table:style-name="ce807"/>
          <table:table-cell table:style-name="ce1107" office:value-type="string" calcext:value-type="string">
            <text:p>Expandida <text:span text:style-name="T12">U</text:span>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812"/>
          <table:table-cell table:style-name="ce948"/>
          <table:table-cell table:style-name="ce971"/>
          <table:table-cell table:style-name="ce987"/>
          <table:table-cell table:style-name="ce995"/>
          <table:table-cell table:style-name="ce948"/>
          <table:table-cell table:style-name="ce1011"/>
          <table:table-cell table:style-name="ce987"/>
          <table:table-cell table:style-name="ce1011" table:number-columns-repeated="3"/>
          <table:table-cell table:style-name="ce910"/>
          <table:table-cell table:style-name="ce914"/>
          <table:table-cell table:style-name="ce1039" table:formula="of:=[Planilha.D46]" office:value-type="string" office:string-value="kgf/cm2" calcext:value-type="string">
            <text:p>kgf/cm2</text:p>
          </table:table-cell>
          <table:table-cell table:style-name="ce1054" office:value-type="string" calcext:value-type="string">
            <text:p>1<text:span text:style-name="T2">a</text:span> Série</text:p>
          </table:table-cell>
          <table:table-cell table:style-name="ce1054" office:value-type="string" calcext:value-type="string">
            <text:p>2<text:span text:style-name="T2">a</text:span> Série</text:p>
          </table:table-cell>
          <table:table-cell table:style-name="ce1054" office:value-type="string" calcext:value-type="string">
            <text:p>1<text:span text:style-name="T2">a</text:span> Série</text:p>
          </table:table-cell>
          <table:table-cell table:style-name="ce1054" office:value-type="string" calcext:value-type="string">
            <text:p>2<text:span text:style-name="T2">a</text:span> Série</text:p>
          </table:table-cell>
          <table:covered-table-cell table:style-name="ce807"/>
          <table:table-cell table:style-name="ce1109"/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4"/>
          <table:table-cell table:style-name="ce833" office:value-type="string" calcext:value-type="string" table:number-columns-spanned="8" table:number-rows-spanned="1">
            <text:p>2. INFORMAÇÕES DO CLIENTE</text:p>
            <draw:frame draw:z-index="1" draw:name="Figura 3" draw:style-name="gr4" draw:text-style-name="P1" table:table-background="true" svg:width="15.878cm" svg:height="15.878cm" svg:x="2.419cm" svg:y="0.319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 table:number-columns-repeated="7" table:style-name="ce807"/>
          <table:table-cell table:style-name="ce847" table:number-columns-repeated="2"/>
          <table:table-cell table:style-name="ce910"/>
          <table:table-cell table:style-name="ce812"/>
          <table:table-cell table:style-name="ce1041" table:formula="of:=IF([Planilha.B48]=&quot;&quot;;&quot;-------&quot;;FIXED([Planilha.B72];[$Planilha.$I$87]))" office:value-type="string" office:string-value="0,00" calcext:value-type="string">
            <text:p>0,00</text:p>
          </table:table-cell>
          <table:table-cell table:style-name="ce1055" table:formula="of:=IF([$Planilha.E48]=&quot;&quot;;&quot;--------&quot;;FIXED([$Planilha.E48];[$Planilha.$I$87]))" office:value-type="string" office:string-value="0,01" calcext:value-type="string">
            <text:p>0,01</text:p>
            <draw:frame draw:z-index="0" draw:name="Figura 4" draw:style-name="gr4" draw:text-style-name="P1" table:table-background="true" svg:width="15.878cm" svg:height="15.878cm" svg:x="1.621cm" svg:y="0.372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table-cell table:style-name="ce1055" table:formula="of:=IF([$Planilha.H48]=&quot;&quot;;&quot;--------&quot;;FIXED([$Planilha.H48];[$Planilha.$I$87]))" office:value-type="string" office:string-value="0,00" calcext:value-type="string">
            <text:p>0,00</text:p>
          </table:table-cell>
          <table:table-cell table:style-name="ce1055" table:formula="of:=IF([$Planilha.K48]=&quot;&quot;;&quot;--------&quot;;FIXED([$Planilha.K48];[$Planilha.$I$87]))" office:value-type="string" office:string-value="0,00" calcext:value-type="string">
            <text:p>0,00</text:p>
          </table:table-cell>
          <table:table-cell table:style-name="ce1055" table:formula="of:=IF([$Planilha.N48]=&quot;&quot;;&quot;--------&quot;;FIXED([$Planilha.N48];[$Planilha.$I$87]))" office:value-type="string" office:string-value="0,00" calcext:value-type="string">
            <text:p>0,00</text:p>
          </table:table-cell>
          <table:table-cell table:style-name="ce1097" table:formula="of:=[$Planilha.H72]" office:value-type="float" office:value="0.0025" calcext:value-type="float">
            <text:p>0,00</text:p>
          </table:table-cell>
          <table:table-cell table:style-name="ce1041" table:formula="of:=IF([$Planilha.Q72]=&quot;--------&quot;;&quot;--------&quot;;FIXED([$Planilha.Q72];[$Planilha.I87]))" office:value-type="string" office:string-value="0,06" calcext:value-type="string">
            <text:p>0,06</text:p>
          </table:table-cell>
          <table:table-cell table:style-name="ce1120" table:formula="of:=IF([$Planilha.R72]=&quot;--------&quot;;&quot;--------&quot;;FIXED([$Planilha.R72];[$Planilha.I87]))" office:value-type="string" office:string-value="2,00" calcext:value-type="string">
            <text:p>2,00</text:p>
          </table:table-cell>
          <table:table-cell table:style-name="ce1103" table:formula="of:=IF([$Planilha.S72]=&quot;--------&quot;;&quot;--------&quot;;[$Planilha.S72])" office:value-type="float" office:value="0.0290384087339525" calcext:value-type="float">
            <text:p>0,03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812"/>
          <table:table-cell table:style-name="ce949"/>
          <table:table-cell table:style-name="ce935"/>
          <table:table-cell table:style-name="ce980" table:number-columns-repeated="5"/>
          <table:table-cell table:style-name="ce976" table:number-columns-repeated="3"/>
          <table:table-cell table:style-name="ce910"/>
          <table:table-cell table:style-name="ce915"/>
          <table:table-cell table:style-name="ce1041" table:formula="of:=IF([Planilha.B49]=&quot;&quot;;&quot;-------&quot;;FIXED([Planilha.B73];[$Planilha.$I$87]))" office:value-type="string" office:string-value="1,00" calcext:value-type="string">
            <text:p>1,00</text:p>
          </table:table-cell>
          <table:table-cell table:style-name="ce1055" table:formula="of:=IF([$Planilha.E49]=&quot;&quot;;&quot;--------&quot;;FIXED([$Planilha.E49];[$Planilha.$I$87]))" office:value-type="string" office:string-value="1,01" calcext:value-type="string">
            <text:p>1,01</text:p>
          </table:table-cell>
          <table:table-cell table:style-name="ce1055" table:formula="of:=IF([$Planilha.H49]=&quot;&quot;;&quot;--------&quot;;FIXED([$Planilha.H49];[$Planilha.$I$87]))" office:value-type="string" office:string-value="1,01" calcext:value-type="string">
            <text:p>1,01</text:p>
          </table:table-cell>
          <table:table-cell table:style-name="ce1055" table:formula="of:=IF([$Planilha.K49]=&quot;&quot;;&quot;--------&quot;;FIXED([$Planilha.K49];[$Planilha.$I$87]))" office:value-type="string" office:string-value="1,01" calcext:value-type="string">
            <text:p>1,01</text:p>
          </table:table-cell>
          <table:table-cell table:style-name="ce1055" table:formula="of:=IF([$Planilha.N49]=&quot;&quot;;&quot;--------&quot;;FIXED([$Planilha.N49];[$Planilha.$I$87]))" office:value-type="string" office:string-value="1,01" calcext:value-type="string">
            <text:p>1,01</text:p>
          </table:table-cell>
          <table:table-cell table:style-name="ce1097" table:formula="of:=[$Planilha.H73]" office:value-type="float" office:value="0.01" calcext:value-type="float">
            <text:p>0,01</text:p>
          </table:table-cell>
          <table:table-cell table:style-name="ce1111" table:formula="of:=IF([$Planilha.Q73]=&quot;--------&quot;;&quot;--------&quot;;FIXED([$Planilha.Q73];[$Planilha.I88]))" office:value-type="string" office:string-value="0" calcext:value-type="string">
            <text:p>0</text:p>
          </table:table-cell>
          <table:table-cell table:style-name="ce1121" table:formula="of:=IF([$Planilha.R73]=&quot;--------&quot;;&quot;--------&quot;;FIXED([$Planilha.R73];[$Planilha.I88]))" office:value-type="string" office:string-value="2" calcext:value-type="string">
            <text:p>2</text:p>
          </table:table-cell>
          <table:table-cell table:style-name="ce1103" table:formula="of:=IF([$Planilha.S73]=&quot;--------&quot;;&quot;--------&quot;;[$Planilha.S73])" office:value-type="string" office:string-value="Infinito" calcext:value-type="string">
            <text:p>Infinito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47" office:value-type="string" calcext:value-type="string">
            <text:p>CLIENTE:</text:p>
          </table:table-cell>
          <table:table-cell table:style-name="ce972" table:formula="of:=IF([Planilha.E19]=&quot;&quot;;&quot;O MESMO&quot;;[Planilha.E19])" office:value-type="string" office:string-value="O MESMO" calcext:value-type="string">
            <text:p>O MESMO</text:p>
          </table:table-cell>
          <table:table-cell table:style-name="ce976" table:number-columns-repeated="8"/>
          <table:table-cell table:style-name="ce910"/>
          <table:table-cell table:style-name="ce915"/>
          <table:table-cell table:style-name="ce1041" table:formula="of:=IF([Planilha.B50]=&quot;&quot;;&quot;-------&quot;;FIXED([Planilha.B74];[$Planilha.$I$87]))" office:value-type="string" office:string-value="3,00" calcext:value-type="string">
            <text:p>3,00</text:p>
          </table:table-cell>
          <table:table-cell table:style-name="ce1055" table:formula="of:=IF([$Planilha.E50]=&quot;&quot;;&quot;--------&quot;;FIXED([$Planilha.E50];[$Planilha.$I$87]))" office:value-type="string" office:string-value="3,02" calcext:value-type="string">
            <text:p>3,02</text:p>
          </table:table-cell>
          <table:table-cell table:style-name="ce1055" table:formula="of:=IF([$Planilha.H50]=&quot;&quot;;&quot;--------&quot;;FIXED([$Planilha.H50];[$Planilha.$I$87]))" office:value-type="string" office:string-value="3,01" calcext:value-type="string">
            <text:p>3,01</text:p>
          </table:table-cell>
          <table:table-cell table:style-name="ce1055" table:formula="of:=IF([$Planilha.K50]=&quot;&quot;;&quot;--------&quot;;FIXED([$Planilha.K50];[$Planilha.$I$87]))" office:value-type="string" office:string-value="3,02" calcext:value-type="string">
            <text:p>3,02</text:p>
          </table:table-cell>
          <table:table-cell table:style-name="ce1055" table:formula="of:=IF([$Planilha.N50]=&quot;&quot;;&quot;--------&quot;;FIXED([$Planilha.N50];[$Planilha.$I$87]))" office:value-type="string" office:string-value="3,01" calcext:value-type="string">
            <text:p>3,01</text:p>
          </table:table-cell>
          <table:table-cell table:style-name="ce1097" table:formula="of:=[$Planilha.H74]" office:value-type="float" office:value="0.0150000000000001" calcext:value-type="float">
            <text:p>0,02</text:p>
          </table:table-cell>
          <table:table-cell table:style-name="ce1041" table:formula="of:=IF([$Planilha.Q74]=&quot;--------&quot;;&quot;--------&quot;;FIXED([$Planilha.Q74];[$Planilha.I89]))" office:value-type="string" office:string-value="0" calcext:value-type="string">
            <text:p>0</text:p>
          </table:table-cell>
          <table:table-cell table:style-name="ce1120" table:formula="of:=IF([$Planilha.R74]=&quot;--------&quot;;&quot;--------&quot;;FIXED([$Planilha.R74];[$Planilha.I89]))" office:value-type="string" office:string-value="2" calcext:value-type="string">
            <text:p>2</text:p>
          </table:table-cell>
          <table:table-cell table:style-name="ce1103" table:formula="of:=IF([$Planilha.S74]=&quot;--------&quot;;&quot;--------&quot;;[$Planilha.S74])" office:value-type="float" office:value="0.032691742144399" calcext:value-type="float">
            <text:p>0,03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47" office:value-type="string" calcext:value-type="string">
            <text:p>ENDEREÇO:</text:p>
          </table:table-cell>
          <table:table-cell table:style-name="ce972" table:formula="of:=IF([Planilha.E20]=&quot;&quot;;&quot;O MESMO&quot;;[Planilha.E20])" office:value-type="string" office:string-value="O MESMO" calcext:value-type="string">
            <text:p>O MESMO</text:p>
          </table:table-cell>
          <table:table-cell table:style-name="ce976" table:number-columns-repeated="8"/>
          <table:table-cell table:style-name="ce910"/>
          <table:table-cell table:style-name="ce915"/>
          <table:table-cell table:style-name="ce1041" table:formula="of:=IF([Planilha.B51]=&quot;&quot;;&quot;-------&quot;;FIXED([Planilha.B75];[$Planilha.$I$87]))" office:value-type="string" office:string-value="4,00" calcext:value-type="string">
            <text:p>4,00</text:p>
          </table:table-cell>
          <table:table-cell table:style-name="ce1055" table:formula="of:=IF([$Planilha.E51]=&quot;&quot;;&quot;--------&quot;;FIXED([$Planilha.E51];[$Planilha.$I$87]))" office:value-type="string" office:string-value="4,01" calcext:value-type="string">
            <text:p>4,01</text:p>
          </table:table-cell>
          <table:table-cell table:style-name="ce1055" table:formula="of:=IF([$Planilha.H51]=&quot;&quot;;&quot;--------&quot;;FIXED([$Planilha.H51];[$Planilha.$I$87]))" office:value-type="string" office:string-value="4,00" calcext:value-type="string">
            <text:p>4,00</text:p>
          </table:table-cell>
          <table:table-cell table:style-name="ce1055" table:formula="of:=IF([$Planilha.K51]=&quot;&quot;;&quot;--------&quot;;FIXED([$Planilha.K51];[$Planilha.$I$87]))" office:value-type="string" office:string-value="4,01" calcext:value-type="string">
            <text:p>4,01</text:p>
          </table:table-cell>
          <table:table-cell table:style-name="ce1055" table:formula="of:=IF([$Planilha.N51]=&quot;&quot;;&quot;--------&quot;;FIXED([$Planilha.N51];[$Planilha.$I$87]))" office:value-type="string" office:string-value="4,00" calcext:value-type="string">
            <text:p>4,00</text:p>
          </table:table-cell>
          <table:table-cell table:style-name="ce1097" table:formula="of:=[$Planilha.H75]" office:value-type="float" office:value="0.00499999999999989" calcext:value-type="float">
            <text:p>0,00</text:p>
          </table:table-cell>
          <table:table-cell table:style-name="ce1041" table:formula="of:=IF([$Planilha.Q75]=&quot;--------&quot;;&quot;--------&quot;;FIXED([$Planilha.Q75];[$Planilha.I90]))" office:value-type="string" office:string-value="0" calcext:value-type="string">
            <text:p>0</text:p>
          </table:table-cell>
          <table:table-cell table:style-name="ce1120" table:formula="of:=IF([$Planilha.R75]=&quot;--------&quot;;&quot;--------&quot;;FIXED([$Planilha.R75];[$Planilha.I90]))" office:value-type="string" office:string-value="2" calcext:value-type="string">
            <text:p>2</text:p>
          </table:table-cell>
          <table:table-cell table:style-name="ce1103" table:formula="of:=IF([$Planilha.S75]=&quot;--------&quot;;&quot;--------&quot;;[$Planilha.S75])" office:value-type="float" office:value="0.0352668399908985" calcext:value-type="float">
            <text:p>0,04</text:p>
          </table:table-cell>
          <table:table-cell table:style-name="ce1130" table:number-columns-repeated="9"/>
          <table:table-cell table:style-name="ce807" table:number-columns-repeated="16351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07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1041" table:formula="of:=IF([Planilha.B52]=&quot;&quot;;&quot;-------&quot;;FIXED([Planilha.B76];[$Planilha.$I$87]))" office:value-type="string" office:string-value="5,00" calcext:value-type="string">
            <text:p>5,00</text:p>
          </table:table-cell>
          <table:table-cell table:style-name="ce1055" table:formula="of:=IF([$Planilha.E52]=&quot;&quot;;&quot;--------&quot;;FIXED([$Planilha.E52];[$Planilha.$I$87]))" office:value-type="string" office:string-value="5,01" calcext:value-type="string">
            <text:p>5,01</text:p>
          </table:table-cell>
          <table:table-cell table:style-name="ce1055" table:formula="of:=IF([$Planilha.H52]=&quot;&quot;;&quot;--------&quot;;FIXED([$Planilha.H52];[$Planilha.$I$87]))" office:value-type="string" office:string-value="5,00" calcext:value-type="string">
            <text:p>5,00</text:p>
          </table:table-cell>
          <table:table-cell table:style-name="ce1055" table:formula="of:=IF([$Planilha.K52]=&quot;&quot;;&quot;--------&quot;;FIXED([$Planilha.K52];[$Planilha.$I$87]))" office:value-type="string" office:string-value="5,01" calcext:value-type="string">
            <text:p>5,01</text:p>
          </table:table-cell>
          <table:table-cell table:style-name="ce1055" table:formula="of:=IF([$Planilha.N52]=&quot;&quot;;&quot;--------&quot;;FIXED([$Planilha.N52];[$Planilha.$I$87]))" office:value-type="string" office:string-value="5,00" calcext:value-type="string">
            <text:p>5,00</text:p>
          </table:table-cell>
          <table:table-cell table:style-name="ce1097" table:formula="of:=[$Planilha.H76]" office:value-type="float" office:value="0.00499999999999989" calcext:value-type="float">
            <text:p>0,00</text:p>
          </table:table-cell>
          <table:table-cell table:style-name="ce1041" table:formula="of:=IF([$Planilha.Q76]=&quot;--------&quot;;&quot;--------&quot;;FIXED([$Planilha.Q76];[$Planilha.I91]))" office:value-type="string" office:string-value="0" calcext:value-type="string">
            <text:p>0</text:p>
          </table:table-cell>
          <table:table-cell table:style-name="ce1120" table:formula="of:=IF([$Planilha.R76]=&quot;--------&quot;;&quot;--------&quot;;FIXED([$Planilha.R76];[$Planilha.I91]))" office:value-type="string" office:string-value="2" calcext:value-type="string">
            <text:p>2</text:p>
          </table:table-cell>
          <table:table-cell table:style-name="ce1103" table:formula="of:=IF([$Planilha.S76]=&quot;--------&quot;;&quot;--------&quot;;[$Planilha.S76])" office:value-type="float" office:value="0.0383242743181843" calcext:value-type="float">
            <text:p>0,04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33" office:value-type="string" calcext:value-type="string" table:number-columns-spanned="8" table:number-rows-spanned="1">
            <text:p>3. DADOS DO INSTRUMENTO CALIBRADO</text:p>
          </table:table-cell>
          <table:covered-table-cell table:number-columns-repeated="7" table:style-name="ce807"/>
          <table:table-cell table:style-name="ce976" table:number-columns-repeated="2"/>
          <table:table-cell table:style-name="ce910"/>
          <table:table-cell table:style-name="ce915"/>
          <table:table-cell table:style-name="ce1041" table:formula="of:=IF([Planilha.B53]=&quot;&quot;;&quot;-------&quot;;FIXED([Planilha.B77];[$Planilha.$I$87]))" office:value-type="string" office:string-value="7,00" calcext:value-type="string">
            <text:p>7,00</text:p>
          </table:table-cell>
          <table:table-cell table:style-name="ce1055" table:formula="of:=IF([$Planilha.E53]=&quot;&quot;;&quot;--------&quot;;FIXED([$Planilha.E53];[$Planilha.$I$87]))" office:value-type="string" office:string-value="7,01" calcext:value-type="string">
            <text:p>7,01</text:p>
          </table:table-cell>
          <table:table-cell table:style-name="ce1055" table:formula="of:=IF([$Planilha.H53]=&quot;&quot;;&quot;--------&quot;;FIXED([$Planilha.H53];[$Planilha.$I$87]))" office:value-type="string" office:string-value="7,01" calcext:value-type="string">
            <text:p>7,01</text:p>
          </table:table-cell>
          <table:table-cell table:style-name="ce1055" table:formula="of:=IF([$Planilha.K53]=&quot;&quot;;&quot;--------&quot;;FIXED([$Planilha.K53];[$Planilha.$I$87]))" office:value-type="string" office:string-value="7,01" calcext:value-type="string">
            <text:p>7,01</text:p>
          </table:table-cell>
          <table:table-cell table:style-name="ce1055" table:formula="of:=IF([$Planilha.N53]=&quot;&quot;;&quot;--------&quot;;FIXED([$Planilha.N53];[$Planilha.$I$87]))" office:value-type="string" office:string-value="7,01" calcext:value-type="string">
            <text:p>7,01</text:p>
          </table:table-cell>
          <table:table-cell table:style-name="ce1097" table:formula="of:=[$Planilha.H77]" office:value-type="float" office:value="0.00999999999999979" calcext:value-type="float">
            <text:p>0,01</text:p>
          </table:table-cell>
          <table:table-cell table:style-name="ce1041" table:formula="of:=IF([$Planilha.Q77]=&quot;--------&quot;;&quot;--------&quot;;FIXED([$Planilha.Q77];[$Planilha.I92]))" office:value-type="string" office:string-value="0" calcext:value-type="string">
            <text:p>0</text:p>
          </table:table-cell>
          <table:table-cell table:style-name="ce1120" table:formula="of:=IF([$Planilha.R77]=&quot;--------&quot;;&quot;--------&quot;;FIXED([$Planilha.R77];[$Planilha.I92]))" office:value-type="string" office:string-value="2" calcext:value-type="string">
            <text:p>2</text:p>
          </table:table-cell>
          <table:table-cell table:style-name="ce1103" table:formula="of:=IF([$Planilha.S77]=&quot;--------&quot;;&quot;--------&quot;;[$Planilha.S77])" office:value-type="float" office:value="0.0454606056705117" calcext:value-type="float">
            <text:p>0,05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49"/>
          <table:table-cell table:style-name="ce935"/>
          <table:table-cell table:style-name="ce976" table:number-columns-repeated="8"/>
          <table:table-cell table:style-name="ce910"/>
          <table:table-cell table:style-name="ce915"/>
          <table:table-cell table:style-name="ce1041" table:formula="of:=IF([Planilha.B54]=&quot;&quot;;&quot;-------&quot;;FIXED([Planilha.B78];[$Planilha.$I$87]))" office:value-type="string" office:string-value="-------" calcext:value-type="string">
            <text:p>-------</text:p>
          </table:table-cell>
          <table:table-cell table:style-name="ce1055" table:formula="of:=IF([$Planilha.E54]=&quot;&quot;;&quot;--------&quot;;FIXED([$Planilha.E54];[$Planilha.$I$87]))" office:value-type="string" office:string-value="--------" calcext:value-type="string">
            <text:p>--------</text:p>
          </table:table-cell>
          <table:table-cell table:style-name="ce1055" table:formula="of:=IF([$Planilha.H54]=&quot;&quot;;&quot;--------&quot;;FIXED([$Planilha.H54];[$Planilha.$I$87]))" office:value-type="string" office:string-value="--------" calcext:value-type="string">
            <text:p>--------</text:p>
          </table:table-cell>
          <table:table-cell table:style-name="ce1055" table:formula="of:=IF([$Planilha.K54]=&quot;&quot;;&quot;--------&quot;;FIXED([$Planilha.K54];[$Planilha.$I$87]))" office:value-type="string" office:string-value="--------" calcext:value-type="string">
            <text:p>--------</text:p>
          </table:table-cell>
          <table:table-cell table:style-name="ce1055" table:formula="of:=IF([$Planilha.N54]=&quot;&quot;;&quot;--------&quot;;FIXED([$Planilha.N54];[$Planilha.$I$87]))" office:value-type="string" office:string-value="--------" calcext:value-type="string">
            <text:p>--------</text:p>
          </table:table-cell>
          <table:table-cell table:style-name="ce1103" table:formula="of:=IF([$Planilha.O54]=&quot;&quot;;&quot;--------&quot;;FIXED([$Planilha.O54];[$Planilha.$I$87]))" office:value-type="string" office:string-value="--------" calcext:value-type="string">
            <text:p>--------</text:p>
          </table:table-cell>
          <table:table-cell table:style-name="ce1041" table:formula="of:=IF([$Planilha.Q78]=&quot;--------&quot;;&quot;--------&quot;;FIXED([$Planilha.Q78];[$Planilha.I93]))" office:value-type="string" office:string-value="--------" calcext:value-type="string">
            <text:p>--------</text:p>
          </table:table-cell>
          <table:table-cell table:style-name="ce1120" table:formula="of:=IF([$Planilha.R78]=&quot;--------&quot;;&quot;--------&quot;;FIXED([$Planilha.R78];[$Planilha.I93]))" office:value-type="string" office:string-value="--------" calcext:value-type="string">
            <text:p>--------</text:p>
          </table:table-cell>
          <table:table-cell table:style-name="ce1103" table:formula="of:=IF([$Planilha.S78]=&quot;--------&quot;;&quot;--------&quot;;[$Planilha.S78])" office:value-type="string" office:string-value="--------" calcext:value-type="string">
            <text:p>--------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INSTRUMENTO:</text:p>
          </table:table-cell>
          <table:table-cell table:style-name="ce973"/>
          <table:table-cell table:style-name="ce988" table:formula="of:=[Planilha.F23]" office:value-type="string" office:string-value="MANÔMETRO ANALÓGICO" calcext:value-type="string">
            <text:p>MANÔMETRO ANALÓGICO</text:p>
          </table:table-cell>
          <table:table-cell table:style-name="ce976"/>
          <table:table-cell table:style-name="ce807" table:number-columns-repeated="4"/>
          <table:table-cell table:style-name="ce976" table:number-columns-repeated="2"/>
          <table:table-cell table:style-name="ce910"/>
          <table:table-cell table:style-name="ce915"/>
          <table:table-cell table:style-name="ce1041" table:formula="of:=IF([Planilha.B55]=&quot;&quot;;&quot;-------&quot;;FIXED([Planilha.B79];[$Planilha.$I$87]))" office:value-type="string" office:string-value="-------" calcext:value-type="string">
            <text:p>-------</text:p>
          </table:table-cell>
          <table:table-cell table:style-name="ce1055" table:formula="of:=IF([$Planilha.E55]=&quot;&quot;;&quot;--------&quot;;FIXED([$Planilha.E55];[$Planilha.$I$87]))" office:value-type="string" office:string-value="--------" calcext:value-type="string">
            <text:p>--------</text:p>
          </table:table-cell>
          <table:table-cell table:style-name="ce1055" table:formula="of:=IF([$Planilha.H55]=&quot;&quot;;&quot;--------&quot;;FIXED([$Planilha.H55];[$Planilha.$I$87]))" office:value-type="string" office:string-value="--------" calcext:value-type="string">
            <text:p>--------</text:p>
          </table:table-cell>
          <table:table-cell table:style-name="ce1055" table:formula="of:=IF([$Planilha.K55]=&quot;&quot;;&quot;--------&quot;;FIXED([$Planilha.K55];[$Planilha.$I$87]))" office:value-type="string" office:string-value="--------" calcext:value-type="string">
            <text:p>--------</text:p>
          </table:table-cell>
          <table:table-cell table:style-name="ce1055" table:formula="of:=IF([$Planilha.N55]=&quot;&quot;;&quot;--------&quot;;FIXED([$Planilha.N55];[$Planilha.$I$87]))" office:value-type="string" office:string-value="--------" calcext:value-type="string">
            <text:p>--------</text:p>
          </table:table-cell>
          <table:table-cell table:style-name="ce1103" table:formula="of:=IF([$Planilha.O55]=&quot;&quot;;&quot;--------&quot;;FIXED([$Planilha.O55];[$Planilha.$I$87]))" office:value-type="string" office:string-value="--------" calcext:value-type="string">
            <text:p>--------</text:p>
          </table:table-cell>
          <table:table-cell table:style-name="ce1041" table:formula="of:=IF([$Planilha.Q79]=&quot;--------&quot;;&quot;--------&quot;;FIXED([$Planilha.Q79];[$Planilha.I94]))" office:value-type="string" office:string-value="--------" calcext:value-type="string">
            <text:p>--------</text:p>
          </table:table-cell>
          <table:table-cell table:style-name="ce1120" table:formula="of:=IF([$Planilha.R79]=&quot;--------&quot;;&quot;--------&quot;;FIXED([$Planilha.R79];[$Planilha.I94]))" office:value-type="string" office:string-value="--------" calcext:value-type="string">
            <text:p>--------</text:p>
          </table:table-cell>
          <table:table-cell table:style-name="ce1103" table:formula="of:=IF([$Planilha.S79]=&quot;--------&quot;;&quot;--------&quot;;[$Planilha.S79])" office:value-type="string" office:string-value="--------" calcext:value-type="string">
            <text:p>--------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IDENTIFICAÇÃO:</text:p>
          </table:table-cell>
          <table:table-cell table:style-name="ce807"/>
          <table:table-cell table:style-name="ce988" table:formula="of:=IF([Planilha.J23]=&quot;&quot;;&quot;NÃO CONSTA&quot;;[Planilha.J23])" office:value-type="string" office:string-value="BBGB-286" calcext:value-type="string">
            <text:p>BBGB-286</text:p>
          </table:table-cell>
          <table:table-cell table:style-name="ce807" table:number-columns-repeated="5"/>
          <table:table-cell table:style-name="ce976" table:number-columns-repeated="2"/>
          <table:table-cell table:style-name="ce910"/>
          <table:table-cell table:style-name="ce915"/>
          <table:table-cell table:style-name="ce1041" table:formula="of:=IF([Planilha.B56]=&quot;&quot;;&quot;-------&quot;;FIXED([Planilha.B80];[$Planilha.$I$87]))" office:value-type="string" office:string-value="-------" calcext:value-type="string">
            <text:p>-------</text:p>
          </table:table-cell>
          <table:table-cell table:style-name="ce1055" table:formula="of:=IF([$Planilha.E56]=&quot;&quot;;&quot;--------&quot;;FIXED([$Planilha.E56];[$Planilha.$I$87]))" office:value-type="string" office:string-value="--------" calcext:value-type="string">
            <text:p>--------</text:p>
          </table:table-cell>
          <table:table-cell table:style-name="ce1055" table:formula="of:=IF([$Planilha.H56]=&quot;&quot;;&quot;--------&quot;;FIXED([$Planilha.H56];[$Planilha.$I$87]))" office:value-type="string" office:string-value="--------" calcext:value-type="string">
            <text:p>--------</text:p>
          </table:table-cell>
          <table:table-cell table:style-name="ce1055" table:formula="of:=IF([$Planilha.K56]=&quot;&quot;;&quot;--------&quot;;FIXED([$Planilha.K56];[$Planilha.$I$87]))" office:value-type="string" office:string-value="--------" calcext:value-type="string">
            <text:p>--------</text:p>
          </table:table-cell>
          <table:table-cell table:style-name="ce1055" table:formula="of:=IF([$Planilha.N56]=&quot;&quot;;&quot;--------&quot;;FIXED([$Planilha.N56];[$Planilha.$I$87]))" office:value-type="string" office:string-value="--------" calcext:value-type="string">
            <text:p>--------</text:p>
          </table:table-cell>
          <table:table-cell table:style-name="ce1103" table:formula="of:=IF([$Planilha.O56]=&quot;&quot;;&quot;--------&quot;;FIXED([$Planilha.O56];[$Planilha.$I$87]))" office:value-type="string" office:string-value="--------" calcext:value-type="string">
            <text:p>--------</text:p>
          </table:table-cell>
          <table:table-cell table:style-name="ce1041" table:formula="of:=IF([$Planilha.Q80]=&quot;--------&quot;;&quot;--------&quot;;FIXED([$Planilha.Q80];[$Planilha.I95]))" office:value-type="string" office:string-value="--------" calcext:value-type="string">
            <text:p>--------</text:p>
          </table:table-cell>
          <table:table-cell table:style-name="ce1120" table:formula="of:=IF([$Planilha.R80]=&quot;--------&quot;;&quot;--------&quot;;FIXED([$Planilha.R80];[$Planilha.I95]))" office:value-type="string" office:string-value="--------" calcext:value-type="string">
            <text:p>--------</text:p>
          </table:table-cell>
          <table:table-cell table:style-name="ce1103" table:formula="of:=IF([$Planilha.S80]=&quot;--------&quot;;&quot;--------&quot;;[$Planilha.S80])" office:value-type="string" office:string-value="--------" calcext:value-type="string">
            <text:p>--------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MARCA:</text:p>
          </table:table-cell>
          <table:table-cell table:style-name="ce807"/>
          <table:table-cell table:style-name="ce988" table:formula="of:=IF([Planilha.E24]=&quot;&quot;;&quot;NÃO CONSTA&quot;;[Planilha.E24])" office:value-type="string" office:string-value="PROSTEC" calcext:value-type="string">
            <text:p>PROSTEC</text:p>
          </table:table-cell>
          <table:table-cell table:style-name="ce807" table:number-columns-repeated="5"/>
          <table:table-cell table:style-name="ce976" table:number-columns-repeated="2"/>
          <table:table-cell table:style-name="ce910"/>
          <table:table-cell table:style-name="ce915"/>
          <table:table-cell table:style-name="ce1041" table:formula="of:=IF([Planilha.B57]=&quot;&quot;;&quot;-------&quot;;FIXED([Planilha.B81];[$Planilha.$I$87]))" office:value-type="string" office:string-value="-------" calcext:value-type="string">
            <text:p>-------</text:p>
          </table:table-cell>
          <table:table-cell table:style-name="ce1055" table:formula="of:=IF([$Planilha.E57]=&quot;&quot;;&quot;--------&quot;;FIXED([$Planilha.E57];[$Planilha.$I$87]))" office:value-type="string" office:string-value="--------" calcext:value-type="string">
            <text:p>--------</text:p>
          </table:table-cell>
          <table:table-cell table:style-name="ce1055" table:formula="of:=IF([$Planilha.H57]=&quot;&quot;;&quot;--------&quot;;FIXED([$Planilha.H57];[$Planilha.$I$87]))" office:value-type="string" office:string-value="--------" calcext:value-type="string">
            <text:p>--------</text:p>
          </table:table-cell>
          <table:table-cell table:style-name="ce1055" table:formula="of:=IF([$Planilha.K57]=&quot;&quot;;&quot;--------&quot;;FIXED([$Planilha.K57];[$Planilha.$I$87]))" office:value-type="string" office:string-value="--------" calcext:value-type="string">
            <text:p>--------</text:p>
          </table:table-cell>
          <table:table-cell table:style-name="ce1055" table:formula="of:=IF([$Planilha.N57]=&quot;&quot;;&quot;--------&quot;;FIXED([$Planilha.N57];[$Planilha.$I$87]))" office:value-type="string" office:string-value="--------" calcext:value-type="string">
            <text:p>--------</text:p>
          </table:table-cell>
          <table:table-cell table:style-name="ce1103" table:formula="of:=IF([$Planilha.O57]=&quot;&quot;;&quot;--------&quot;;FIXED([$Planilha.O57];[$Planilha.$I$87]))" office:value-type="string" office:string-value="--------" calcext:value-type="string">
            <text:p>--------</text:p>
          </table:table-cell>
          <table:table-cell table:style-name="ce1041" table:formula="of:=IF([$Planilha.Q81]=&quot;--------&quot;;&quot;--------&quot;;FIXED([$Planilha.Q81];[$Planilha.I96]))" office:value-type="string" office:string-value="--------" calcext:value-type="string">
            <text:p>--------</text:p>
          </table:table-cell>
          <table:table-cell table:style-name="ce1120" table:formula="of:=IF([$Planilha.R81]=&quot;--------&quot;;&quot;--------&quot;;FIXED([$Planilha.R81];[$Planilha.I96]))" office:value-type="string" office:string-value="--------" calcext:value-type="string">
            <text:p>--------</text:p>
          </table:table-cell>
          <table:table-cell table:style-name="ce1103" table:formula="of:=IF([$Planilha.S81]=&quot;--------&quot;;&quot;--------&quot;;[$Planilha.S81])" office:value-type="string" office:string-value="--------" calcext:value-type="string">
            <text:p>--------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MODELO:</text:p>
          </table:table-cell>
          <table:table-cell table:style-name="ce807"/>
          <table:table-cell table:style-name="ce988" table:formula="of:=IF([Planilha.G24]=&quot;&quot;;&quot;NÃO CONSTA&quot;;[Planilha.G24])" office:value-type="string" office:string-value="NÃO CONSTA" calcext:value-type="string">
            <text:p>NÃO CONSTA</text:p>
          </table:table-cell>
          <table:table-cell table:style-name="ce807" table:number-columns-repeated="5"/>
          <table:table-cell table:style-name="ce847" table:number-columns-repeated="2"/>
          <table:table-cell table:style-name="ce910"/>
          <table:table-cell table:style-name="ce812"/>
          <table:table-cell table:style-name="ce1041" table:formula="of:=IF([Planilha.B58]=&quot;&quot;;&quot;-------&quot;;FIXED([Planilha.B82];[$Planilha.$I$87]))" office:value-type="string" office:string-value="-------" calcext:value-type="string">
            <text:p>-------</text:p>
          </table:table-cell>
          <table:table-cell table:style-name="ce1055" table:formula="of:=IF([$Planilha.E58]=&quot;&quot;;&quot;--------&quot;;FIXED([$Planilha.E58];[$Planilha.$I$87]))" office:value-type="string" office:string-value="--------" calcext:value-type="string">
            <text:p>--------</text:p>
          </table:table-cell>
          <table:table-cell table:style-name="ce1055" table:formula="of:=IF([$Planilha.H58]=&quot;&quot;;&quot;--------&quot;;FIXED([$Planilha.H58];[$Planilha.$I$87]))" office:value-type="string" office:string-value="--------" calcext:value-type="string">
            <text:p>--------</text:p>
          </table:table-cell>
          <table:table-cell table:style-name="ce1055" table:formula="of:=IF([$Planilha.K58]=&quot;&quot;;&quot;--------&quot;;FIXED([$Planilha.K58];[$Planilha.$I$87]))" office:value-type="string" office:string-value="--------" calcext:value-type="string">
            <text:p>--------</text:p>
          </table:table-cell>
          <table:table-cell table:style-name="ce1055" table:formula="of:=IF([$Planilha.N58]=&quot;&quot;;&quot;--------&quot;;FIXED([$Planilha.N58];[$Planilha.$I$87]))" office:value-type="string" office:string-value="--------" calcext:value-type="string">
            <text:p>--------</text:p>
          </table:table-cell>
          <table:table-cell table:style-name="ce1103" table:formula="of:=IF([$Planilha.O58]=&quot;&quot;;&quot;--------&quot;;FIXED([$Planilha.O58];[$Planilha.$I$87]))" office:value-type="string" office:string-value="--------" calcext:value-type="string">
            <text:p>--------</text:p>
          </table:table-cell>
          <table:table-cell table:style-name="ce1041" table:formula="of:=IF([$Planilha.Q82]=&quot;--------&quot;;&quot;--------&quot;;FIXED([$Planilha.Q82];[$Planilha.I97]))" office:value-type="string" office:string-value="--------" calcext:value-type="string">
            <text:p>--------</text:p>
          </table:table-cell>
          <table:table-cell table:style-name="ce1120" table:formula="of:=IF([$Planilha.R82]=&quot;--------&quot;;&quot;--------&quot;;FIXED([$Planilha.R82];[$Planilha.I97]))" office:value-type="string" office:string-value="--------" calcext:value-type="string">
            <text:p>--------</text:p>
          </table:table-cell>
          <table:table-cell table:style-name="ce1103" table:formula="of:=IF([$Planilha.S82]=&quot;--------&quot;;&quot;--------&quot;;[$Planilha.S82])" office:value-type="string" office:string-value="--------" calcext:value-type="string">
            <text:p>--------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812"/>
          <table:table-cell table:style-name="ce950" office:value-type="string" calcext:value-type="string">
            <text:p>Nº SÉRIE:</text:p>
          </table:table-cell>
          <table:table-cell table:style-name="ce807"/>
          <table:table-cell table:style-name="ce988" table:formula="of:=IF([Planilha.J24]=&quot;&quot;;&quot;NÃO CONSTA&quot;;[Planilha.J24])" office:value-type="string" office:string-value="NÃO CONSTA" calcext:value-type="string">
            <text:p>NÃO CONSTA</text:p>
          </table:table-cell>
          <table:table-cell table:style-name="ce807" table:number-columns-repeated="4"/>
          <table:table-cell table:style-name="ce976" table:number-columns-repeated="3"/>
          <table:table-cell table:style-name="ce910"/>
          <table:table-cell table:style-name="ce915"/>
          <table:table-cell table:style-name="ce1041" table:formula="of:=IF([Planilha.B59]=&quot;&quot;;&quot;-------&quot;;FIXED([Planilha.B83];[$Planilha.$I$87]))" office:value-type="string" office:string-value="-------" calcext:value-type="string">
            <text:p>-------</text:p>
          </table:table-cell>
          <table:table-cell table:style-name="ce1055" table:formula="of:=IF([$Planilha.E59]=&quot;&quot;;&quot;--------&quot;;FIXED([$Planilha.E59];[$Planilha.$I$87]))" office:value-type="string" office:string-value="--------" calcext:value-type="string">
            <text:p>--------</text:p>
          </table:table-cell>
          <table:table-cell table:style-name="ce1055" table:formula="of:=IF([$Planilha.H59]=&quot;&quot;;&quot;--------&quot;;FIXED([$Planilha.H59];[$Planilha.$I$87]))" office:value-type="string" office:string-value="--------" calcext:value-type="string">
            <text:p>--------</text:p>
          </table:table-cell>
          <table:table-cell table:style-name="ce1055" table:formula="of:=IF([$Planilha.K59]=&quot;&quot;;&quot;--------&quot;;FIXED([$Planilha.K59];[$Planilha.$I$87]))" office:value-type="string" office:string-value="--------" calcext:value-type="string">
            <text:p>--------</text:p>
          </table:table-cell>
          <table:table-cell table:style-name="ce1055" table:formula="of:=IF([$Planilha.N59]=&quot;&quot;;&quot;--------&quot;;FIXED([$Planilha.N59];[$Planilha.$I$87]))" office:value-type="string" office:string-value="--------" calcext:value-type="string">
            <text:p>--------</text:p>
          </table:table-cell>
          <table:table-cell table:style-name="ce1103" table:formula="of:=IF([$Planilha.O59]=&quot;&quot;;&quot;--------&quot;;FIXED([$Planilha.O59];[$Planilha.$I$87]))" office:value-type="string" office:string-value="--------" calcext:value-type="string">
            <text:p>--------</text:p>
          </table:table-cell>
          <table:table-cell table:style-name="ce1041" table:formula="of:=IF([$Planilha.Q83]=&quot;--------&quot;;&quot;--------&quot;;FIXED([$Planilha.Q83];[$Planilha.I98]))" office:value-type="string" office:string-value="--------" calcext:value-type="string">
            <text:p>--------</text:p>
          </table:table-cell>
          <table:table-cell table:style-name="ce1120" table:formula="of:=IF([$Planilha.R83]=&quot;--------&quot;;&quot;--------&quot;;FIXED([$Planilha.R83];[$Planilha.I98]))" office:value-type="string" office:string-value="--------" calcext:value-type="string">
            <text:p>--------</text:p>
          </table:table-cell>
          <table:table-cell table:style-name="ce1103" table:formula="of:=IF([$Planilha.S83]=&quot;--------&quot;;&quot;--------&quot;;[$Planilha.S83])" office:value-type="string" office:string-value="--------" calcext:value-type="string">
            <text:p>--------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FAIXA DE INDICAÇÃO:</text:p>
          </table:table-cell>
          <table:table-cell table:style-name="ce973"/>
          <table:table-cell table:style-name="ce990" table:formula="of:=CONCATENATE([Planilha.$E$25];&quot; A &quot;;[Planilha.$G$25];&quot; &quot;;[Planilha.K25])" office:value-type="string" office:string-value="0 A 7 kgf/cm2" calcext:value-type="string">
            <text:p>0 A 7 kgf/cm2</text:p>
          </table:table-cell>
          <table:table-cell table:style-name="ce807"/>
          <table:table-cell table:style-name="ce988"/>
          <table:table-cell table:style-name="ce976" table:number-columns-repeated="5"/>
          <table:table-cell table:style-name="ce910"/>
          <table:table-cell table:style-name="ce915"/>
          <table:table-cell table:style-name="ce1041" table:formula="of:=IF([Planilha.B60]=&quot;&quot;;&quot;-------&quot;;FIXED([Planilha.B84];[$Planilha.$I$87]))" office:value-type="string" office:string-value="-------" calcext:value-type="string">
            <text:p>-------</text:p>
          </table:table-cell>
          <table:table-cell table:style-name="ce1055" table:formula="of:=IF([$Planilha.E60]=&quot;&quot;;&quot;--------&quot;;FIXED([$Planilha.E60];[$Planilha.$I$87]))" office:value-type="string" office:string-value="--------" calcext:value-type="string">
            <text:p>--------</text:p>
          </table:table-cell>
          <table:table-cell table:style-name="ce1055" table:formula="of:=IF([$Planilha.H60]=&quot;&quot;;&quot;--------&quot;;FIXED([$Planilha.H60];[$Planilha.$I$87]))" office:value-type="string" office:string-value="--------" calcext:value-type="string">
            <text:p>--------</text:p>
          </table:table-cell>
          <table:table-cell table:style-name="ce1055" table:formula="of:=IF([$Planilha.K60]=&quot;&quot;;&quot;--------&quot;;FIXED([$Planilha.K60];[$Planilha.$I$87]))" office:value-type="string" office:string-value="--------" calcext:value-type="string">
            <text:p>--------</text:p>
          </table:table-cell>
          <table:table-cell table:style-name="ce1055" table:formula="of:=IF([$Planilha.N60]=&quot;&quot;;&quot;--------&quot;;FIXED([$Planilha.N60];[$Planilha.$I$87]))" office:value-type="string" office:string-value="--------" calcext:value-type="string">
            <text:p>--------</text:p>
          </table:table-cell>
          <table:table-cell table:style-name="ce1103" table:formula="of:=IF([$Planilha.O60]=&quot;&quot;;&quot;--------&quot;;FIXED([$Planilha.O60];[$Planilha.$I$87]))" office:value-type="string" office:string-value="--------" calcext:value-type="string">
            <text:p>--------</text:p>
          </table:table-cell>
          <table:table-cell table:style-name="ce1041" table:formula="of:=IF([$Planilha.Q84]=&quot;--------&quot;;&quot;--------&quot;;FIXED([$Planilha.Q84];[$Planilha.I99]))" office:value-type="string" office:string-value="--------" calcext:value-type="string">
            <text:p>--------</text:p>
          </table:table-cell>
          <table:table-cell table:style-name="ce1120" table:formula="of:=IF([$Planilha.R84]=&quot;--------&quot;;&quot;--------&quot;;FIXED([$Planilha.R84];[$Planilha.I99]))" office:value-type="string" office:string-value="--------" calcext:value-type="string">
            <text:p>--------</text:p>
          </table:table-cell>
          <table:table-cell table:style-name="ce1103" table:formula="of:=IF([$Planilha.S84]=&quot;--------&quot;;&quot;--------&quot;;[$Planilha.S84])" office:value-type="string" office:string-value="--------" calcext:value-type="string">
            <text:p>--------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FAIXA DE CALIBRAÇÃO:</text:p>
          </table:table-cell>
          <table:table-cell table:style-name="ce973"/>
          <table:table-cell table:style-name="ce988" table:formula="of:=CONCATENATE([Planilha.$E$26];&quot; A &quot;;[Planilha.$G$26];&quot; &quot;;[Planilha.K25])" office:value-type="string" office:string-value="0 A 7 kgf/cm2" calcext:value-type="string">
            <text:p>0 A 7 kgf/cm2</text:p>
          </table:table-cell>
          <table:table-cell table:style-name="ce807" table:number-columns-repeated="3"/>
          <table:table-cell table:style-name="ce983"/>
          <table:table-cell table:style-name="ce807"/>
          <table:table-cell table:style-name="ce976" table:number-columns-repeated="2"/>
          <table:table-cell table:style-name="ce910"/>
          <table:table-cell table:style-name="ce915"/>
          <table:table-cell table:style-name="ce1042"/>
          <table:table-cell table:style-name="ce1056"/>
          <table:table-cell table:style-name="ce984"/>
          <table:table-cell table:style-name="ce1073"/>
          <table:table-cell table:style-name="ce807" table:number-columns-repeated="4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RESOLUÇÃO:</text:p>
          </table:table-cell>
          <table:table-cell table:style-name="ce973"/>
          <table:table-cell table:style-name="ce988" table:formula="of:=CONCATENATE([Planilha.$I$25];&quot; &quot;;[Planilha.$K$25])" office:value-type="string" office:string-value="0,1 kgf/cm2" calcext:value-type="string">
            <text:p>0,1 kgf/cm2</text:p>
          </table:table-cell>
          <table:table-cell table:style-name="ce807" table:number-columns-repeated="3"/>
          <table:table-cell table:style-name="ce1018"/>
          <table:table-cell table:style-name="ce807"/>
          <table:table-cell table:style-name="ce976" table:number-columns-repeated="2"/>
          <table:table-cell table:style-name="ce910"/>
          <table:table-cell table:style-name="ce915"/>
          <table:table-cell table:style-name="ce807" table:number-columns-repeated="8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LOCAL DE CALIBRAÇÃO:</text:p>
          </table:table-cell>
          <table:table-cell table:style-name="ce973"/>
          <table:table-cell table:style-name="ce991" table:formula="of:=IF([Planilha.E12]=&quot;&quot;;&quot;ALERTA&quot;;[Planilha.E12])" office:value-type="string" office:string-value="IN LOCO- SERVIÇO EXECUTADO NAS DEPENDÊNCIAS DO CLIENTE" calcext:value-type="string">
            <text:p>IN LOCO- SERVIÇO EXECUTADO NAS DEPENDÊNCIAS DO CLIENTE</text:p>
          </table:table-cell>
          <table:table-cell table:style-name="ce807" table:number-columns-repeated="5"/>
          <table:table-cell table:style-name="ce976" table:number-columns-repeated="2"/>
          <table:table-cell table:style-name="ce910"/>
          <table:table-cell table:style-name="ce915"/>
          <table:table-cell table:style-name="ce833" office:value-type="string" calcext:value-type="string" table:number-columns-spanned="9" table:number-rows-spanned="1">
            <text:p>8.1 CARACTERÍSTICAS METROLÓGICAS APRESENTADAS EM RELAÇÃO À FAIXA DE CALIBRAÇÃO</text:p>
          </table:table-cell>
          <table:covered-table-cell table:number-columns-repeated="7" table:style-name="ce807"/>
          <table:covered-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CLASSE:</text:p>
          </table:table-cell>
          <table:table-cell table:style-name="ce973"/>
          <table:table-cell table:style-name="ce988" table:formula="of:=[$Planilha.I27]" office:value-type="string" office:string-value="B" calcext:value-type="string">
            <text:p>B</text:p>
          </table:table-cell>
          <table:table-cell table:style-name="ce807" table:number-columns-repeated="5"/>
          <table:table-cell table:style-name="ce976" table:number-columns-repeated="2"/>
          <table:table-cell table:style-name="ce910"/>
          <table:table-cell table:style-name="ce915"/>
          <table:table-cell table:style-name="ce807" table:number-columns-repeated="8"/>
          <table:table-cell table:style-name="ce1129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07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1043" office:value-type="string" calcext:value-type="string">
            <text:p>Erro fiducial</text:p>
          </table:table-cell>
          <table:table-cell table:style-name="ce1057" office:value-type="string" calcext:value-type="string">
            <text:p>Histerese</text:p>
          </table:table-cell>
          <table:table-cell table:style-name="ce1057" office:value-type="string" calcext:value-type="string">
            <text:p>Classe</text:p>
          </table:table-cell>
          <table:table-cell table:style-name="ce1057" office:value-type="string" calcext:value-type="string">
            <text:p>Repetibilidade</text:p>
          </table:table-cell>
          <table:table-cell table:style-name="ce1075" office:value-type="string" calcext:value-type="string" table:number-columns-spanned="2" table:number-rows-spanned="1">
            <text:p>Curva de Calibração</text:p>
          </table:table-cell>
          <table:covered-table-cell table:style-name="ce807"/>
          <table:table-cell table:style-name="ce1112"/>
          <table:table-cell table:style-name="ce1122"/>
          <table:table-cell table:style-name="ce807" table:number-columns-repeated="16361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33" office:value-type="string" calcext:value-type="string" table:number-columns-spanned="8" table:number-rows-spanned="1">
            <text:p>4. CONDIÇÕES AMBIENTAIS</text:p>
          </table:table-cell>
          <table:covered-table-cell table:number-columns-repeated="7" table:style-name="ce807"/>
          <table:table-cell table:style-name="ce976" table:number-columns-repeated="2"/>
          <table:table-cell table:style-name="ce910"/>
          <table:table-cell table:style-name="ce915"/>
          <table:table-cell table:style-name="ce1044" table:formula="of:=[$Planilha.E62]" office:value-type="percentage" office:value="0.0017857142857143" calcext:value-type="percentage">
            <text:p>0,2%</text:p>
          </table:table-cell>
          <table:table-cell table:style-name="ce1058" table:formula="of:=[$Planilha.E64]" office:value-type="percentage" office:value="0.00214285714285716" calcext:value-type="percentage">
            <text:p>0,2%</text:p>
          </table:table-cell>
          <table:table-cell table:style-name="ce1058" table:formula="of:=IF([$Planilha.J62]=&quot;&quot;;&quot;--------&quot;;[$Planilha.J62])" office:value-type="string" office:string-value="3A" calcext:value-type="string">
            <text:p>3A</text:p>
          </table:table-cell>
          <table:table-cell table:style-name="ce1058" table:formula="of:=[$Planilha.J64]" office:value-type="percentage" office:value="0.000412393049421171" calcext:value-type="percentage">
            <text:p>0,0%</text:p>
          </table:table-cell>
          <table:table-cell table:style-name="ce1084" table:formula="of:=CONCATENATE(&quot;a = &quot;;FIXED([$Incerteza.AG7];5);&quot;             b= &quot;;FIXED([$Incerteza.AG8];5);&quot;             R²= &quot;;FIXED([$Incerteza.AG9];4))" office:value-type="string" office:string-value="a = -0,00674             b= 0,99965             R²= 1,0000" calcext:value-type="string" table:number-columns-spanned="4" table:number-rows-spanned="1">
            <text:p>a = -0,00674 <text:s text:c="12"/>b= 0,99965 <text:s text:c="12"/>R²= 1,0000</text:p>
          </table:table-cell>
          <table:covered-table-cell table:number-columns-repeated="3" table:style-name="ce807"/>
          <table:table-cell table:style-name="ce807" table:number-columns-repeated="16361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47"/>
          <table:table-cell table:style-name="ce807" table:number-columns-repeated="3"/>
          <table:table-cell table:style-name="ce1005"/>
          <table:table-cell table:style-name="ce947" table:number-columns-repeated="3"/>
          <table:table-cell table:style-name="ce976" table:number-columns-repeated="2"/>
          <table:table-cell table:style-name="ce910"/>
          <table:table-cell table:style-name="ce915"/>
          <table:table-cell table:style-name="ce847"/>
          <table:table-cell table:style-name="ce1059"/>
          <table:table-cell table:style-name="ce847" table:number-columns-repeated="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1" office:value-type="string" calcext:value-type="string" table:number-columns-spanned="2" table:number-rows-spanned="1">
            <text:p>Condição ambiental recomendada</text:p>
          </table:table-cell>
          <table:covered-table-cell table:style-name="ce807"/>
          <table:table-cell table:style-name="ce807"/>
          <table:table-cell table:style-name="ce951" office:value-type="string" calcext:value-type="string" table:number-columns-spanned="2" table:number-rows-spanned="1">
            <text:p>Temperatura medida</text:p>
          </table:table-cell>
          <table:covered-table-cell table:style-name="ce807"/>
          <table:table-cell table:style-name="ce947"/>
          <table:table-cell table:style-name="ce951" office:value-type="string" calcext:value-type="string" table:number-columns-spanned="2" table:number-rows-spanned="1">
            <text:p>Umidade medida</text:p>
          </table:table-cell>
          <table:covered-table-cell table:style-name="ce807"/>
          <table:table-cell table:style-name="ce976" table:number-columns-repeated="2"/>
          <table:table-cell table:style-name="ce910"/>
          <table:table-cell table:style-name="ce915"/>
          <table:table-cell table:style-name="ce833" office:value-type="string" calcext:value-type="string" table:number-columns-spanned="9" table:number-rows-spanned="1">
            <text:p>9. <text:span text:style-name="T9">INFORMAÇÕES ADICIONAIS</text:span></text:p>
          </table:table-cell>
          <table:covered-table-cell table:number-columns-repeated="8"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2" office:value-type="string" calcext:value-type="string">
            <text:p>Temperatura:</text:p>
          </table:table-cell>
          <table:table-cell table:style-name="ce974" office:value-type="string" calcext:value-type="string">
            <text:p>entre 20 e 26 °C</text:p>
          </table:table-cell>
          <table:table-cell table:style-name="ce807"/>
          <table:table-cell table:style-name="ce952" office:value-type="string" calcext:value-type="string">
            <text:p>Inicial:</text:p>
          </table:table-cell>
          <table:table-cell table:style-name="ce1009" table:formula="of:=IF([Planilha.H39]=&quot;&quot;;&quot;ALERTA&quot;;CONCATENATE([Planilha.H39];&quot; °C&quot;))" office:value-type="string" office:string-value="23 °C" calcext:value-type="string">
            <text:p>23 °C</text:p>
          </table:table-cell>
          <table:table-cell table:style-name="ce947"/>
          <table:table-cell table:style-name="ce952" office:value-type="string" calcext:value-type="string">
            <text:p>Inicial:</text:p>
          </table:table-cell>
          <table:table-cell table:style-name="ce1009" table:formula="of:=IF([Planilha.H40]=&quot;&quot;;&quot;ALERTA&quot;;CONCATENATE([Planilha.H40];&quot; %ur&quot;))" office:value-type="string" office:string-value="55 %ur" calcext:value-type="string">
            <text:p>55 %ur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847"/>
          <table:table-cell table:style-name="ce1060" table:number-columns-repeated="6"/>
          <table:table-cell table:style-name="ce847" table:number-columns-repeated="2"/>
          <table:table-cell table:style-name="ce935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3" office:value-type="string" calcext:value-type="string">
            <text:p>Umidade:</text:p>
          </table:table-cell>
          <table:table-cell table:style-name="ce975" office:value-type="string" calcext:value-type="string">
            <text:p>entre 30 e 70 %ur</text:p>
          </table:table-cell>
          <table:table-cell table:style-name="ce807"/>
          <table:table-cell table:style-name="ce953" office:value-type="string" calcext:value-type="string">
            <text:p>Final:</text:p>
          </table:table-cell>
          <table:table-cell table:style-name="ce1009" table:formula="of:=IF([Planilha.K39]=&quot;&quot;;&quot;ALERTA&quot;;CONCATENATE([Planilha.K39];&quot; °C&quot;))" office:value-type="string" office:string-value="23 °C" calcext:value-type="string">
            <text:p>23 °C</text:p>
          </table:table-cell>
          <table:table-cell table:style-name="ce807"/>
          <table:table-cell table:style-name="ce953" office:value-type="string" calcext:value-type="string">
            <text:p>Final:</text:p>
          </table:table-cell>
          <table:table-cell table:style-name="ce1009" table:formula="of:=IF([Planilha.K40]=&quot;&quot;;&quot;ALERTA&quot;;CONCATENATE([Planilha.K40];&quot; %ur&quot;))" office:value-type="string" office:string-value="50 %ur" calcext:value-type="string">
            <text:p>50 %ur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1046" office:value-type="string" calcext:value-type="string">
            <text:p>1) Erro fiducial: relação percentual entre o maior erro do instrumento e a amplitude de medição.</text:p>
          </table:table-cell>
          <table:table-cell table:style-name="ce1060" table:number-columns-repeated="6"/>
          <table:table-cell table:style-name="ce847" table:number-columns-repeated="2"/>
          <table:table-cell table:style-name="ce962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07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1046" office:value-type="string" calcext:value-type="string">
            <text:p>2) Histerese: relação percentual entre a diferença máxima das indicações do medidor em um dos ciclos (carregamento, descarregamento) e a amplitude da faixa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847" table:number-columns-repeated="2"/>
          <table:table-cell table:style-name="ce962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33" office:value-type="string" calcext:value-type="string" table:number-columns-spanned="8" table:number-rows-spanned="1">
            <text:p>5. RASTREABILIDADE METROLÓGICA DOS PADRÕES UTILIZADOS</text:p>
          </table:table-cell>
          <table:covered-table-cell table:number-columns-repeated="7" table:style-name="ce807"/>
          <table:table-cell table:style-name="ce847" table:number-columns-repeated="2"/>
          <table:table-cell table:style-name="ce910"/>
          <table:table-cell table:style-name="ce812"/>
          <table:table-cell table:style-name="ce976" office:value-type="string" calcext:value-type="string">
            <text:p>de escala expandida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1113"/>
          <table:table-cell table:style-name="ce847" table:number-columns-repeated="2"/>
          <table:table-cell table:style-name="ce962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812"/>
          <table:table-cell table:style-name="ce949"/>
          <table:table-cell table:style-name="ce976" table:number-columns-repeated="2"/>
          <table:table-cell table:style-name="ce996"/>
          <table:table-cell table:style-name="ce976" table:number-columns-repeated="3"/>
          <table:table-cell table:style-name="ce1030"/>
          <table:table-cell table:style-name="ce976" table:number-columns-repeated="2"/>
          <table:table-cell table:style-name="ce910"/>
          <table:table-cell table:style-name="ce915"/>
          <table:table-cell table:style-name="ce1046" office:value-type="string" calcext:value-type="string">
            <text:p>3) A incerteza expandida relatada é baseada em uma incerteza padronizada combinada, multiplicada por um fator de abrangência k, para um nível de confiança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847" table:number-columns-repeated="2"/>
          <table:table-cell table:style-name="ce1131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4" office:value-type="string" calcext:value-type="string" table:number-columns-spanned="1" table:number-rows-spanned="2">
            <text:p>Identificação do padrão</text:p>
          </table:table-cell>
          <table:table-cell table:style-name="ce862" office:value-type="string" calcext:value-type="string" table:number-columns-spanned="2" table:number-rows-spanned="2">
            <text:p>Descrição do padrão</text:p>
          </table:table-cell>
          <table:covered-table-cell table:style-name="ce807"/>
          <table:table-cell table:style-name="ce862" office:value-type="string" calcext:value-type="string" table:number-columns-spanned="2" table:number-rows-spanned="2">
            <text:p>Número do certificado</text:p>
          </table:table-cell>
          <table:covered-table-cell table:style-name="ce807"/>
          <table:table-cell table:style-name="ce862" office:value-type="string" calcext:value-type="string" table:number-columns-spanned="1" table:number-rows-spanned="2">
            <text:p>Laboratório</text:p>
          </table:table-cell>
          <table:table-cell table:style-name="ce1019" office:value-type="string" calcext:value-type="string">
            <text:p>Data</text:p>
          </table:table-cell>
          <table:table-cell table:style-name="ce1031" office:value-type="string" calcext:value-type="string">
            <text:p>Data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1046" office:value-type="string" calcext:value-type="string">
            <text:p>de aproximadamente 95%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847" table:number-columns-repeated="2"/>
          <table:table-cell table:style-name="ce962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5"/>
          <table:covered-table-cell table:number-columns-repeated="6" table:style-name="ce807"/>
          <table:table-cell table:style-name="ce1025" office:value-type="string" calcext:value-type="string">
            <text:p>calibração</text:p>
          </table:table-cell>
          <table:table-cell table:style-name="ce1032" office:value-type="string" calcext:value-type="string">
            <text:p>validade</text:p>
          </table:table-cell>
          <table:table-cell table:style-name="ce995" table:number-columns-repeated="2"/>
          <table:table-cell table:style-name="ce910"/>
          <table:table-cell table:style-name="ce916"/>
          <table:table-cell table:style-name="ce976" office:value-type="string" calcext:value-type="string">
            <text:p>4) O presente certificado refere-se exclusivamente ao instrumento calibrado e aqui mencionado, não sendo extensivo a qualquer outro instrumento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847" table:number-columns-repeated="2"/>
          <table:table-cell table:style-name="ce962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6"/>
          <table:table-cell table:style-name="ce955" table:formula="of:=[Incerteza.C119]" office:value-type="string" office:string-value="DSP-010" calcext:value-type="string">
            <text:p>DSP-010</text:p>
          </table:table-cell>
          <table:table-cell table:style-name="ce978" table:formula="of:=[Incerteza.D119]" office:value-type="string" office:string-value="PADRÃO DE PRESSÃO" calcext:value-type="string" table:number-columns-spanned="2" table:number-rows-spanned="1">
            <text:p>PADRÃO DE PRESSÃO</text:p>
          </table:table-cell>
          <table:covered-table-cell table:style-name="ce807"/>
          <table:table-cell table:style-name="ce880" table:formula="of:=[Incerteza.F119]" office:value-type="string" office:string-value="455883/26 " calcext:value-type="string" table:number-columns-spanned="2" table:number-rows-spanned="1">
            <text:p>455883/26 </text:p>
          </table:table-cell>
          <table:covered-table-cell table:style-name="ce807"/>
          <table:table-cell table:style-name="ce997" table:formula="of:=[Incerteza.G119]" office:value-type="string" office:string-value="CAL 0056" calcext:value-type="string">
            <text:p>CAL 0056</text:p>
          </table:table-cell>
          <table:table-cell table:style-name="ce997" table:formula="of:=[Incerteza.E119]" office:value-type="date" office:date-value="2026-03-02" calcext:value-type="date">
            <text:p>2/3/26</text:p>
          </table:table-cell>
          <table:table-cell table:style-name="ce1033" table:formula="of:=IF([Incerteza.H119]&lt;[.G10];&quot;ALERTA&quot;;[Incerteza.H119])" office:value-type="date" office:date-value="2027-03-02" calcext:value-type="date">
            <text:p>mar-27</text:p>
          </table:table-cell>
          <table:table-cell table:style-name="ce847" table:number-columns-repeated="2"/>
          <table:table-cell table:style-name="ce910"/>
          <table:table-cell table:style-name="ce812"/>
          <table:table-cell table:style-name="ce976" office:value-type="string" calcext:value-type="string">
            <text:p>5) É proibida a reprodução parcial ou total deste certificado, sem prévia autorização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847" table:number-columns-repeated="2"/>
          <table:table-cell table:style-name="ce962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812"/>
          <table:table-cell table:style-name="ce956" table:formula="of:=[Padrões.O15]" office:value-type="string" office:string-value="DSP-022" calcext:value-type="string">
            <text:p>DSP-022</text:p>
          </table:table-cell>
          <table:table-cell table:style-name="ce864" table:formula="of:=[Padrões.P15]" office:value-type="string" office:string-value="TERMÔMETRO AMBIENTE" calcext:value-type="string" table:number-columns-spanned="2" table:number-rows-spanned="1">
            <text:p>TERMÔMETRO AMBIENTE</text:p>
          </table:table-cell>
          <table:covered-table-cell table:style-name="ce807"/>
          <table:table-cell table:style-name="ce998" table:formula="of:=[Padrões.R15]" office:value-type="string" office:string-value="LV01043-32754-26-R0" calcext:value-type="string" table:number-columns-spanned="2" table:number-rows-spanned="1">
            <text:p>LV01043-32754-26-R0</text:p>
          </table:table-cell>
          <table:covered-table-cell table:style-name="ce807"/>
          <table:table-cell table:style-name="ce864" table:formula="of:=[Padrões.S15]" office:value-type="string" office:string-value="CAL 0127" calcext:value-type="string">
            <text:p>CAL 0127</text:p>
          </table:table-cell>
          <table:table-cell table:style-name="ce997" table:formula="of:=[Padrões.Q15]" office:value-type="date" office:date-value="2026-03-10" calcext:value-type="date">
            <text:p>10/3/26</text:p>
          </table:table-cell>
          <table:table-cell table:style-name="ce1033" table:formula="of:=IF([Incerteza.H120]&lt;[.G10];&quot;ALERTA&quot;;[Incerteza.H120])" office:value-type="date" office:date-value="2028-03-09" calcext:value-type="date">
            <text:p>mar-28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1046" office:value-type="string" calcext:value-type="string">
            <text:p>6) A referência para os fatores de conversão utilizados na calibração é o DOC-CGCRE-014 do Inmetro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847" table:number-columns-repeated="2"/>
          <table:table-cell table:style-name="ce962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6" table:formula="of:=[Padrões.O21]" office:value-type="string" office:string-value="DSP-022" calcext:value-type="string">
            <text:p>DSP-022</text:p>
          </table:table-cell>
          <table:table-cell table:style-name="ce864" table:formula="of:=[Padrões.P21]" office:value-type="string" office:string-value="HIGRÔMETRO AMBIENTE" calcext:value-type="string" table:number-columns-spanned="2" table:number-rows-spanned="1">
            <text:p>HIGRÔMETRO AMBIENTE</text:p>
          </table:table-cell>
          <table:covered-table-cell table:style-name="ce807"/>
          <table:table-cell table:style-name="ce864" table:formula="of:=[Padrões.R21]" office:value-type="string" office:string-value="LV01043-32754-26-R0" calcext:value-type="string" table:number-columns-spanned="2" table:number-rows-spanned="1">
            <text:p>LV01043-32754-26-R0</text:p>
          </table:table-cell>
          <table:covered-table-cell table:style-name="ce807"/>
          <table:table-cell table:style-name="ce864" table:formula="of:=[Padrões.S21]" office:value-type="string" office:string-value="CAL 0127" calcext:value-type="string">
            <text:p>CAL 0127</text:p>
          </table:table-cell>
          <table:table-cell table:style-name="ce997" table:formula="of:=[Padrões.Q21]" office:value-type="date" office:date-value="2026-03-10" calcext:value-type="date">
            <text:p>10/3/26</text:p>
          </table:table-cell>
          <table:table-cell table:style-name="ce1033" table:formula="of:=IF([Incerteza.H121]&lt;[.G11];&quot;ALERTA&quot;;[Incerteza.H121])" office:value-type="date" office:date-value="2028-03-09" calcext:value-type="date">
            <text:p>mar-28</text:p>
          </table:table-cell>
          <table:table-cell table:style-name="ce971" table:number-columns-repeated="2"/>
          <table:table-cell table:style-name="ce910"/>
          <table:table-cell table:style-name="ce917"/>
          <table:table-cell table:style-name="ce1046" office:value-type="string" calcext:value-type="string">
            <text:p>7) Legenda: “--------” = lacuna vazia</text:p>
          </table:table-cell>
          <table:table-cell table:style-name="ce976" table:number-columns-repeated="7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7"/>
          <table:table-cell table:style-name="ce807" table:number-columns-repeated="8"/>
          <table:table-cell table:style-name="ce971" table:number-columns-repeated="2"/>
          <table:table-cell table:style-name="ce910"/>
          <table:table-cell table:style-name="ce917"/>
          <table:table-cell table:style-name="ce847" office:value-type="string" calcext:value-type="string">
            <text:p>8) P<text:span text:style-name="T1">ref </text:span><text:span text:style-name="T10">=</text:span><text:span text:style-name="T11"> </text:span><text:span text:style-name="T10">Padrão de Referência</text:span></text:p>
          </table:table-cell>
          <table:table-cell table:style-name="ce847" table:number-columns-repeated="8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7"/>
          <table:table-cell table:style-name="ce833" office:value-type="string" calcext:value-type="string" table:number-columns-spanned="8" table:number-rows-spanned="1">
            <text:p>6. PROCEDIMENTO DE CALIBRAÇÃO</text:p>
          </table:table-cell>
          <table:covered-table-cell table:number-columns-repeated="7" table:style-name="ce807"/>
          <table:table-cell table:style-name="ce934" table:number-columns-repeated="2"/>
          <table:table-cell table:style-name="ce910"/>
          <table:table-cell table:style-name="ce918"/>
          <table:table-cell table:style-name="ce847" office:value-type="string" calcext:value-type="string">
            <text:p>9) P<text:span text:style-name="T1">i </text:span><text:span text:style-name="T10">= Padrão de Indicação</text:span></text:p>
          </table:table-cell>
          <table:table-cell table:style-name="ce847" table:number-columns-repeated="8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8"/>
          <table:table-cell table:style-name="ce807"/>
          <table:table-cell table:style-name="ce812" table:number-columns-spanned="8" table:number-rows-spanned="1"/>
          <table:covered-table-cell table:number-columns-repeated="6" table:style-name="ce807"/>
          <table:covered-table-cell table:style-name="ce847"/>
          <table:table-cell table:style-name="ce934"/>
          <table:table-cell table:style-name="ce910"/>
          <table:table-cell table:style-name="ce918"/>
          <table:table-cell table:style-name="ce807"/>
          <table:table-cell table:style-name="ce947" table:number-columns-repeated="7"/>
          <table:table-cell table:style-name="ce847"/>
          <table:table-cell table:style-name="ce1132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8"/>
          <table:table-cell table:style-name="ce957" table:formula="of:=CONCATENATE(&quot;Procedimento &quot;;[Planilha.E30];&quot; Revisão &quot;;[Planilha.J30])" office:value-type="string" office:string-value="Procedimento PDS-019 Revisão 00" calcext:value-type="string" table:number-columns-spanned="8" table:number-rows-spanned="1">
            <text:p>Procedimento PDS-019 Revisão 00</text:p>
          </table:table-cell>
          <table:covered-table-cell table:number-columns-repeated="7" table:style-name="ce807"/>
          <table:table-cell table:style-name="ce980" table:number-columns-repeated="2"/>
          <table:table-cell table:style-name="ce910"/>
          <table:table-cell table:style-name="ce932"/>
          <table:table-cell table:style-name="ce807" table:number-columns-repeated="8"/>
          <table:table-cell table:style-name="ce847"/>
          <table:table-cell table:style-name="ce1133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32"/>
          <table:table-cell table:style-name="ce959" office:value-type="string" calcext:value-type="string">
            <text:p>O manômetro calibrado foi comparado com um manômetro padrão em diversos pontos de sua escala, no sentido crescente e no sentido decrescente, num total de 4 leituras. Para a elaboração do</text:p>
          </table:table-cell>
          <table:table-cell table:style-name="ce980"/>
          <table:table-cell table:style-name="ce992"/>
          <table:table-cell table:style-name="ce999"/>
          <table:table-cell table:style-name="ce1010"/>
          <table:table-cell table:style-name="ce1012"/>
          <table:table-cell table:style-name="ce1010"/>
          <table:table-cell table:style-name="ce1034"/>
          <table:table-cell table:style-name="ce980"/>
          <table:table-cell table:style-name="ce934"/>
          <table:table-cell table:style-name="ce910"/>
          <table:table-cell table:style-name="ce918"/>
          <table:table-cell table:style-name="ce807" table:number-columns-repeated="8"/>
          <table:table-cell table:style-name="ce847"/>
          <table:table-cell table:style-name="ce1133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8"/>
          <table:table-cell table:style-name="ce960" office:value-type="string" calcext:value-type="string">
            <text:p><text:s/>procedimento de calibração foram utilizados como referência os documentos DOQ-Cgcre-014 Orientação para a Realização de Calibração de Medidores Digitais de Pressão, o DOQ-Cgcre-017 </text:p>
          </table:table-cell>
          <table:table-cell table:style-name="ce981" table:number-columns-repeated="7"/>
          <table:table-cell table:style-name="ce934"/>
          <table:table-cell table:style-name="ce935"/>
          <table:table-cell table:style-name="ce910"/>
          <table:table-cell table:style-name="ce933"/>
          <table:table-cell table:style-name="ce807" table:number-columns-repeated="4"/>
          <table:table-cell table:style-name="ce1074" table:number-columns-repeated="4"/>
          <table:table-cell table:style-name="ce976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33"/>
          <table:table-cell table:style-name="ce960" office:value-type="string" calcext:value-type="string">
            <text:p>Orientação para a Realização de Calibração de Medidores Analógicos e Digital de Pressão <text:s/>e outras referências internacionais.</text:p>
          </table:table-cell>
          <table:table-cell table:style-name="ce983" table:number-columns-repeated="7"/>
          <table:table-cell table:style-name="ce935"/>
          <table:table-cell table:style-name="ce847"/>
          <table:table-cell table:style-name="ce910"/>
          <table:table-cell table:style-name="ce812"/>
          <table:table-cell table:style-name="ce1047" table:number-columns-repeated="6"/>
          <table:table-cell table:style-name="ce1115"/>
          <table:table-cell table:style-name="ce1047"/>
          <table:table-cell table:style-name="ce976"/>
          <table:table-cell table:style-name="ce1133" table:number-columns-repeated="16"/>
          <table:table-cell table:style-name="ce807" table:number-columns-repeated="16344"/>
        </table:table-row>
        <table:table-row table:style-name="ro30">
          <table:table-cell table:style-name="ce807"/>
          <table:table-cell table:style-name="ce910"/>
          <table:table-cell table:style-name="ce812"/>
          <table:table-cell table:style-name="Default"/>
          <table:table-cell table:style-name="ce984" table:number-columns-repeated="7"/>
          <table:table-cell table:style-name="ce847"/>
          <table:table-cell table:style-name="ce976"/>
          <table:table-cell table:style-name="ce910"/>
          <table:table-cell table:style-name="ce915"/>
          <table:table-cell table:style-name="ce807" table:number-columns-repeated="8"/>
          <table:table-cell table:style-name="ce976"/>
          <table:table-cell table:style-name="ce1133" table:number-columns-repeated="16"/>
          <table:table-cell table:style-name="ce807" table:number-columns-repeated="16344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Default"/>
          <table:table-cell table:style-name="ce984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1048" table:formula="of:=IF([Planilha.G94]=&quot;&quot;;&quot;ALERTA&quot;;CONCATENATE(&quot;TÉCNICO(A) EXECUTANTE: &quot;;[Planilha.G94]))" office:value-type="string" office:string-value="TÉCNICO(A) EXECUTANTE: DIEGO HENRIQUE ALVES SALDANHA" calcext:value-type="string">
            <text:p>TÉCNICO(A) EXECUTANTE: DIEGO HENRIQUE ALVES SALDANHA</text:p>
          </table:table-cell>
          <table:table-cell table:style-name="ce1067"/>
          <table:table-cell table:style-name="ce1069"/>
          <table:table-cell table:style-name="ce1074"/>
          <table:table-cell table:style-name="ce1047"/>
          <table:table-cell table:style-name="ce1105"/>
          <table:table-cell table:style-name="ce1117" table:formula="of:=IF([Planilha.G96]=&quot;&quot;;&quot;ALERTA&quot;;[Planilha.G96])" office:value-type="string" office:string-value="DIEGO HENRIQUE ALVES SALDANHA" calcext:value-type="string">
            <text:p>DIEGO HENRIQUE ALVES SALDANHA</text:p>
          </table:table-cell>
          <table:table-cell table:style-name="ce1105"/>
          <table:table-cell table:style-name="ce976"/>
          <table:table-cell table:style-name="ce1134" table:number-columns-repeated="2"/>
          <table:table-cell table:style-name="ce1136" table:number-columns-repeated="14"/>
          <table:table-cell table:style-name="ce807" table:number-columns-repeated="16344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Default"/>
          <table:table-cell table:style-name="ce807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1049"/>
          <table:table-cell table:style-name="ce976" table:number-columns-repeated="3"/>
          <table:table-cell table:style-name="ce1047" table:number-columns-repeated="2"/>
          <table:table-cell table:style-name="ce1118" office:value-type="string" calcext:value-type="string">
            <text:p>RESPONSÁVEL / SIGNATÁRIO AUTORIZADO</text:p>
          </table:table-cell>
          <table:table-cell table:style-name="ce1047"/>
          <table:table-cell table:style-name="ce976"/>
          <table:table-cell table:style-name="ce1134" table:number-columns-repeated="2"/>
          <table:table-cell table:style-name="ce1136" table:number-columns-repeated="14"/>
          <table:table-cell table:style-name="ce807" table:number-columns-repeated="16344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33" office:value-type="string" calcext:value-type="string" table:number-columns-spanned="8" table:number-rows-spanned="1">
            <text:p>7. OBSERVAÇÕES</text:p>
          </table:table-cell>
          <table:covered-table-cell table:number-columns-repeated="7" table:style-name="ce807"/>
          <table:table-cell table:style-name="ce976" table:number-columns-repeated="2"/>
          <table:table-cell table:style-name="ce910"/>
          <table:table-cell table:style-name="ce915"/>
          <table:table-cell table:style-name="ce976" table:number-columns-repeated="4"/>
          <table:table-cell table:style-name="ce1047" table:number-columns-repeated="2"/>
          <table:table-cell table:style-name="ce1118"/>
          <table:table-cell table:style-name="ce1047"/>
          <table:table-cell table:style-name="ce807"/>
          <table:table-cell table:style-name="ce1135" table:number-columns-repeated="2"/>
          <table:table-cell table:style-name="ce1137" table:number-columns-repeated="14"/>
          <table:table-cell table:style-name="ce807" table:number-columns-repeated="16344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47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1050"/>
          <table:table-cell table:style-name="ce947" table:number-columns-repeated="7"/>
          <table:table-cell table:style-name="ce976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62" table:formula="of:=IF([Planilha.D90]=&quot;&quot;;&quot;1 - Não aplicável a este instrumento&quot;;CONCATENATE(&quot;1 - &quot;;[Planilha.D90]))" office:value-type="string" office:string-value="1 - Não aplicável a este instrumento" calcext:value-type="string">
            <text:p>1 - Não aplicável a este instrumento</text:p>
          </table:table-cell>
          <table:table-cell table:style-name="ce985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1050"/>
          <table:table-cell table:style-name="ce947" table:number-columns-repeated="7"/>
          <table:table-cell table:style-name="ce976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07" table:formula="of:=IF([Planilha.D91]=&quot;&quot;;&quot;&quot;;CONCATENATE(&quot;2 - &quot;;[Planilha.D91]))">
            <text:p/>
          </table:table-cell>
          <table:table-cell table:style-name="ce985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850"/>
          <table:table-cell table:style-name="ce807" table:number-columns-repeated="7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07" table:formula="of:=IF([Planilha.D92]=&quot;&quot;;&quot;&quot;;CONCATENATE(&quot;3 - &quot;;[Planilha.D92]))">
            <text:p/>
          </table:table-cell>
          <table:table-cell table:style-name="ce947" table:number-columns-repeated="4"/>
          <table:table-cell table:style-name="ce1013"/>
          <table:table-cell table:style-name="ce947" table:number-columns-repeated="2"/>
          <table:table-cell table:style-name="ce976" table:number-columns-repeated="2"/>
          <table:table-cell table:style-name="ce910"/>
          <table:table-cell table:style-name="ce915"/>
          <table:table-cell table:style-name="ce847" table:number-columns-spanned="8" table:number-rows-spanned="1"/>
          <table:covered-table-cell table:number-columns-repeated="7" table:style-name="ce807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64"/>
          <table:table-cell table:style-name="ce976" table:number-columns-repeated="9"/>
          <table:table-cell table:style-name="ce910"/>
          <table:table-cell table:style-name="ce915"/>
          <table:table-cell table:style-name="ce966" table:number-columns-spanned="8" table:number-rows-spanned="1"/>
          <table:covered-table-cell table:number-columns-repeated="7" table:style-name="ce807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64"/>
          <table:table-cell table:style-name="ce976" table:number-columns-repeated="9"/>
          <table:table-cell table:style-name="ce910"/>
          <table:table-cell table:style-name="ce915"/>
          <table:table-cell table:style-name="ce967" table:number-columns-spanned="8" table:number-rows-spanned="1"/>
          <table:covered-table-cell table:number-columns-repeated="7" table:style-name="ce807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50" table:number-columns-spanned="8" table:number-rows-spanned="1"/>
          <table:covered-table-cell table:number-columns-repeated="7" table:style-name="ce807"/>
          <table:table-cell table:style-name="ce934" table:number-columns-repeated="2"/>
          <table:table-cell table:style-name="ce910"/>
          <table:table-cell table:style-name="ce918"/>
          <table:table-cell table:style-name="ce1051" table:number-columns-spanned="8" table:number-rows-spanned="1"/>
          <table:covered-table-cell table:number-columns-repeated="7" table:style-name="ce807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34"/>
          <table:table-cell table:style-name="ce847" table:number-columns-spanned="8" table:number-rows-spanned="1"/>
          <table:covered-table-cell table:number-columns-repeated="7" table:style-name="ce807"/>
          <table:table-cell table:style-name="ce934" table:number-columns-repeated="2"/>
          <table:table-cell table:style-name="ce910"/>
          <table:table-cell table:style-name="ce934"/>
          <table:table-cell table:style-name="ce807" table:number-columns-repeated="8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34"/>
          <table:table-cell table:style-name="ce966" table:number-columns-spanned="8" table:number-rows-spanned="1"/>
          <table:covered-table-cell table:number-columns-repeated="7" table:style-name="ce807"/>
          <table:table-cell table:style-name="ce934" table:number-columns-repeated="2"/>
          <table:table-cell table:style-name="ce910"/>
          <table:table-cell table:style-name="ce934"/>
          <table:table-cell table:style-name="ce807" table:number-columns-repeated="8"/>
          <table:table-cell table:style-name="ce847"/>
          <table:table-cell table:style-name="ce807" table:number-columns-repeated="17"/>
          <table:table-cell table:style-name="ce1" table:number-columns-repeated="16343"/>
        </table:table-row>
        <table:table-row table:style-name="ro30">
          <table:table-cell table:style-name="ce807"/>
          <table:table-cell table:style-name="ce910"/>
          <table:table-cell table:style-name="ce934"/>
          <table:table-cell table:style-name="ce967" table:number-columns-spanned="8" table:number-rows-spanned="1"/>
          <table:covered-table-cell table:number-columns-repeated="7" table:style-name="ce807"/>
          <table:table-cell table:style-name="ce935" table:number-columns-repeated="2"/>
          <table:table-cell table:style-name="ce910"/>
          <table:table-cell table:style-name="ce935"/>
          <table:table-cell table:style-name="ce807" table:number-columns-repeated="8"/>
          <table:table-cell table:style-name="ce847"/>
          <table:table-cell table:style-name="ce807" table:number-columns-repeated="17"/>
          <table:table-cell table:style-name="ce1" table:number-columns-repeated="16343"/>
        </table:table-row>
        <table:table-row table:style-name="ro30">
          <table:table-cell table:style-name="ce807"/>
          <table:table-cell table:style-name="ce910"/>
          <table:table-cell table:style-name="ce935"/>
          <table:table-cell table:style-name="ce850" office:value-type="string" calcext:value-type="string" table:number-columns-spanned="8" table:number-rows-spanned="1">
            <text:p>Página 01/02</text:p>
          </table:table-cell>
          <table:covered-table-cell table:number-columns-repeated="7" table:style-name="ce807"/>
          <table:table-cell table:style-name="ce934" table:number-columns-repeated="2"/>
          <table:table-cell table:style-name="ce910"/>
          <table:table-cell table:style-name="ce934"/>
          <table:table-cell table:style-name="ce850" office:value-type="string" calcext:value-type="string" table:number-columns-spanned="8" table:number-rows-spanned="1">
            <text:p>Página 02/02</text:p>
          </table:table-cell>
          <table:covered-table-cell table:number-columns-repeated="7" table:style-name="ce807"/>
          <table:table-cell table:style-name="ce847"/>
          <table:table-cell table:style-name="ce807" table:number-columns-repeated="17"/>
          <table:table-cell table:style-name="ce1" table:number-columns-repeated="16343"/>
        </table:table-row>
        <table:table-row table:style-name="ro30">
          <table:table-cell/>
          <table:table-cell table:style-name="ce920"/>
          <table:table-cell table:style-name="ce493"/>
          <table:table-cell table:style-name="ce86" table:number-columns-spanned="8" table:number-rows-spanned="1"/>
          <table:covered-table-cell table:number-columns-repeated="7"/>
          <table:table-cell table:number-columns-repeated="30"/>
          <table:table-cell table:style-name="ce1" table:number-columns-repeated="16343"/>
        </table:table-row>
        <table:table-row table:style-name="ro26" table:visibility="collapse">
          <table:table-cell table:number-columns-repeated="3"/>
          <table:table-cell table:style-name="ce86" table:number-columns-spanned="8" table:number-rows-spanned="1"/>
          <table:covered-table-cell table:number-columns-repeated="7"/>
          <table:table-cell table:number-columns-repeated="30"/>
          <table:table-cell table:style-name="ce1" table:number-columns-repeated="16343"/>
        </table:table-row>
        <table:table-row table:style-name="ro30" table:visibility="collapse">
          <table:table-cell table:number-columns-repeated="3"/>
          <table:table-cell table:style-name="ce86" table:number-columns-repeated="8"/>
          <table:table-cell table:number-columns-repeated="14"/>
          <table:table-cell table:style-name="ce74"/>
          <table:table-cell table:number-columns-repeated="15"/>
          <table:table-cell table:style-name="ce1" table:number-columns-repeated="16343"/>
        </table:table-row>
        <table:table-row table:style-name="ro31" table:visibility="collapse">
          <table:table-cell table:number-columns-repeated="3"/>
          <table:table-cell table:style-name="ce86" table:number-columns-repeated="8"/>
          <table:table-cell table:number-columns-repeated="30"/>
          <table:table-cell table:style-name="ce1" table:number-columns-repeated="16343"/>
        </table:table-row>
        <table:table-row table:style-name="ro6" table:visibility="collapse" table:number-rows-repeated="2">
          <table:table-cell table:number-columns-repeated="3"/>
          <table:table-cell table:style-name="ce86" table:number-columns-repeated="8"/>
          <table:table-cell table:number-columns-repeated="30"/>
          <table:table-cell table:style-name="ce1" table:number-columns-repeated="16343"/>
        </table:table-row>
        <table:table-row table:style-name="ro9" table:visibility="collapse" table:number-rows-repeated="6">
          <table:table-cell table:number-columns-repeated="3"/>
          <table:table-cell table:style-name="ce86" table:number-columns-repeated="8"/>
          <table:table-cell table:number-columns-repeated="30"/>
          <table:table-cell table:style-name="ce1" table:number-columns-repeated="16343"/>
        </table:table-row>
        <table:table-row table:style-name="ro9" table:visibility="collapse">
          <table:table-cell table:number-columns-repeated="3"/>
          <table:table-cell table:style-name="ce86" table:number-columns-repeated="3"/>
          <table:table-cell table:style-name="ce86" table:number-columns-spanned="2" table:number-rows-spanned="2"/>
          <table:covered-table-cell/>
          <table:table-cell table:style-name="ce86" table:number-columns-repeated="3"/>
          <table:table-cell table:number-columns-repeated="30"/>
          <table:table-cell table:style-name="ce1" table:number-columns-repeated="16343"/>
        </table:table-row>
        <table:table-row table:style-name="ro9" table:visibility="collapse">
          <table:table-cell table:number-columns-repeated="3"/>
          <table:table-cell table:style-name="ce86" table:number-columns-repeated="3"/>
          <table:covered-table-cell table:number-columns-repeated="2"/>
          <table:table-cell table:style-name="ce86" table:number-columns-repeated="3"/>
          <table:table-cell table:number-columns-repeated="30"/>
          <table:table-cell table:style-name="ce1" table:number-columns-repeated="16343"/>
        </table:table-row>
        <table:table-row table:style-name="ro9" table:visibility="collapse">
          <table:table-cell table:number-columns-repeated="3"/>
          <table:table-cell table:style-name="ce86" table:number-columns-repeated="8"/>
          <table:table-cell table:number-columns-repeated="30"/>
          <table:table-cell table:style-name="ce1" table:number-columns-repeated="16343"/>
        </table:table-row>
        <table:table-row table:style-name="ro9" table:visibility="collapse" table:number-rows-repeated="52">
          <table:table-cell table:number-columns-repeated="41"/>
          <table:table-cell table:style-name="ce1" table:number-columns-repeated="16343"/>
        </table:table-row>
        <table:table-row table:style-name="ro18" table:visibility="collapse">
          <table:table-cell table:number-columns-repeated="3"/>
          <table:table-cell table:style-name="ce86" table:number-columns-spanned="3" table:number-rows-spanned="1"/>
          <table:covered-table-cell table:number-columns-repeated="2"/>
          <table:table-cell table:style-name="ce526" table:number-columns-spanned="5" table:number-rows-spanned="1"/>
          <table:covered-table-cell table:number-columns-repeated="4"/>
          <table:table-cell table:style-name="ce961" table:number-columns-repeated="4"/>
          <table:table-cell table:number-columns-repeated="26"/>
          <table:table-cell table:style-name="ce1" table:number-columns-repeated="16343"/>
        </table:table-row>
        <table:table-row table:style-name="ro9" table:visibility="collapse">
          <table:table-cell table:number-columns-repeated="41"/>
          <table:table-cell table:style-name="ce1" table:number-columns-repeated="16343"/>
        </table:table-row>
        <table:table-row table:style-name="ro9" table:number-rows-repeated="1048437">
          <table:table-cell table:number-columns-repeated="41"/>
          <table:table-cell table:style-name="ce1" table:number-columns-repeated="16343"/>
        </table:table-row>
        <table:table-row table:style-name="ro9">
          <table:table-cell table:number-columns-repeated="41"/>
          <table:table-cell table:style-name="ce1" table:number-columns-repeated="16343"/>
        </table:table-row>
        <table:named-expressions>
          <table:named-range table:name="Print_Area" table:base-cell-address="$Certificado.$A$1" table:cell-range-address="Certificado.$A$1:Certificado.$Y$71"/>
        </table:named-expressions>
        <calcext:conditional-formats>
          <calcext:conditional-format calcext:target-range-address="Certificado.F16:Certificado.F16 Certificado.J16:Certificado.J16 Certificado.F32:Certificado.F32 Certificado.P57:Certificado.P57">
            <calcext:condition calcext:apply-style-name="cf18" calcext:value="=&quot;ALERTA&quot;" calcext:base-cell-address="Certificado.F16"/>
          </calcext:conditional-format>
          <calcext:conditional-format calcext:target-range-address="Certificado.F10:Certificado.G10 Certificado.K10:Certificado.K10 Certificado.X10:Certificado.X10 Certificado.R10:Certificado.S10">
            <calcext:condition calcext:apply-style-name="cf17" calcext:value="=&quot;ALERTA&quot;" calcext:base-cell-address="Certificado.F10"/>
          </calcext:conditional-format>
          <calcext:conditional-format calcext:target-range-address="Certificado.E14:Certificado.E15 Certificado.K42:Certificado.K47 Certificado.K52:Certificado.K52 Certificado.V54:Certificado.V54 Certificado.V56:Certificado.V58 Certificado.P56:Certificado.P56 Certificado.H38:Certificado.H39 Certificado.K38:Certificado.K39 Certificado.F29:Certificado.F29">
            <calcext:condition calcext:apply-style-name="cf15" calcext:value="=&quot;ALERTA&quot;" calcext:base-cell-address="Certificado.E14"/>
          </calcext:conditional-format>
        </calcext:conditional-formats>
      </table:table>
      <table:named-expressions/>
      <table:database-ranges>
        <table:database-range table:name="__Anonymous_Sheet_DB__0" table:target-range-address="Planilha.A68:Planilha.S8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Narrow1" svg:font-family="'Arial Narrow'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family-generic="swiss"/>
    <style:font-face style:name="Arial21" svg:font-family="Arial2"/>
    <style:font-face style:name="Arial3" svg:font-family="Arial"/>
    <style:font-face style:name="Bookman Old Style" svg:font-family="'Bookman Old Style'" style:font-family-generic="roman"/>
    <style:font-face style:name="Bookman Old Style1" svg:font-family="'Bookman Old Style'" style:font-family-generic="roman" style:font-pitch="variable"/>
    <style:font-face style:name="Bookman Old Style2" svg:font-family="'Bookman Old Style'"/>
    <style:font-face style:name="Calibri" svg:font-family="Calibri" style:font-family-generic="swiss"/>
    <style:font-face style:name="Calibri1" svg:font-family="Calibri"/>
    <style:font-face style:name="Calibri11" svg:font-family="Calibri1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2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6">
      <number:number number:decimal-places="4" number:min-decimal-places="4" number:min-integer-digits="1"/>
    </number:number-style>
    <number:date-style style:name="N117">
      <number:day/>
      <number:text>/</number:text>
      <number:month/>
      <number:text>/</number:text>
      <number:year/>
    </number:date-style>
    <number:date-style style:name="N118">
      <number:month number:textual="true"/>
      <number:text>-</number:text>
      <number:year/>
    </number:date-style>
    <number:number-style style:name="N119">
      <number:number number:decimal-places="1" number:min-decimal-places="1" number:min-integer-digits="1"/>
    </number:number-style>
    <number:date-style style:name="N120">
      <number:month number:style="long" number:textual="true"/>
      <number:text>-</number:text>
      <number:year/>
    </number:date-style>
    <number:number-style style:name="N121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0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4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5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6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7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8">
      <number:number number:decimal-places="4" number:min-decimal-places="4" number:min-integer-digits="1" number:grouping="true"/>
    </number:number-style>
    <number:number-style style:name="N139">
      <number:number number:decimal-places="6" number:min-decimal-places="6" number:min-integer-digits="1" number:grouping="true"/>
    </number:number-style>
    <number:number-style style:name="N140">
      <number:number number:decimal-places="7" number:min-decimal-places="7" number:min-integer-digits="1" number:grouping="true"/>
    </number:number-style>
    <number:number-style style:name="N141">
      <number:number number:decimal-places="8" number:min-decimal-places="8" number:min-integer-digits="1" number:grouping="true"/>
    </number:number-style>
    <number:number-style style:name="N142">
      <number:number number:decimal-places="9" number:min-decimal-places="9" number:min-integer-digits="1" number:grouping="true"/>
    </number:number-style>
    <number:number-style style:name="N143">
      <number:number number:decimal-places="10" number:min-decimal-places="10" number:min-integer-digits="1" number:grouping="true"/>
    </number:number-style>
    <number:number-style style:name="N144">
      <number:number number:decimal-places="11" number:min-decimal-places="11" number:min-integer-digits="1" number:grouping="true"/>
    </number:number-style>
    <number:number-style style:name="N145">
      <number:number number:decimal-places="12" number:min-decimal-places="12" number:min-integer-digits="1" number:grouping="true"/>
    </number:number-style>
    <number:number-style style:name="N146">
      <number:number number:decimal-places="13" number:min-decimal-places="13" number:min-integer-digits="1" number:grouping="true"/>
    </number:number-style>
    <number:number-style style:name="N148P0" style:volatile="true">
      <number:text>Ativar</number:text>
    </number:number-style>
    <number:number-style style:name="N148P1" style:volatile="true">
      <number:text>Ativar</number:text>
    </number:number-style>
    <number:number-style style:name="N148">
      <number:text>Desativar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decimal-places="0" number:min-decimal-places="0" number:min-integer-digits="1" number:grouping="true"/>
    </number:number-style>
    <number:number-style style:name="N149">
      <number:text>-</number:text>
      <number:number number:decimal-places="0" number:min-decimal-places="0" number:min-integer-digits="1" number:grouping="true"/>
      <style:map style:condition="value()&gt;=0" style:apply-style-name="N149P0"/>
    </number:number-style>
    <number:date-style style:name="N150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">
      <number:number number:decimal-places="0" number:min-decimal-places="0" number:min-integer-digits="7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">
      <number:number number:decimal-places="0" number:min-decimal-places="0" number:min-integer-digits="4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">
      <number:number number:decimal-places="0" number:min-decimal-places="0" number:min-integer-digits="0"/>
    </number:number-style>
    <number:time-style style:name="N157">
      <number:minutes number:style="long"/>
      <number:text>:</number:text>
      <number:seconds number:style="long"/>
    </number:time-style>
    <number:number-style style:name="N158">
      <number:number number:decimal-places="4" number:min-decimal-places="4" number:min-integer-digits="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5" number:min-decimal-places="5" number:min-integer-digits="0"/>
    </number:number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number number:decimal-places="12" number:min-decimal-places="12" number:min-integer-digits="1"/>
    </number:number-style>
    <number:number-style style:name="N16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4" number:min-decimal-places="14" number:min-integer-digits="1"/>
    </number:number-style>
    <number:number-style style:name="N166">
      <number:number number:decimal-places="6" number:min-decimal-places="6" number:min-integer-digits="1"/>
    </number:number-style>
    <number:number-style style:name="N167">
      <number:number number:decimal-places="16" number:min-decimal-places="16" number:min-integer-digits="1"/>
    </number:number-style>
    <number:number-style style:name="N168">
      <number:number number:decimal-places="17" number:min-decimal-places="17" number:min-integer-digits="1"/>
    </number:number-style>
    <number:number-style style:name="N169">
      <number:number number:decimal-places="18" number:min-decimal-places="18" number:min-integer-digits="1"/>
    </number:number-style>
    <number:number-style style:name="N170">
      <number:number number:decimal-places="19" number:min-decimal-places="19" number:min-integer-digits="1"/>
    </number:number-style>
    <number:number-style style:name="N171">
      <number:number number:decimal-places="1" number:min-decimal-places="1" number:min-integer-digits="1" number:grouping="true"/>
    </number:number-style>
    <number:number-style style:name="N172">
      <number:number number:decimal-places="8" number:min-decimal-places="8" number:min-integer-digits="1"/>
    </number:number-style>
    <number:number-style style:name="N173">
      <number:number number:decimal-places="9" number:min-decimal-places="9" number:min-integer-digits="1"/>
    </number:number-style>
    <number:number-style style:name="N174">
      <number:number number:decimal-places="10" number:min-decimal-places="10" number:min-integer-digits="1"/>
    </number:number-style>
    <number:number-style style:name="N175">
      <number:number number:decimal-places="11" number:min-decimal-places="11" number:min-integer-digits="1"/>
    </number:number-style>
    <number:number-style style:name="N17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7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">
      <number:number number:decimal-places="8" number:min-decimal-places="8" number:min-integer-digits="0" number:grouping="true"/>
    </number:number-style>
    <number:date-style style:name="N179">
      <number:month number:textual="true"/>
      <number:text>/</number:text>
      <number:year number:style="long"/>
    </number:date-style>
    <number:number-style style:name="N18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date-style style:name="N181">
      <number:day number:style="long"/>
      <number:month number:style="long"/>
      <number:year/>
    </number:date-style>
    <number:number-style style:name="N182">
      <number:number number:decimal-places="0" number:min-decimal-places="0" number:min-integer-digits="2"/>
    </number:number-style>
    <number:time-style style:name="N183">
      <number:minutes/>
      <number:text>:</number:text>
      <number:seconds number:style="long" number:decimal-places="2"/>
    </number:time-style>
    <number:number-style style:name="N18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90P0" style:volatile="true"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94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94P2" style:volatile="true">
      <number:text> R$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98P2" style:volatile="true">
      <number:text>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202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202P2" style:volatile="true">
      <number:text> R$ -</number:text>
      <number:number number:decimal-places="0" number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/>
      <number:text>-</number:text>
      <number:month number:textual="true"/>
      <number:text>-</number:text>
      <number:year/>
    </number:date-style>
    <number:date-style style:name="N204">
      <number:day number:style="long"/>
      <number:text>-</number:text>
      <number:month number:textual="true"/>
      <number:text>-</number:text>
      <number:year/>
    </number:date-style>
    <number:number-style style:name="N205">
      <number:number number:decimal-places="17" number:min-decimal-places="17" number:min-integer-digits="1" number:grouping="true"/>
    </number:number-style>
    <number:number-style style:name="N206">
      <number:number number:decimal-places="15" number:min-decimal-places="15" number:min-integer-digits="1"/>
    </number:number-style>
    <number:number-style style:name="N208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208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209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211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212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</number:text>
      <number:number number:decimal-places="0" number:min-decimal-places="0" number:min-integer-digits="1" number:grouping="true"/>
      <number:text> </number:text>
    </number:number-style>
    <number:number-style style:name="N216P1" style:volatile="true">
      <number:text> R$(</number:text>
      <number:number number:decimal-places="0" number:min-decimal-places="0" number:min-integer-digits="1" number:grouping="true"/>
      <number:text>)</number:text>
    </number:number-style>
    <number:number-style style:name="N216P2" style:volatile="true">
      <number:text> R$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</number:text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 R$(</number:text>
      <number:number number:decimal-places="2" number:min-decimal-places="2" number:min-integer-digits="1" number:grouping="true"/>
      <number:text>)</number:text>
    </number:number-style>
    <number:number-style style:name="N220P2" style:volatile="true">
      <number:text> R$-</number:text>
      <number:number number:decimal-places="0" number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Sim</number:text>
    </number:number-style>
    <number:number-style style:name="N222P1" style:volatile="true">
      <number:text>Sim</number:text>
    </number:number-style>
    <number:number-style style:name="N222">
      <number:text>Nã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Verdadeiro</number:text>
    </number:number-style>
    <number:number-style style:name="N224P1" style:volatile="true">
      <number:text>Verdadeiro</number:text>
    </number:number-style>
    <number:number-style style:name="N224">
      <number:text>Falso</number:text>
      <style:map style:condition="value()&gt;0" style:apply-style-name="N224P0"/>
      <style:map style:condition="value()&lt;0" style:apply-style-name="N224P1"/>
    </number:number-style>
    <number:date-style style:name="N225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26">
      <number:number number:decimal-places="0" number:min-decimal-places="0" number:min-integer-digits="0" number:grouping="true"/>
    </number:number-style>
    <number:number-style style:name="N228P0" style:volatile="true">
      <number:text>R$ </number:text>
      <number:number number:decimal-places="0" number:min-decimal-places="0" number:min-integer-digits="1" number:grouping="true"/>
    </number:number-style>
    <number:number-style style:name="N228">
      <number:text>-R$ </number:text>
      <number:number number:decimal-places="0" number:min-decimal-places="0" number:min-integer-digits="1" number:grouping="true"/>
      <style:map style:condition="value()&gt;=0" style:apply-style-name="N228P0"/>
    </number:number-style>
    <number:number-style style:name="N229P0" style:volatile="true">
      <number:text>R$ </number:text>
      <number:number number:decimal-places="0" number:min-decimal-places="0" number:min-integer-digits="1" number:grouping="true"/>
    </number:number-style>
    <number:number-style style:name="N229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229P0"/>
    </number:number-style>
    <number:number-style style:name="N231P0" style:volatile="true">
      <number:text>R$ </number:text>
      <number:number number:decimal-places="2" number:min-decimal-places="2" number:min-integer-digits="1" number:grouping="true"/>
    </number:number-style>
    <number:number-style style:name="N231">
      <number:text>-R$ </number:text>
      <number:number number:decimal-places="2" number:min-decimal-places="2" number:min-integer-digits="1" number:grouping="true"/>
      <style:map style:condition="value()&gt;=0" style:apply-style-name="N231P0"/>
    </number:number-style>
    <number:number-style style:name="N232">
      <number:scientific-number number:decimal-places="20" number:min-decimal-places="20" number:min-integer-digits="1" number:min-exponent-digits="2" number:exponent-interval="1" number:forced-exponent-sign="true"/>
    </number:number-style>
    <number:number-style style:name="N233P0" style:volatile="true">
      <number:text>R$ </number:text>
      <number:number number:decimal-places="2" number:min-decimal-places="2" number:min-integer-digits="1" number:grouping="true"/>
    </number:number-style>
    <number:number-style style:name="N233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233P0"/>
    </number:number-style>
    <number:currency-style style:name="N235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235P0"/>
    </number:currency-style>
    <number:number-style style:name="N237P0" style:volatile="true">
      <number:number number:decimal-places="0" number:min-decimal-places="0" number:min-integer-digits="1" number:grouping="true"/>
      <number:text> </number:text>
    </number:number-style>
    <number:number-style style:name="N2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37P2" style:volatile="true">
      <number:text> -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currency-style style:name="N239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239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239P0"/>
    </number:currency-style>
    <number:number-style style:name="N241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241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241P2" style:volatile="true">
      <number:text> R$ 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244P0" style:volatile="true">
      <number:number number:decimal-places="2" number:min-decimal-places="2" number:min-integer-digits="1" number:grouping="true"/>
      <number:text> </number:text>
    </number:number-style>
    <number:number-style style:name="N2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44P2" style:volatile="true">
      <number:text>-</number:text>
      <number:number number:decimal-places="0" number:min-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currency-style style:name="N246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46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46P0"/>
    </number:currency-style>
    <number:number-style style:name="N248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248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248P2" style:volatile="true">
      <number:text> R$ -</number:text>
      <number:number number:decimal-places="0" number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percentage-style style:name="N249">
      <number:number number:decimal-places="5" number:min-decimal-places="5" number:min-integer-digits="1"/>
      <number:text>%</number:text>
    </number:percentage-style>
    <number:number-style style:name="N250P0" style:volatile="true">
      <number:number number:decimal-places="2" number:min-decimal-places="2" number:min-integer-digits="1" number:grouping="true"/>
      <number:text> </number:text>
    </number:number-style>
    <number:number-style style:name="N25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50P0"/>
    </number:number-style>
    <number:currency-style style:name="N25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5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52P0"/>
    </number:currency-style>
    <number:number-style style:name="N253">
      <number:number number:decimal-places="20" number:min-decimal-places="20" number:min-integer-digits="1"/>
    </number:number-style>
    <number:currency-style style:name="N25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54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54P0"/>
    </number:currency-style>
    <number:currency-style style:name="N256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256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256P0"/>
    </number:currency-style>
    <number:percentage-style style:name="N257">
      <number:number number:decimal-places="3" number:min-decimal-places="3" number:min-integer-digits="1"/>
      <number:text>%</number:text>
    </number:percentage-style>
    <number:percentage-style style:name="N258">
      <number:number number:decimal-places="4" number:min-decimal-places="4" number:min-integer-digits="1"/>
      <number:text>%</number:text>
    </number:percentage-style>
    <number:percentage-style style:name="N259">
      <number:number number:decimal-places="6" number:min-decimal-places="6" number:min-integer-digits="1"/>
      <number:text>%</number:text>
    </number:percentage-style>
    <number:currency-style style:name="N261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261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261P0"/>
    </number:currency-style>
    <number:percentage-style style:name="N262">
      <number:number number:decimal-places="7" number:min-decimal-places="7" number:min-integer-digits="1"/>
      <number:text>%</number:text>
    </number:percentage-style>
    <number:percentage-style style:name="N263">
      <number:number number:decimal-places="8" number:min-decimal-places="8" number:min-integer-digits="1"/>
      <number:text>%</number:text>
    </number:percentage-style>
    <number:percentage-style style:name="N264">
      <number:number number:decimal-places="9" number:min-decimal-places="9" number:min-integer-digits="1"/>
      <number:text>%</number:text>
    </number:percentage-style>
    <number:percentage-style style:name="N265">
      <number:number number:decimal-places="10" number:min-decimal-places="10" number:min-integer-digits="1"/>
      <number:text>%</number:text>
    </number:percentage-style>
    <number:date-style style:name="N267P0" style:volatile="true">
      <number:day/>
      <number:text>/</number:text>
      <number:month/>
    </number:date-style>
    <number:text-style style:name="N267">
      <number:text-content/>
      <style:map style:condition="value()&lt;=1.7976931348623157E+308" style:apply-style-name="N267P0"/>
    </number:text-style>
    <number:percentage-style style:name="N268">
      <number:number number:decimal-places="11" number:min-decimal-places="11" number:min-integer-digits="1"/>
      <number:text>%</number:text>
    </number:percentage-style>
    <number:percentage-style style:name="N269">
      <number:number number:decimal-places="12" number:min-decimal-places="12" number:min-integer-digits="1"/>
      <number:text>%</number:text>
    </number:percentage-style>
    <number:percentage-style style:name="N270">
      <number:number number:decimal-places="13" number:min-decimal-places="13" number:min-integer-digits="1"/>
      <number:text>%</number:text>
    </number:percentage-style>
    <number:percentage-style style:name="N271">
      <number:number number:decimal-places="14" number:min-decimal-places="14" number:min-integer-digits="1"/>
      <number:text>%</number:text>
    </number:percentage-style>
    <number:percentage-style style:name="N272">
      <number:number number:decimal-places="15" number:min-decimal-places="15" number:min-integer-digits="1"/>
      <number:text>%</number:text>
    </number:percentage-style>
    <number:percentage-style style:name="N273">
      <number:number number:decimal-places="16" number:min-decimal-places="16" number:min-integer-digits="1"/>
      <number:text>%</number:text>
    </number:percentage-style>
    <number:number-style style:name="N274">
      <number:number number:decimal-places="0" number:min-decimal-places="0" number:min-integer-digits="8">
        <number:embedded-text number:position="3">-</number:embedded-text>
      </number:number>
    </number:number-style>
    <number:percentage-style style:name="N275">
      <number:number number:decimal-places="17" number:min-decimal-places="17" number:min-integer-digits="1"/>
      <number:text>%</number:text>
    </number:percentage-style>
    <number:percentage-style style:name="N276">
      <number:number number:decimal-places="18" number:min-decimal-places="18" number:min-integer-digits="1"/>
      <number:text>%</number:text>
    </number:percentage-style>
    <number:percentage-style style:name="N277">
      <number:number number:decimal-places="19" number:min-decimal-places="19" number:min-integer-digits="1"/>
      <number:text>%</number:text>
    </number:percentage-style>
    <number:percentage-style style:name="N278">
      <number:number number:decimal-places="20" number:min-decimal-places="20" number:min-integer-digits="1"/>
      <number:text>%</number:text>
    </number:percentage-style>
    <number:number-style style:name="N28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8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80P0"/>
    </number:number-style>
    <number:date-style style:name="N282P0" style:volatile="true">
      <number:day/>
      <number:text>-</number:text>
      <number:month number:textual="true"/>
    </number:date-style>
    <number:text-style style:name="N282">
      <number:text-content/>
      <style:map style:condition="value()&lt;=1.7976931348623157E+308" style:apply-style-name="N282P0"/>
    </number:text-style>
    <number:number-style style:name="N28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8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83P0"/>
    </number:number-style>
    <number:percentage-style style:name="N284">
      <number:number number:decimal-places="2" number:min-decimal-places="2" number:min-integer-digits="1"/>
      <number:text> %</number:text>
    </number:percentage-style>
    <number:number-style style:name="N28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6P0"/>
    </number:number-style>
    <number:number-style style:name="N28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7P0"/>
    </number:number-style>
    <number:number-style style:name="N29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9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91P2" style:volatile="true">
      <number:text> $-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9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95P2" style:volatile="true">
      <number:text> $-</number:text>
      <number:number number:decimal-places="0" number:min-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text> Cr$</number:text>
      <number:number number:decimal-places="0" number:min-decimal-places="0" number:min-integer-digits="1" number:grouping="true"/>
      <number:text> </number:text>
    </number:number-style>
    <number:number-style style:name="N299P1" style:volatile="true">
      <number:text> Cr$(</number:text>
      <number:number number:decimal-places="0" number:min-decimal-places="0" number:min-integer-digits="1" number:grouping="true"/>
      <number:text>)</number:text>
    </number:number-style>
    <number:number-style style:name="N299P2" style:volatile="true">
      <number:text> Cr$-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date-style style:name="N300P0" style:volatile="true">
      <number:day number:style="long"/>
      <number:text>/</number:text>
      <number:month number:style="long"/>
      <number:text>/</number:text>
      <number:year/>
    </number:date-style>
    <number:text-style style:name="N300">
      <number:text-content/>
      <style:map style:condition="value()&lt;=1.7976931348623157E+308" style:apply-style-name="N300P0"/>
    </number:text-style>
    <number:date-style style:name="N301P0" style:volatile="true">
      <number:month number:textual="true"/>
      <number:text>-</number:text>
      <number:year/>
    </number:date-style>
    <number:text-style style:name="N301">
      <number:text-content/>
      <style:map style:condition="value()&lt;=1.7976931348623157E+308" style:apply-style-name="N301P0"/>
    </number:text-style>
    <number:date-style style:name="N302P0" style:volatile="true">
      <number:day/>
      <number:text>/</number:text>
      <number:month/>
      <number:text>/</number:text>
      <number:year/>
    </number:date-style>
    <number:text-style style:name="N302">
      <number:text-content/>
      <style:map style:condition="value()&lt;=1.7976931348623157E+308" style:apply-style-name="N302P0"/>
    </number:text-style>
    <number:date-style style:name="N30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04P0" style:volatile="true">
      <number:day/>
      <number:text>-</number:text>
      <number:month number:textual="true"/>
      <number:text>-</number:text>
      <number:year/>
    </number:date-style>
    <number:text-style style:name="N304">
      <number:text-content/>
      <style:map style:condition="value()&lt;=1.7976931348623157E+308" style:apply-style-name="N304P0"/>
    </number:text-style>
    <number:date-style style:name="N306P0" style:volatile="true">
      <number:month number:style="long"/>
      <number:text>/</number:text>
      <number:day number:style="long"/>
      <number:text>/</number:text>
      <number:year/>
    </number:date-style>
    <number:text-style style:name="N306">
      <number:text-content/>
      <style:map style:condition="value()&lt;=1.7976931348623157E+308" style:apply-style-name="N306P0"/>
    </number:text-style>
    <number:date-style style:name="N307">
      <number:month number:style="long"/>
      <number:text>/</number:text>
      <number:year number:style="long"/>
    </number:date-style>
    <number:number-style style:name="N308">
      <number:number number:decimal-places="2" number:min-decimal-places="2" number:min-integer-digits="2"/>
      <number:text>  %</number:text>
    </number:number-style>
    <number:number-style style:name="N309">
      <number:number number:decimal-places="1" number:min-decimal-places="1" number:min-integer-digits="2"/>
      <number:text>  %</number:text>
    </number:number-style>
    <number:percentage-style style:name="N310">
      <number:text>%</number:text>
    </number:percentage-style>
    <number:date-style style:name="N311">
      <number:day/>
      <number:text> </number:text>
      <number:month number:style="long" number:textual="true"/>
      <number:text>, </number:text>
      <number:year number:style="long"/>
    </number:date-style>
    <number:number-style style:name="N312P0" style:volatile="true">
      <number:number number:decimal-places="2" number:min-decimal-places="2" number:min-integer-digits="1" number:grouping="true"/>
      <number:text> </number:text>
    </number:number-style>
    <number:number-style style:name="N31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312P0"/>
    </number:number-style>
    <number:number-style style:name="N313">
      <number:number number:decimal-places="0" number:min-decimal-places="0" number:min-integer-digits="5"/>
    </number:number-style>
    <number:number-style style:name="N314">
      <number:number number:decimal-places="0" number:min-decimal-places="0" number:min-integer-digits="6"/>
    </number:number-style>
    <number:number-style style:name="N315">
      <number:number number:decimal-places="15" number:min-decimal-places="15" number:min-integer-digits="1" number:grouping="true"/>
    </number:number-style>
    <number:number-style style:name="N317P0" style:volatile="true">
      <number:text>Cr$</number:text>
      <number:number number:decimal-places="0" number:min-decimal-places="0" number:min-integer-digits="1" number:grouping="true"/>
      <number:text> </number:text>
    </number:number-style>
    <number:number-style style:name="N317">
      <number:text>(Cr$</number:text>
      <number:number number:decimal-places="0" number:min-decimal-places="0" number:min-integer-digits="1" number:grouping="true"/>
      <number:text>)</number:text>
      <style:map style:condition="value()&gt;=0" style:apply-style-name="N317P0"/>
    </number:number-style>
    <number:number-style style:name="N318P0" style:volatile="true">
      <number:text>Cr$</number:text>
      <number:number number:decimal-places="0" number:min-decimal-places="0" number:min-integer-digits="1" number:grouping="true"/>
      <number:text> </number:text>
    </number:number-style>
    <number:number-style style:name="N318">
      <style:text-properties fo:color="#ff0000"/>
      <number:text>(Cr$</number:text>
      <number:number number:decimal-places="0" number:min-decimal-places="0" number:min-integer-digits="1" number:grouping="true"/>
      <number:text>)</number:text>
      <style:map style:condition="value()&gt;=0" style:apply-style-name="N318P0"/>
    </number:number-style>
    <number:number-style style:name="N320P0" style:volatile="true">
      <number:text>Cr$</number:text>
      <number:number number:decimal-places="2" number:min-decimal-places="2" number:min-integer-digits="1" number:grouping="true"/>
      <number:text> </number:text>
    </number:number-style>
    <number:number-style style:name="N320">
      <number:text>(Cr$</number:text>
      <number:number number:decimal-places="2" number:min-decimal-places="2" number:min-integer-digits="1" number:grouping="true"/>
      <number:text>)</number:text>
      <style:map style:condition="value()&gt;=0" style:apply-style-name="N320P0"/>
    </number:number-style>
    <number:number-style style:name="N321P0" style:volatile="true">
      <number:text>Cr$</number:text>
      <number:number number:decimal-places="2" number:min-decimal-places="2" number:min-integer-digits="1" number:grouping="true"/>
      <number:text> </number:text>
    </number:number-style>
    <number:number-style style:name="N321">
      <style:text-properties fo:color="#ff0000"/>
      <number:text>(Cr$</number:text>
      <number:number number:decimal-places="2" number:min-decimal-places="2" number:min-integer-digits="1" number:grouping="true"/>
      <number:text>)</number:text>
      <style:map style:condition="value()&gt;=0" style:apply-style-name="N321P0"/>
    </number:number-style>
    <number:number-style style:name="N325P0" style:volatile="true">
      <number:text> Cr$</number:text>
      <number:number number:decimal-places="2" number:min-decimal-places="2" number:min-integer-digits="1" number:grouping="true"/>
      <number:text> </number:text>
    </number:number-style>
    <number:number-style style:name="N325P1" style:volatile="true">
      <number:text> Cr$(</number:text>
      <number:number number:decimal-places="2" number:min-decimal-places="2" number:min-integer-digits="1" number:grouping="true"/>
      <number:text>)</number:text>
    </number:number-style>
    <number:number-style style:name="N325P2" style:volatile="true">
      <number:text> Cr$-</number:text>
      <number:number number:decimal-places="0" number:min-decimal-places="0" number:min-integer-digits="0"/>
      <number:text> </number:text>
    </number:number-style>
    <number:text-style style:name="N325">
      <number:text-content/>
      <number:text> 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time-style style:name="N326">
      <number:hours/>
      <number:text>:</number:text>
      <number:minutes number:style="long"/>
      <number:text>:</number:text>
      <number:seconds number:style="long"/>
    </number:time-style>
    <number:time-style style:name="N327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328">
      <number:seconds number:style="long" number:decimal-places="2"/>
    </number:time-style>
    <number:number-style style:name="N329">
      <number:number number:decimal-places="14" number:min-decimal-places="14" number:min-integer-digits="1" number:grouping="true"/>
    </number:number-style>
    <number:number-style style:name="N330">
      <number:number number:decimal-places="16" number:min-decimal-places="16" number:min-integer-digits="1" number:grouping="true"/>
    </number:number-style>
    <number:number-style style:name="N331">
      <number:number number:decimal-places="18" number:min-decimal-places="18" number:min-integer-digits="1" number:grouping="true"/>
    </number:number-style>
    <number:number-style style:name="N332">
      <number:number number:decimal-places="19" number:min-decimal-places="19" number:min-integer-digits="1" number:grouping="true"/>
    </number:number-style>
    <number:number-style style:name="N333">
      <number:number number:decimal-places="20" number:min-decimal-places="20" number:min-integer-digits="1" number:grouping="true"/>
    </number:number-style>
    <number:number-style style:name="N334">
      <number:number number:decimal-places="0" number:min-decimal-places="0" number:min-integer-digits="3"/>
    </number:number-style>
    <number:number-style style:name="N335">
      <number:number number:decimal-places="19" number:min-decimal-places="19" number:min-integer-digits="2"/>
    </number:number-style>
    <number:currency-style style:name="N33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3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37P0"/>
    </number:currency-style>
    <number:number-style style:name="N34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1P2" style:volatile="true">
      <number:fill-character> </number:fill-character>
      <number:text>-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2" style:volatile="true">
      <number:text> R$ </number:text>
      <number:fill-character> </number:fill-character>
      <number:text>-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4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3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355">
      <number:minutes number:style="long"/>
      <number:text>:</number:text>
      <number:seconds number:style="long"/>
      <number:text>,</number:text>
    </number:time-style>
    <number:number-style style:name="N356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357">
      <number:scientific-number number:decimal-places="0" number:min-decimal-places="0" number:min-integer-digits="1" number:min-exponent-digits="3" number:exponent-interval="1" number:forced-exponent-sign="true"/>
    </number:number-style>
    <number:number-style style:name="N35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359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360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361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362">
      <number:scientific-number number:decimal-places="14" number:min-decimal-places="14" number:min-integer-digits="1" number:min-exponent-digits="2" number:exponent-interval="1" number:forced-exponent-sign="true"/>
    </number:number-style>
    <number:date-style style:name="N363">
      <number:month number:style="long" number:textual="true"/>
      <number:text> </number:text>
      <number:day/>
      <number:year/>
      <number:text> </number:text>
      <number:year/>
    </number:date-style>
    <number:number-style style:name="N364">
      <number:number number:decimal-places="3" number:min-decimal-places="3" number:min-integer-digits="0" number:grouping="true"/>
    </number:number-style>
    <number:number-style style:name="N365">
      <number:number number:decimal-places="4" number:min-decimal-places="4" number:min-integer-digits="0" number:grouping="true"/>
    </number:number-style>
    <number:number-style style:name="N366">
      <number:number number:decimal-places="5" number:min-decimal-places="5" number:min-integer-digits="0" number:grouping="true"/>
    </number:number-style>
    <number:number-style style:name="N367">
      <number:number number:decimal-places="6" number:min-decimal-places="6" number:min-integer-digits="0" number:grouping="true"/>
    </number:number-style>
    <number:number-style style:name="N368">
      <number:number number:decimal-places="7" number:min-decimal-places="7" number:min-integer-digits="0" number:grouping="true"/>
    </number:number-style>
    <number:number-style style:name="N369">
      <number:number number:decimal-places="9" number:min-decimal-places="9" number:min-integer-digits="0" number:grouping="true"/>
    </number:number-style>
    <number:number-style style:name="N370">
      <number:number number:decimal-places="10" number:min-decimal-places="10" number:min-integer-digits="0" number:grouping="true"/>
    </number:number-style>
    <number:number-style style:name="N371">
      <number:number number:decimal-places="1" number:min-decimal-places="1" number:min-integer-digits="0" number:grouping="true"/>
    </number:number-style>
    <number:number-style style:name="N372P0" style:volatile="true">
      <number:number number:decimal-places="1" number:min-decimal-places="1" number:min-integer-digits="1" number:grouping="true"/>
    </number:number-style>
    <number:number-style style:name="N372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72P0"/>
    </number:number-style>
    <number:number-style style:name="N373">
      <number:scientific-number number:decimal-places="19" number:min-decimal-places="19" number:min-integer-digits="1" number:min-exponent-digits="2" number:exponent-interval="1" number:forced-exponent-sign="true"/>
    </number:number-style>
    <number:date-style style:name="N374">
      <number:day number:style="long"/>
      <number:text>-</number:text>
      <number:month number:style="long"/>
      <number:text>-</number:text>
      <number:year/>
    </number:date-style>
    <number:currency-style style:name="N37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75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375P0"/>
    </number:currency-style>
    <number:number-style style:name="N376P0" style:volatile="true">
      <number:number number:decimal-places="0" number:min-decimal-places="0" number:min-integer-digits="1" number:grouping="true"/>
      <number:text> </number:text>
    </number:number-style>
    <number:number-style style:name="N37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376P0"/>
    </number:number-style>
    <number:date-style style:name="N10114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0116P0" style:volatile="true" number:language="pt" number:country="BR">
      <number:month number:textual="true"/>
      <number:text>-</number:text>
      <number:year/>
    </number:date-style>
    <number:text-style style:name="N10116" number:language="pt" number:country="BR">
      <number:text-content/>
      <style:map style:condition="value()&lt;=1.7976931348623157E+308" style:apply-style-name="N10116P0"/>
    </number:text-style>
    <number:number-style style:name="N1011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date-style style:name="N10123" number:language="pt" number:country="BR">
      <number:day/>
      <number:text>/</number:text>
      <number:month/>
      <number:text>/</number:text>
      <number:year number:style="long"/>
    </number:date-style>
    <number:date-style style:name="N10124" number:language="pt" number:country="BR">
      <number:day/>
      <number:text>/</number:text>
      <number:month number:textual="true"/>
      <number:text>/</number:text>
      <number:year/>
    </number:date-style>
    <number:date-style style:name="N10125" number:language="pt" number:country="BR">
      <number:day/>
      <number:text>/</number:text>
      <number:month number:textual="true"/>
    </number:date-style>
    <number:date-style style:name="N10126" number:language="pt" number:country="BR">
      <number:month number:textual="true"/>
      <number:text>/</number:text>
      <number:year/>
    </number:date-style>
    <number:time-style style:name="N10127" number:language="pt" number:country="BR">
      <number:hours/>
      <number:text>:</number:text>
      <number:minutes number:style="long"/>
      <number:text> </number:text>
      <number:am-pm/>
    </number:time-style>
    <number:time-style style:name="N1012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3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9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9P2" style:volatile="true" number:language="pt" number:country="BR">
      <number:fill-character> </number:fill-character>
      <number:text>- </number:text>
    </number:number-style>
    <number:text-style style:name="N10139" number:language="pt" number:country="B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pt" number:country="BR">
      <number:text> R$ </number:text>
      <number:fill-character> </number:fill-character>
      <number:text>- </number:text>
    </number:number-style>
    <number:text-style style:name="N10143" number:language="pt" number:country="B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7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pt" number:country="B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pt" number:country="B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5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5P2" style:volatile="true" number:language="pt" number:country="BR">
      <number:text> </number:text>
      <number:fill-character> </number:fill-character>
      <number:text>- </number:text>
    </number:number-style>
    <number:text-style style:name="N10155" number:language="pt" number:country="BR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pt" number:country="BR">
      <number:text> R$ </number:text>
      <number:fill-character> </number:fill-character>
      <number:text>- </number:text>
    </number:number-style>
    <number:text-style style:name="N10156" number:language="pt" number:country="BR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0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0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0" number:language="pt" number:country="BR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1" number:language="pt" number:country="BR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10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11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12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cf13" style:family="table-cell" style:parent-style-name="Default" style:data-style-name="N0">
      <style:table-cell-properties fo:background-color="#ccffcc"/>
      <style:text-properties fo:color="#006600"/>
    </style:style>
    <style:style style:name="cf14" style:family="table-cell" style:parent-style-name="Default" style:data-style-name="N0">
      <style:table-cell-properties fo:background-color="#008400"/>
      <style:text-properties fo:color="#ffffff" fo:font-weight="bold" style:font-weight-asian="bold" style:font-weight-complex="bold"/>
    </style:style>
    <style:style style:name="cf15" style:family="table-cell" style:parent-style-name="Default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16" style:family="table-cell" style:parent-style-name="Default" style:data-style-name="N0">
      <style:table-cell-properties fo:background-color="#ffcccc"/>
      <style:text-properties fo:color="#cc0000"/>
    </style:style>
    <style:style style:name="cf17" style:family="table-cell" style:parent-style-name="Default" style:data-style-name="N0">
      <style:table-cell-properties fo:background-color="#ff0000"/>
      <style:text-properties fo:color="#ffffff"/>
    </style:style>
    <style:style style:name="cf18" style:family="table-cell" style:parent-style-name="Default" style:data-style-name="N0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f2" style:family="table-cell" style:parent-style-name="Default" style:data-style-name="N0">
      <style:table-cell-properties fo:background-color="#008400" style:vertical-align="automatic"/>
      <style:text-properties fo:color="#ffffff"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5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6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cf7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8" style:family="table-cell" style:parent-style-name="Default" style:data-style-name="N0">
      <style:table-cell-properties fo:background-color="#008400" style:vertical-align="automatic"/>
      <style:text-properties fo:color="#ffffff" fo:font-weight="bold" style:font-weight-asian="bold" style:font-weight-complex="bold"/>
    </style:style>
    <style:style style:name="cf9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Sem_20_título10" style:display-name="Sem título10" style:family="table-cell" style:parent-style-name="Default" style:data-style-name="N0">
      <style:table-cell-properties fo:background-color="#008400" style:vertical-align="automatic"/>
      <style:text-properties fo:color="#ffffff" fo:font-size="18pt" fo:font-weight="bold" style:font-size-asian="18pt" style:font-weight-asian="bold" style:font-size-complex="18pt" style:font-weight-complex="bold"/>
    </style:style>
    <style:style style:name="Sem_20_título11" style:display-name="Sem título11" style:family="table-cell" style:parent-style-name="Default" style:data-style-name="N0">
      <style:table-cell-properties fo:background-color="#ff0000" style:vertical-align="automatic"/>
      <style:text-properties fo:color="#ffffff" fo:font-size="18pt" fo:font-weight="bold" style:font-size-asian="18pt" style:font-weight-asian="bold" style:font-size-complex="18pt" style:font-weight-complex="bold"/>
    </style:style>
    <style:style style:name="Sem_20_título12" style:display-name="Sem título12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3" style:display-name="Sem título13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14" style:display-name="Sem título14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5" style:display-name="Sem título15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6" style:display-name="Sem título16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17" style:display-name="Sem título17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8" style:display-name="Sem título18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3" style:display-name="Sem título3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6" style:display-name="Sem título6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7" style:display-name="Sem título7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8" style:display-name="Sem título8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9" style:display-name="Sem título9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1" style:scale-to="59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1" style:scale-to="59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ltr" style:first-page-number="1" style:scale-to="45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3:09:06.95447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  <style:master-page style:name="mp3" style:page-layout-name="Mpm5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DJ</meta:initial-creator>
    <meta:creation-date>2023-10-12T23:29:57Z</meta:creation-date>
    <dc:date>2026-05-04T13:10:40.916831000</dc:date>
    <meta:print-date>2026-05-04T13:10:33.070792800</meta:print-date>
    <meta:editing-cycles>40</meta:editing-cycles>
    <meta:editing-duration>P1DT9H43M43S</meta:editing-duration>
    <meta:document-statistic meta:table-count="6" meta:cell-count="3078" meta:object-count="8"/>
  </office:meta>
</office:document-meta>
</file>