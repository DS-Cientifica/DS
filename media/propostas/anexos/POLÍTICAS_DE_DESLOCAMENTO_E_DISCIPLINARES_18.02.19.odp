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6CF8DA27669AE3F2.png" manifest:media-type="image/png"/>
  <manifest:file-entry manifest:full-path="Pictures/10000000000004380000032A3466B9D87F05EF7A.jpg" manifest:media-type="image/jpeg"/>
  <manifest:file-entry manifest:full-path="Pictures/1000000000000110000000BA42998569903CB45C.png" manifest:media-type="image/png"/>
  <manifest:file-entry manifest:full-path="Pictures/100000000000096000000640274A9F424067E4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1" svg:font-family="Arial-BoldMT"/>
    <style:font-face style:name="ArialMT2" svg:font-family="ArialMT"/>
    <style:font-face style:name="OpenSymbol" svg:font-family="OpenSymbol"/>
    <style:font-face style:name="ArialMT1" svg:font-family="ArialMT" style:font-family-generic="swiss"/>
    <style:font-face style:name="Arial Unicode MS2" svg:font-family="'Arial Unicode MS'" style:font-pitch="variable"/>
    <style:font-face style:name="Arial-BoldMT" svg:font-family="Arial-BoldMT" style:font-pitch="variable"/>
    <style:font-face style:name="Liberation Sans2" svg:font-family="'Liberation Sans'" style:font-pitch="variable"/>
    <style:font-face style:name="Microsoft YaHei2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1" style:family="paragraph">
      <style:text-properties fo:font-size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0pt" style:font-size-asian="28pt" style:font-size-complex="28pt"/>
    </style:style>
    <style:style style:name="P5" style:family="paragraph">
      <style:paragraph-properties style:text-autospace="none"/>
    </style:style>
    <style:style style:name="T1" style:family="text">
      <style:text-properties fo:font-size="26pt"/>
    </style:style>
    <style:style style:name="T2" style:family="text">
      <style:text-properties fo:font-size="30pt" style:font-size-asian="28pt" style:font-size-complex="28pt"/>
    </style:style>
    <style:style style:name="T3" style:family="text">
      <style:text-properties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MT1" fo:font-size="24pt" fo:font-style="normal" fo:text-shadow="none" style:text-underline-style="none" fo:font-weight="normal" style:letter-kerning="true" fo:background-color="transparent" style:font-name-asian="ArialMT1" style:font-size-asian="24pt" style:font-style-asian="normal" style:font-weight-asian="normal" style:font-name-complex="Arial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MT1" fo:font-size="24pt" fo:font-style="normal" fo:text-shadow="none" style:text-underline-style="none" fo:font-weight="normal" style:letter-kerning="true" fo:background-color="transparent" style:font-name-asian="ArialMT1" style:font-size-asian="24pt" style:font-style-asian="normal" style:font-weight-asian="normal" style:font-name-complex="Arial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-BoldMT1" fo:font-size="28pt" fo:font-style="normal" fo:text-shadow="none" style:text-underline-style="none" fo:font-weight="bold" style:letter-kerning="true" fo:background-color="transparent" style:font-name-asian="Arial-BoldMT1" style:font-size-asian="28pt" style:font-style-asian="normal" style:font-weight-asian="bold" style:font-name-complex="Arial-BoldMT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MT1" fo:font-size="19pt" fo:font-style="normal" fo:text-shadow="none" style:text-underline-style="none" fo:font-weight="normal" style:letter-kerning="true" fo:background-color="transparent" style:font-name-asian="ArialMT1" style:font-size-asian="19pt" style:font-style-asian="normal" style:font-weight-asian="normal" style:font-name-complex="ArialMT1" style:font-size-complex="1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MT1" fo:font-size="12pt" fo:font-style="normal" fo:text-shadow="none" style:text-underline-style="none" fo:font-weight="normal" style:letter-kerning="true" fo:background-color="transparent" style:font-name-asian="ArialMT1" style:font-size-asian="12pt" style:font-style-asian="normal" style:font-weight-asian="normal" style:font-name-complex="ArialMT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fo:background-color="transparent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MT1" fo:font-size="17pt" fo:font-style="normal" fo:text-shadow="none" style:text-underline-style="none" fo:font-weight="normal" style:letter-kerning="true" fo:background-color="transparent" style:font-name-asian="ArialMT1" style:font-size-asian="17pt" style:font-style-asian="normal" style:font-weight-asian="normal" style:font-name-complex="ArialMT1" style:font-size-complex="1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presentation:style-name="pr1" draw:layer="layout" svg:width="25.199cm" svg:height="3.506cm" svg:x="2.1cm" svg:y="0.837cm" presentation:class="title" presentation:user-transformed="true">
          <draw:text-box>
            <text:p>DISCIPLINA</text:p>
          </draw:text-box>
        </draw:frame>
        <draw:frame presentation:style-name="pr2" draw:text-style-name="P1" draw:layer="layout" svg:width="25.199cm" svg:height="5.779cm" svg:x="1.801cm" svg:y="13.621cm" presentation:class="outline" presentation:user-transformed="true">
          <draw:text-box>
            <text:list text:style-name="L2">
              <text:list-item>
                <text:p xml:id="id1" text:id="id1"><text:span text:style-name="T1">Ordem, regulamento, conduta que assegura o bem-estar dos indivíduos ou o bom funcionamento, por exemplo, de uma organização.</text:span></text:p>
              </text:list-item>
              <text:list-item>
                <text:p xml:id="id2" text:id="id2"><text:span text:style-name="T1">Respeito às regras, aos superiores, a regulamentos.</text:span></text:p>
              </text:list-item>
            </text:list>
          </draw:text-box>
        </draw:frame>
        <draw:frame draw:style-name="gr1" draw:text-style-name="P2" draw:layer="layout" svg:width="10.531cm" svg:height="7.2cm" svg:x="8.834cm" svg:y="5.7cm">
          <draw:image xlink:href="Pictures/1000000000000110000000BA42998569903CB4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IPLINA</text:p>
          </draw:text-box>
        </draw:frame>
        <draw:frame presentation:style-name="pr2" draw:text-style-name="P1" draw:layer="layout" svg:width="25.6cm" svg:height="2.995cm" svg:x="1.8cm" svg:y="6.605cm" presentation:class="outline" presentation:user-transformed="true">
          <draw:text-box>
            <text:list text:style-name="L2">
              <text:list-item>
                <text:p xml:id="id3" text:id="id3"><text:span text:style-name="T1">A disciplina é a ponte entre as METAS e as REALIZAÇÕES</text:span></text:p>
              </text:list-item>
            </text:list>
          </draw:text-box>
        </draw:frame>
        <draw:frame presentation:style-name="pr2" draw:text-style-name="P1" draw:layer="layout" svg:width="25.6cm" svg:height="2.995cm" svg:x="1.8cm" svg:y="17.406cm" presentation:class="outline" presentation:user-transformed="true">
          <draw:text-box>
            <text:list text:style-name="L2">
              <text:list-item>
                <text:p xml:id="id4" text:id="id4"><text:span text:style-name="T1">Quanto mais crescemos, mais disciplina temos que ter</text:span></text:p>
              </text:list-item>
            </text:list>
          </draw:text-box>
        </draw:frame>
        <draw:frame draw:style-name="gr1" draw:text-style-name="P2" draw:layer="layout" svg:width="12.4cm" svg:height="8.266cm" svg:x="8cm" svg:y="8.534cm">
          <draw:image xlink:href="Pictures/100000000000096000000640274A9F424067E4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IPLINA</text:p>
          </draw:text-box>
        </draw:frame>
        <draw:frame presentation:style-name="pr2" draw:text-style-name="P4" draw:layer="layout" svg:width="29cm" svg:height="6.6cm" svg:x="1.6cm" svg:y="7.4cm" presentation:class="outline" presentation:user-transformed="true">
          <draw:text-box>
            <text:list text:style-name="L2">
              <text:list-item>
                <text:p xml:id="id5" text:id="id5"><text:span text:style-name="T2">A Evagon está crescendo e revendo suas Políticas</text:span></text:p>
                <text:list>
                  <text:list-item>
                    <text:p xml:id="id6" text:id="id6"><text:span text:style-name="T3">Política para serviços externos</text:span></text:p>
                  </text:list-item>
                  <text:list-item>
                    <text:p xml:id="id7" text:id="id7"><text:span text:style-name="T3">Política de medidas disciplinar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582cm" svg:height="7.063cm" svg:x="9.2cm" svg:y="12.637cm">
          <draw:image xlink:href="Pictures/10000000000001900000010B6CF8DA27669AE3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 presentation:group-id="1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712cm" presentation:class="outline" presentation:user-transformed="true">
          <draw:text-box>
            <text:list text:style-name="L2">
              <text:list-item>
                <text:p xml:id="id8" text:id="id8"><text:span text:style-name="T2">Política para serviços externos</text:span></text:p>
                <text:list>
                  <text:list-item>
                    <text:p xml:id="id9" text:id="id9" text:style-name="P5"><text:span text:style-name="T4">O colaborador externo é inteiramente responsável pelos equipamentos da Evagon enquanto estes estiverem em seu poder. Quaisquer avarias detectadas por mau uso, acarretará em responsabilização monetária por parte do técnico.</text:span></text:p>
                  </text:list-item>
                  <text:list-item>
                    <text:p xml:id="id10" text:id="id10" text:style-name="P5"><text:span text:style-name="T4">Realizar </text:span><text:span text:style-name="T5">o serviço agendando com dedicação e pontualidade</text:span></text:p>
                  </text:list-item>
                  <text:list-item>
                    <text:p xml:id="id11" text:id="id11" text:style-name="P5"><text:span text:style-name="T5">Se houver percalços no decorrer da viagem e não for possível resolver, deve-se entrar em contato imediato com o superior da área para que as devidas ações sejam tomadas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12" text:id="id12"><text:span text:style-name="T2">Política para serviços externos</text:span></text:p>
                <text:list>
                  <text:list-item>
                    <text:p xml:id="id13" text:id="id13" text:style-name="P5"><text:span text:style-name="T6">Se o serviço a ser realizado for em conjunto com outro colega e/ou parceiro, fazer todos os acertos previamente</text:span></text:p>
                  </text:list-item>
                  <text:list-item>
                    <text:p xml:id="id14" text:id="id14" text:style-name="P5"><text:span text:style-name="T5">O colaborador deve estar no cliente na hora agendada, realizar os serviços e retornar diretamente para a Evagon, não sendo permitido utilizar o tempo de trabalho para assuntos particulares. Uma vez na Evagon, este deve auxiliar o laboratório em suas atividades diárias</text:span></text:p>
                  </text:list-item>
                  <text:list-item>
                    <text:p xml:id="id15" text:id="id15" text:style-name="P5"><text:span text:style-name="T5">Manter seus EPIs sempre consigo, organizados e limpos e utilizar sempre que solicitado pelo cliente. Qualquer avaria no EPI informar imediatamente o responsável do RH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16" text:id="id16"><text:span text:style-name="T2">Política para serviços externos</text:span></text:p>
                <text:list>
                  <text:list-item>
                    <text:p xml:id="id17" text:id="id17" text:style-name="P5"><text:span text:style-name="T6">Realizar os exames médicos dentro do prazo, conforme solicitado</text:span></text:p>
                  </text:list-item>
                  <text:list-item>
                    <text:p xml:id="id18" text:id="id18" text:style-name="P5"><text:span text:style-name="T5">Em relação ao celular que a empresa disponibiliza para o colaborador, este deve permanecer sempre ligado e disponível em seu período de trabalho e só deve ser utilizado para fins profissionais</text:span></text:p>
                  </text:list-item>
                  <text:list-item>
                    <text:p xml:id="id19" text:id="id19" text:style-name="P5"><text:span text:style-name="T5">Não deixar equipamentos, materiais e pertences da Evagon dentro do veículo, quando o mesmo estiver estacionado em local público ou inseguro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20" text:id="id20"><text:span text:style-name="T2">Política para serviços externos</text:span></text:p>
                <text:list>
                  <text:list-item>
                    <text:p xml:id="id21" text:id="id21" text:style-name="P5"><text:span text:style-name="T6">Locar veículos básicos, pode ser com ar-condicionado em épocas de calor, porém novamente considerar o melhor custo-benefício. Valores fora do usual ou da média de mercado terão a diferença de valor descontada do colaborador.</text:span></text:p>
                  </text:list-item>
                  <text:list-item>
                    <text:p xml:id="id22" text:id="id22" text:style-name="P5"><text:span text:style-name="T5">Utilizar o veículo locado somente para o translado ao local de serviço, no horário em que o serviço estiver sendo realizado ou para os períodos das refeições.</text:span></text:p>
                  </text:list-item>
                  <text:list-item>
                    <text:p xml:id="id23" text:id="id23" text:style-name="P5"><text:span text:style-name="T5">O veículo locado deve ser utilizado somente para fins profissionais, sendo vetado seu uso para entretenimentos ou questões particulares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24" text:id="id24"><text:span text:style-name="T2">Política para serviços externos</text:span></text:p>
                <text:list>
                  <text:list-item>
                    <text:p xml:id="id25" text:id="id25" text:style-name="P5"><text:span text:style-name="T6">O colaborador deve utilizar bagagem pessoal compatível com os dias que trabalhará externamente. Não serão reembolsadas despesas por bagagens individuais extras</text:span></text:p>
                  </text:list-item>
                  <text:list-item>
                    <text:p xml:id="id26" text:id="id26" text:style-name="P5"><text:span text:style-name="T5">Não serão aceitas despesas por negligência ou irresponsabilidade do colaborador; as mesmas não serão reembolsadas</text:span></text:p>
                  </text:list-item>
                  <text:list-item>
                    <text:p xml:id="id27" text:id="id27" text:style-name="P5"><text:span text:style-name="T5">O colaborador não deve exceder o peso de bagagens contratado para sua viagem aérea</text:span></text:p>
                  </text:list-item>
                  <text:list-item>
                    <text:p xml:id="id28" text:id="id28" text:style-name="P5"><text:span text:style-name="T5">Bebidas alcoólicas e cigarros não serão aceitas como despesas de refeição e o colaborador não será reembolsado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29" text:id="id29"><text:span text:style-name="T2">Política para serviços externos</text:span></text:p>
                <text:list>
                  <text:list-item>
                    <text:p xml:id="id30" text:id="id30" text:style-name="P5"><text:span text:style-name="T6">Os comprovantes de despesas devem ser entregues em ordem cronológica, acompanhados do relatório de despesas até o dia 10 de cada mês</text:span></text:p>
                  </text:list-item>
                  <text:list-item>
                    <text:p xml:id="id31" text:id="id31" text:style-name="P5"><text:span text:style-name="T5">Os valores das notas e recibos devem ser iguais aos lançamentos do Relatório de Despesas, porém, se a soma dos comprovantes de despesas de um determinado dia for maior do que os valores de despesas diárias determinados nesta política, então deve-se realizar os lançamentos, no relatório de despesas, pelo valor máximo de despesas diárias descrito anteriormente, ou seja, R$ 80,00 (R$ 70,00 de refeições + R$ 10,00 de água). NÃO DEVE-SE LANÇAR EM HIPÓTESE ALGUMA VALORES DIÁRIOS MAIORES DO QUE OS VALORES ESTABELECIDOS NESTA POLÍTICA</text:span></text:p>
                    <text:p text:style-name="P5"><text:span text:style-name="T5"/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32" text:id="id32"><text:span text:style-name="T2">Política de medidas disciplinares</text:span></text:p>
                <text:list>
                  <text:list-item>
                    <text:p xml:id="id33" text:id="id33"><text:span text:style-name="T5">Estabelecer os requisitos gerais para a aplicação de medidas disciplinares na organização</text:span></text:p>
                    <text:p text:style-name="P5"><text:span text:style-name="T6"/></text:p>
                  </text:list-item>
                </text:list>
              </text:list-item>
            </text:list>
            <text:p xml:id="id34" text:id="id34" text:style-name="P5"><text:span text:style-name="T6">A decisão de adotar medidas disciplinares é consequência do possível julgamento de um ato, configurado como desvio ou transgressão em relação às políticas e procedimentos definidos pela Evagon. As medidas disciplinares têm o objetivo de manter a ordem, as diretrizes, o respeito e a disciplina no ambiente de trabalho.</text:span></text:p>
            <text:p xml:id="id35" text:id="id35" text:style-name="P5"><text:span text:style-name="T6">A análise do desvio ( conforme disposições apresentadas) será realizada pelo Grupo de Ética, formado por no mínimo 2 (dois) representantes.</text:span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3.8cm" svg:height="14.088cm" svg:x="2.96cm" svg:y="6.412cm" presentation:class="outline" presentation:user-transformed="true">
          <draw:text-box>
            <text:list text:style-name="L2">
              <text:list-item>
                <text:p xml:id="id36" text:id="id36"><text:span text:style-name="T2">Política de medidas disciplinares</text:span></text:p>
                <text:list>
                  <text:list-item>
                    <text:p xml:id="id37" text:id="id37"><text:span text:style-name="T5">A lei diz que a medida disciplinar do empregador deve ser proporcional à transgressão cometida pelo colaborador. Logo, se a falta foi leve, deverá ser punida com uma advertência, se foi grave, pode ser punida com uma advertência por escrito ou uma suspensão e, em casos mais extremos, com a demissão por justa causa.</text:span></text:p>
                    <text:p text:style-name="P5"><text:span text:style-name="T6"/></text:p>
                  </text:list-item>
                </text:list>
              </text:list-item>
            </text:list>
            <text:p text:style-name="P5"><text:span text:style-name="T6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5.16cm" svg:height="16.788cm" svg:x="1.6cm" svg:y="6.212cm" presentation:class="outline" presentation:user-transformed="true">
          <draw:text-box>
            <text:list text:style-name="L2">
              <text:list-item>
                <text:p xml:id="id38" text:id="id38" text:style-name="P5"><text:span text:style-name="T7">MOTIVOS PARA A APLICAÇÃO DE MEDIDAS DISCIPLINARES</text:span></text:p>
                <text:list>
                  <text:list-item>
                    <text:p xml:id="id39" text:id="id39"><text:span text:style-name="T8">Transgressões aos valores da Evagon</text:span></text:p>
                  </text:list-item>
                  <text:list-item>
                    <text:p xml:id="id40" text:id="id40"><text:span text:style-name="T8">Desrespeito no tratamento com colaboradores, colegas, superiores, clientes, órgãos, terceirizados, parceiros ou fornecedores</text:span></text:p>
                  </text:list-item>
                  <text:list-item>
                    <text:p xml:id="id41" text:id="id41"><text:span text:style-name="T8">Desleixo no cumprimento das funções, como: esquecer de levar materiais para a execução da calibração no cliente, esquecer equipamentos e materiais de patrimônio da empresa no laboratório do cliente</text:span></text:p>
                  </text:list-item>
                  <text:list-item>
                    <text:p xml:id="id42" text:id="id42"><text:span text:style-name="T8">Desrespeito às políticas, manuais e procedimentos da Evagon</text:span></text:p>
                  </text:list-item>
                  <text:list-item>
                    <text:p xml:id="id43" text:id="id43"><text:span text:style-name="T8">Pouca produtividade ou falta de qualidade no desempenho das funções</text:span></text:p>
                  </text:list-item>
                  <text:list-item>
                    <text:p xml:id="id44" text:id="id44"><text:span text:style-name="T8">Desleixo no uso de equipamentos, ferramentas e materiais de trabalho (Pertencentes à Evagon <text:s/>ou ao cliente)</text:span></text:p>
                  </text:list-item>
                  <text:list-item>
                    <text:p xml:id="id45" text:id="id45"><text:span text:style-name="T8">Cometimento de atos desonestos</text:span></text:p>
                  </text:list-item>
                  <text:list-item>
                    <text:p xml:id="id46" text:id="id46"><text:span text:style-name="T8">Faltas e atrasos injustificados</text:span></text:p>
                  </text:list-item>
                  <text:list-item>
                    <text:p xml:id="id47" text:id="id47"><text:span text:style-name="T8">Ausências contínuas do local de trabalho sem justificativas</text:span></text:p>
                  </text:list-item>
                </text:list>
              </text:list-item>
            </text:list>
            <text:p text:style-name="P5"><text:span text:style-name="T9"/></text:p>
            <text:p text:style-name="P5"><text:span text:style-name="T9"/></text:p>
            <text:p xml:id="id48" text:id="id48" text:style-name="P5"><text:span text:style-name="T10">• </text:span></text:p>
            <text:list text:continue-numbering="true" text:style-name="L2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  <text:p text:style-name="P5"><text:span text:style-name="T6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íticas</text:p>
          </draw:text-box>
        </draw:frame>
        <draw:frame presentation:style-name="pr2" draw:text-style-name="P4" draw:layer="layout" svg:width="25.16cm" svg:height="16.788cm" svg:x="1.6cm" svg:y="6.212cm" presentation:class="outline" presentation:user-transformed="true">
          <draw:text-box>
            <text:list text:style-name="L2">
              <text:list-item>
                <text:p xml:id="id49" text:id="id49" text:style-name="P5"><text:span text:style-name="T7">MOTIVOS PARA A APLICAÇÃO DE MEDIDAS DISCIPLINARES</text:span></text:p>
                <text:list>
                  <text:list-item>
                    <text:p xml:id="id50" text:id="id50"><text:span text:style-name="T11">Uso do celular pessoal no local de trabalho, sem justificativa cabível</text:span></text:p>
                  </text:list-item>
                  <text:list-item>
                    <text:p xml:id="id51" text:id="id51"><text:span text:style-name="T11">Comportamento incompatível com as regras da sociedade, colocando em risco a imagem e reputação da empresa, dos empregadores e dos demais colaboradores</text:span></text:p>
                  </text:list-item>
                  <text:list-item>
                    <text:p xml:id="id52" text:id="id52"><text:span text:style-name="T11">Justificação de faltas com atestado médico falso</text:span></text:p>
                  </text:list-item>
                  <text:list-item>
                    <text:p xml:id="id53" text:id="id53"><text:span text:style-name="T11">Revelar informações confidenciais sobre os negócios da empresa</text:span></text:p>
                  </text:list-item>
                  <text:list-item>
                    <text:p xml:id="id54" text:id="id54"><text:span text:style-name="T11">Fofoca, agressão física ou verbal, dependendo da gravidade do problema, dentro ou fora do ambiente de trabalho</text:span></text:p>
                  </text:list-item>
                  <text:list-item>
                    <text:p xml:id="id55" text:id="id55"><text:span text:style-name="T11">Marcação de ponto em desacordo com os horários estabelecidos e suas tolerâncias</text:span></text:p>
                  </text:list-item>
                  <text:list-item>
                    <text:p xml:id="id56" text:id="id56"><text:span text:style-name="T11">Toda ação ou omissão desonesta, que revelam desonestidade, abuso de confiança, fraude ou má-fé, visando a uma vantagem para si ou para outrem</text:span></text:p>
                  </text:list-item>
                  <text:list-item>
                    <text:p xml:id="id57" text:id="id57"><text:span text:style-name="T11">Desobediência a uma ordem específica, verbal ou escrita</text:span></text:p>
                  </text:list-item>
                  <text:list-item>
                    <text:p xml:id="id58" text:id="id58"><text:span text:style-name="T11">Reclamações diretas e procedentes de clientes</text:span></text:p>
                  </text:list-item>
                </text:list>
              </text:list-item>
            </text:list>
            <text:p text:style-name="P5"><text:span text:style-name="T9"/></text:p>
            <text:p text:style-name="P5"><text:span text:style-name="T10"/></text:p>
            <text:list text:continue-numbering="true" text:style-name="L2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  <text:p text:style-name="P5"><text:span text:style-name="T6"/></text:p>
            <text:p text:style-name="P5"><text:span text:style-name="T5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1" svg:font-family="Arial-BoldMT"/>
    <style:font-face style:name="ArialMT2" svg:font-family="ArialMT"/>
    <style:font-face style:name="OpenSymbol" svg:font-family="OpenSymbol"/>
    <style:font-face style:name="ArialMT1" svg:font-family="ArialMT" style:font-family-generic="swiss"/>
    <style:font-face style:name="Arial Unicode MS2" svg:font-family="'Arial Unicode MS'" style:font-pitch="variable"/>
    <style:font-face style:name="Arial-BoldMT" svg:font-family="Arial-BoldMT" style:font-pitch="variable"/>
    <style:font-face style:name="Liberation Sans2" svg:font-family="'Liberation Sans'" style:font-pitch="variable"/>
    <style:font-face style:name="Microsoft YaHei2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380000032A3466B9D87F05EF7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6:12:14.590000000</meta:creation-date>
    <dc:date>2019-02-18T10:15:57.285000000</dc:date>
    <meta:editing-duration>PT2H48M7S</meta:editing-duration>
    <meta:editing-cycles>22</meta:editing-cycles>
    <meta:generator>LibreOffice/5.0.5.2$Windows_x86 LibreOffice_project/55b006a02d247b5f7215fc6ea0fde844b30035b3</meta:generator>
    <meta:document-statistic meta:object-count="77"/>
  </office:meta>
</office:document-meta>
</file>